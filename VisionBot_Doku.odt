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47000001EDF4CF7BDA.png" manifest:media-type="image/png"/>
  <manifest:file-entry manifest:full-path="Pictures/100000000000053C000002D3CFCC92DC.png" manifest:media-type="image/png"/>
  <manifest:file-entry manifest:full-path="Pictures/1000000000000383000001FEECF940F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office:font-face-decls>
  <office:automatic-styles>
    <style:style style:name="Tabelle1" style:family="table">
      <style:table-properties style:width="16.228cm" fo:margin-left="0.009cm" fo:margin-top="0cm" fo:margin-bottom="0cm" table:align="left" style:writing-mode="page"/>
    </style:style>
    <style:style style:name="Tabelle1.A" style:family="table-column">
      <style:table-column-properties style:column-width="1.235cm"/>
    </style:style>
    <style:style style:name="Tabelle1.B" style:family="table-column">
      <style:table-column-properties style:column-width="2.822cm"/>
    </style:style>
    <style:style style:name="Tabelle1.C" style:family="table-column">
      <style:table-column-properties style:column-width="4.057cm"/>
    </style:style>
    <style:style style:name="Tabelle1.D" style:family="table-column">
      <style:table-column-properties style:column-width="8.114cm"/>
    </style:style>
    <style:style style:name="Tabelle1.1" style:family="table-row">
      <style:table-row-properties fo:keep-together="auto"/>
    </style:style>
    <style:style style:name="Tabelle1.A1" style:family="table-cell">
      <style:table-cell-properties style:vertical-align="middle" fo:background-color="#e8f5f2" fo:padding-left="0.212cm" fo:padding-right="0.212cm" fo:padding-top="0.141cm" fo:padding-bottom="0.141cm" fo:border="0.5pt solid #aaaaaa">
        <style:background-image/>
      </style:table-cell-properties>
    </style:style>
    <style:style style:name="Tabelle1.A2" style:family="table-cell">
      <style:table-cell-properties style:vertical-align="middle" fo:background-color="#ffffff" fo:padding-left="0.212cm" fo:padding-right="0.212cm" fo:padding-top="0.141cm" fo:padding-bottom="0.141cm" fo:border="0.5pt solid #aaaaaa">
        <style:background-image/>
      </style:table-cell-properties>
    </style:style>
    <style:style style:name="Tabelle2" style:family="table">
      <style:table-properties style:width="16.228cm" fo:margin-left="0.009cm" fo:margin-top="0cm" fo:margin-bottom="0cm" table:align="left" style:writing-mode="page"/>
    </style:style>
    <style:style style:name="Tabelle2.A" style:family="table-column">
      <style:table-column-properties style:column-width="3.879cm"/>
    </style:style>
    <style:style style:name="Tabelle2.B" style:family="table-column">
      <style:table-column-properties style:column-width="5.292cm"/>
    </style:style>
    <style:style style:name="Tabelle2.C" style:family="table-column">
      <style:table-column-properties style:column-width="7.057cm"/>
    </style:style>
    <style:style style:name="Tabelle2.1" style:family="table-row">
      <style:table-row-properties fo:keep-together="auto"/>
    </style:style>
    <style:style style:name="Tabelle2.A1" style:family="table-cell">
      <style:table-cell-properties style:vertical-align="middle" fo:background-color="#e8f5f2" fo:padding-left="0.212cm" fo:padding-right="0.212cm" fo:padding-top="0.141cm" fo:padding-bottom="0.141cm" fo:border="0.5pt solid #aaaaaa">
        <style:background-image/>
      </style:table-cell-properties>
    </style:style>
    <style:style style:name="Tabelle2.A2" style:family="table-cell">
      <style:table-cell-properties style:vertical-align="middle" fo:background-color="#ffffff" fo:padding-left="0.212cm" fo:padding-right="0.212cm" fo:padding-top="0.141cm" fo:padding-bottom="0.141cm" fo:border="0.5pt solid #aaaaaa">
        <style:background-image/>
      </style:table-cell-properties>
    </style:style>
    <style:style style:name="Tabelle3" style:family="table">
      <style:table-properties style:width="16.228cm" fo:margin-left="0.009cm" fo:margin-top="0cm" fo:margin-bottom="0cm" table:align="left" style:writing-mode="page"/>
    </style:style>
    <style:style style:name="Tabelle3.A" style:family="table-column">
      <style:table-column-properties style:column-width="5.292cm"/>
    </style:style>
    <style:style style:name="Tabelle3.B" style:family="table-column">
      <style:table-column-properties style:column-width="2.115cm"/>
    </style:style>
    <style:style style:name="Tabelle3.C" style:family="table-column">
      <style:table-column-properties style:column-width="8.821cm"/>
    </style:style>
    <style:style style:name="Tabelle3.1" style:family="table-row">
      <style:table-row-properties fo:keep-together="auto"/>
    </style:style>
    <style:style style:name="Tabelle3.A1" style:family="table-cell">
      <style:table-cell-properties style:vertical-align="middle" fo:background-color="#e8f5f2" fo:padding-left="0.212cm" fo:padding-right="0.212cm" fo:padding-top="0.141cm" fo:padding-bottom="0.141cm" fo:border="0.5pt solid #aaaaaa">
        <style:background-image/>
      </style:table-cell-properties>
    </style:style>
    <style:style style:name="Tabelle3.A2" style:family="table-cell">
      <style:table-cell-properties style:vertical-align="middle" fo:background-color="#ffffff" fo:padding-left="0.212cm" fo:padding-right="0.212cm" fo:padding-top="0.141cm" fo:padding-bottom="0.141cm" fo:border="0.5pt solid #aaaaaa">
        <style:background-image/>
      </style:table-cell-properties>
    </style:style>
    <style:style style:name="Tabelle4" style:family="table">
      <style:table-properties style:width="16.228cm" fo:margin-left="0.009cm" fo:margin-top="0cm" fo:margin-bottom="0cm" table:align="left" style:writing-mode="page"/>
    </style:style>
    <style:style style:name="Tabelle4.A" style:family="table-column">
      <style:table-column-properties style:column-width="3.879cm"/>
    </style:style>
    <style:style style:name="Tabelle4.B" style:family="table-column">
      <style:table-column-properties style:column-width="3.882cm"/>
    </style:style>
    <style:style style:name="Tabelle4.C" style:family="table-column">
      <style:table-column-properties style:column-width="3.881cm"/>
    </style:style>
    <style:style style:name="Tabelle4.D" style:family="table-column">
      <style:table-column-properties style:column-width="4.586cm"/>
    </style:style>
    <style:style style:name="Tabelle4.1" style:family="table-row">
      <style:table-row-properties fo:keep-together="auto"/>
    </style:style>
    <style:style style:name="Tabelle4.A1" style:family="table-cell">
      <style:table-cell-properties style:vertical-align="middle" fo:background-color="#e8f5f2" fo:padding-left="0.212cm" fo:padding-right="0.212cm" fo:padding-top="0.141cm" fo:padding-bottom="0.141cm" fo:border="0.5pt solid #aaaaaa">
        <style:background-image/>
      </style:table-cell-properties>
    </style:style>
    <style:style style:name="Tabelle4.A2" style:family="table-cell">
      <style:table-cell-properties style:vertical-align="middle" fo:background-color="#ffffff" fo:padding-left="0.212cm" fo:padding-right="0.212cm" fo:padding-top="0.141cm" fo:padding-bottom="0.141cm" fo:border="0.5pt solid #aaaaaa">
        <style:background-image/>
      </style:table-cell-properties>
    </style:style>
    <style:style style:name="Tabelle5" style:family="table">
      <style:table-properties style:width="16.228cm" fo:margin-left="0.009cm" fo:margin-top="0cm" fo:margin-bottom="0cm" table:align="left" style:writing-mode="page"/>
    </style:style>
    <style:style style:name="Tabelle5.A" style:family="table-column">
      <style:table-column-properties style:column-width="7.936cm"/>
    </style:style>
    <style:style style:name="Tabelle5.B" style:family="table-column">
      <style:table-column-properties style:column-width="8.292cm"/>
    </style:style>
    <style:style style:name="Tabelle5.1" style:family="table-row">
      <style:table-row-properties fo:keep-together="auto"/>
    </style:style>
    <style:style style:name="Tabelle5.A1" style:family="table-cell">
      <style:table-cell-properties style:vertical-align="middle" fo:background-color="#e8f5f2" fo:padding-left="0.212cm" fo:padding-right="0.212cm" fo:padding-top="0.141cm" fo:padding-bottom="0.141cm" fo:border="0.5pt solid #aaaaaa">
        <style:background-image/>
      </style:table-cell-properties>
    </style:style>
    <style:style style:name="Tabelle5.A2" style:family="table-cell">
      <style:table-cell-properties style:vertical-align="middle" fo:background-color="#ffffff" fo:padding-left="0.212cm" fo:padding-right="0.212cm" fo:padding-top="0.141cm" fo:padding-bottom="0.141cm" fo:border="0.5pt solid #aaaaaa">
        <style:background-image/>
      </style:table-cell-properties>
    </style:style>
    <style:style style:name="Tabelle6" style:family="table">
      <style:table-properties style:width="16.228cm" fo:margin-left="0.009cm" fo:margin-top="0cm" fo:margin-bottom="0cm" table:align="left" style:writing-mode="page"/>
    </style:style>
    <style:style style:name="Tabelle6.A" style:family="table-column">
      <style:table-column-properties style:column-width="3.879cm"/>
    </style:style>
    <style:style style:name="Tabelle6.B" style:family="table-column">
      <style:table-column-properties style:column-width="4.411cm"/>
    </style:style>
    <style:style style:name="Tabelle6.C" style:family="table-column">
      <style:table-column-properties style:column-width="7.938cm"/>
    </style:style>
    <style:style style:name="Tabelle6.1" style:family="table-row">
      <style:table-row-properties fo:keep-together="auto"/>
    </style:style>
    <style:style style:name="Tabelle6.A1" style:family="table-cell">
      <style:table-cell-properties style:vertical-align="middle" fo:background-color="#e8f5f2" fo:padding-left="0.212cm" fo:padding-right="0.212cm" fo:padding-top="0.141cm" fo:padding-bottom="0.141cm" fo:border="0.5pt solid #aaaaaa">
        <style:background-image/>
      </style:table-cell-properties>
    </style:style>
    <style:style style:name="Tabelle6.A2" style:family="table-cell">
      <style:table-cell-properties style:vertical-align="middle" fo:background-color="#ffffff" fo:padding-left="0.212cm" fo:padding-right="0.212cm" fo:padding-top="0.141cm" fo:padding-bottom="0.141cm" fo:border="0.5pt solid #aaaaaa">
        <style:background-image/>
      </style:table-cell-properties>
    </style:style>
    <style:style style:name="Tabelle7" style:family="table">
      <style:table-properties style:width="16.228cm" fo:margin-left="0.009cm" fo:margin-top="0cm" fo:margin-bottom="0cm" table:align="left" style:writing-mode="page"/>
    </style:style>
    <style:style style:name="Tabelle7.A" style:family="table-column">
      <style:table-column-properties style:column-width="4.937cm"/>
    </style:style>
    <style:style style:name="Tabelle7.B" style:family="table-column">
      <style:table-column-properties style:column-width="4.941cm"/>
    </style:style>
    <style:style style:name="Tabelle7.C" style:family="table-column">
      <style:table-column-properties style:column-width="6.35cm"/>
    </style:style>
    <style:style style:name="Tabelle7.1" style:family="table-row">
      <style:table-row-properties fo:keep-together="auto"/>
    </style:style>
    <style:style style:name="Tabelle7.A1" style:family="table-cell">
      <style:table-cell-properties style:vertical-align="middle" fo:background-color="#e8f5f2" fo:padding-left="0.212cm" fo:padding-right="0.212cm" fo:padding-top="0.141cm" fo:padding-bottom="0.141cm" fo:border="0.5pt solid #aaaaaa">
        <style:background-image/>
      </style:table-cell-properties>
    </style:style>
    <style:style style:name="Tabelle7.A2" style:family="table-cell">
      <style:table-cell-properties style:vertical-align="middle" fo:background-color="#ffffff" fo:padding-left="0.212cm" fo:padding-right="0.212cm" fo:padding-top="0.141cm" fo:padding-bottom="0.141cm" fo:border="0.5pt solid #aaaaaa">
        <style:background-image/>
      </style:table-cell-properties>
    </style:style>
    <style:style style:name="Tabelle8" style:family="table">
      <style:table-properties style:width="16.228cm" fo:margin-left="0.009cm" fo:margin-top="0cm" fo:margin-bottom="0cm" table:align="left" style:writing-mode="page"/>
    </style:style>
    <style:style style:name="Tabelle8.A" style:family="table-column">
      <style:table-column-properties style:column-width="5.292cm"/>
    </style:style>
    <style:style style:name="Tabelle8.B" style:family="table-column">
      <style:table-column-properties style:column-width="4.586cm"/>
    </style:style>
    <style:style style:name="Tabelle8.C" style:family="table-column">
      <style:table-column-properties style:column-width="6.35cm"/>
    </style:style>
    <style:style style:name="Tabelle8.1" style:family="table-row">
      <style:table-row-properties fo:keep-together="auto"/>
    </style:style>
    <style:style style:name="Tabelle8.A1" style:family="table-cell">
      <style:table-cell-properties style:vertical-align="middle" fo:background-color="#e8f5f2" fo:padding-left="0.212cm" fo:padding-right="0.212cm" fo:padding-top="0.141cm" fo:padding-bottom="0.141cm" fo:border="0.5pt solid #aaaaaa">
        <style:background-image/>
      </style:table-cell-properties>
    </style:style>
    <style:style style:name="Tabelle8.A2" style:family="table-cell">
      <style:table-cell-properties style:vertical-align="middle" fo:background-color="#ffffff" fo:padding-left="0.212cm" fo:padding-right="0.212cm" fo:padding-top="0.141cm" fo:padding-bottom="0.141cm" fo:border="0.5pt solid #aaaaaa">
        <style:background-image/>
      </style:table-cell-properties>
    </style:style>
    <style:style style:name="Tabelle9" style:family="table">
      <style:table-properties style:width="16.228cm" fo:margin-left="0.009cm" fo:margin-top="0cm" fo:margin-bottom="0cm" table:align="left" style:writing-mode="page"/>
    </style:style>
    <style:style style:name="Tabelle9.A" style:family="table-column">
      <style:table-column-properties style:column-width="8.114cm"/>
    </style:style>
    <style:style style:name="Tabelle9.1" style:family="table-row">
      <style:table-row-properties fo:keep-together="auto"/>
    </style:style>
    <style:style style:name="Tabelle9.A1" style:family="table-cell">
      <style:table-cell-properties style:vertical-align="middle" fo:background-color="#e8f5f2" fo:padding-left="0.212cm" fo:padding-right="0.212cm" fo:padding-top="0.141cm" fo:padding-bottom="0.141cm" fo:border="0.5pt solid #aaaaaa">
        <style:background-image/>
      </style:table-cell-properties>
    </style:style>
    <style:style style:name="Tabelle9.A2" style:family="table-cell">
      <style:table-cell-properties style:vertical-align="middle" fo:background-color="#ffffff" fo:padding-left="0.212cm" fo:padding-right="0.212cm" fo:padding-top="0.141cm" fo:padding-bottom="0.141cm" fo:border="0.5pt solid #aaaaaa">
        <style:background-image/>
      </style:table-cell-properties>
    </style:style>
    <style:style style:name="Tabelle10" style:family="table">
      <style:table-properties style:width="16.228cm" fo:margin-left="0.009cm" fo:margin-top="0cm" fo:margin-bottom="0cm" table:align="left" style:writing-mode="page"/>
    </style:style>
    <style:style style:name="Tabelle10.A" style:family="table-column">
      <style:table-column-properties style:column-width="4.057cm"/>
    </style:style>
    <style:style style:name="Tabelle10.B" style:family="table-column">
      <style:table-column-properties style:column-width="2.82cm"/>
    </style:style>
    <style:style style:name="Tabelle10.C" style:family="table-column">
      <style:table-column-properties style:column-width="3cm"/>
    </style:style>
    <style:style style:name="Tabelle10.D" style:family="table-column">
      <style:table-column-properties style:column-width="3.173cm"/>
    </style:style>
    <style:style style:name="Tabelle10.E" style:family="table-column">
      <style:table-column-properties style:column-width="3.177cm"/>
    </style:style>
    <style:style style:name="Tabelle10.1" style:family="table-row">
      <style:table-row-properties fo:keep-together="auto"/>
    </style:style>
    <style:style style:name="Tabelle10.A1" style:family="table-cell">
      <style:table-cell-properties style:vertical-align="middle" fo:background-color="#e8f5f2" fo:padding-left="0.212cm" fo:padding-right="0.212cm" fo:padding-top="0.141cm" fo:padding-bottom="0.141cm" fo:border="0.5pt solid #aaaaaa">
        <style:background-image/>
      </style:table-cell-properties>
    </style:style>
    <style:style style:name="Tabelle10.A2" style:family="table-cell">
      <style:table-cell-properties style:vertical-align="middle" fo:background-color="#ffffff" fo:padding-left="0.212cm" fo:padding-right="0.212cm" fo:padding-top="0.141cm" fo:padding-bottom="0.141cm" fo:border="0.5pt solid #aaaaaa">
        <style:background-image/>
      </style:table-cell-properties>
    </style:style>
    <style:style style:name="Tabelle11" style:family="table">
      <style:table-properties style:width="16.228cm" fo:margin-left="0.009cm" fo:margin-top="0cm" fo:margin-bottom="0cm" table:align="left" style:writing-mode="page"/>
    </style:style>
    <style:style style:name="Tabelle11.A" style:family="table-column">
      <style:table-column-properties style:column-width="6.701cm"/>
    </style:style>
    <style:style style:name="Tabelle11.B" style:family="table-column">
      <style:table-column-properties style:column-width="2.824cm"/>
    </style:style>
    <style:style style:name="Tabelle11.C" style:family="table-column">
      <style:table-column-properties style:column-width="6.703cm"/>
    </style:style>
    <style:style style:name="Tabelle11.1" style:family="table-row">
      <style:table-row-properties fo:keep-together="auto"/>
    </style:style>
    <style:style style:name="Tabelle11.A1" style:family="table-cell">
      <style:table-cell-properties style:vertical-align="middle" fo:background-color="#e8f5f2" fo:padding-left="0.212cm" fo:padding-right="0.212cm" fo:padding-top="0.141cm" fo:padding-bottom="0.141cm" fo:border="0.5pt solid #aaaaaa">
        <style:background-image/>
      </style:table-cell-properties>
    </style:style>
    <style:style style:name="Tabelle11.A2" style:family="table-cell">
      <style:table-cell-properties style:vertical-align="middle" fo:background-color="#ffffff" fo:padding-left="0.212cm" fo:padding-right="0.212cm" fo:padding-top="0.141cm" fo:padding-bottom="0.141cm" fo:border="0.5pt solid #aaaaaa">
        <style:background-image/>
      </style:table-cell-properties>
    </style:style>
    <style:style style:name="Tabelle15" style:family="table">
      <style:table-properties style:width="16.228cm" fo:margin-left="0.009cm" fo:margin-top="0cm" fo:margin-bottom="0cm" table:align="left" style:writing-mode="page"/>
    </style:style>
    <style:style style:name="Tabelle15.A" style:family="table-column">
      <style:table-column-properties style:column-width="7.407cm"/>
    </style:style>
    <style:style style:name="Tabelle15.B" style:family="table-column">
      <style:table-column-properties style:column-width="8.821cm"/>
    </style:style>
    <style:style style:name="Tabelle15.1" style:family="table-row">
      <style:table-row-properties fo:keep-together="auto"/>
    </style:style>
    <style:style style:name="Tabelle15.A1" style:family="table-cell">
      <style:table-cell-properties style:vertical-align="middle" fo:background-color="#e8f5f2" fo:padding-left="0.212cm" fo:padding-right="0.212cm" fo:padding-top="0.141cm" fo:padding-bottom="0.141cm" fo:border="0.5pt solid #aaaaaa">
        <style:background-image/>
      </style:table-cell-properties>
    </style:style>
    <style:style style:name="Tabelle15.A2" style:family="table-cell">
      <style:table-cell-properties style:vertical-align="middle" fo:background-color="#ffffff" fo:padding-left="0.212cm" fo:padding-right="0.212cm" fo:padding-top="0.141cm" fo:padding-bottom="0.141cm" fo:border="0.5pt solid #aaaaaa">
        <style:background-image/>
      </style:table-cell-properties>
    </style:style>
    <style:style style:name="Tabelle16" style:family="table">
      <style:table-properties style:width="16.228cm" fo:margin-left="0.009cm" fo:margin-top="0cm" fo:margin-bottom="0cm" table:align="left" style:writing-mode="page"/>
    </style:style>
    <style:style style:name="Tabelle16.A" style:family="table-column">
      <style:table-column-properties style:column-width="4.408cm"/>
    </style:style>
    <style:style style:name="Tabelle16.B" style:family="table-column">
      <style:table-column-properties style:column-width="5.292cm"/>
    </style:style>
    <style:style style:name="Tabelle16.C" style:family="table-column">
      <style:table-column-properties style:column-width="6.528cm"/>
    </style:style>
    <style:style style:name="Tabelle16.1" style:family="table-row">
      <style:table-row-properties fo:keep-together="auto"/>
    </style:style>
    <style:style style:name="Tabelle16.A1" style:family="table-cell">
      <style:table-cell-properties style:vertical-align="middle" fo:background-color="#e8f5f2" fo:padding-left="0.212cm" fo:padding-right="0.212cm" fo:padding-top="0.141cm" fo:padding-bottom="0.141cm" fo:border="0.5pt solid #aaaaaa">
        <style:background-image/>
      </style:table-cell-properties>
    </style:style>
    <style:style style:name="Tabelle16.A2" style:family="table-cell">
      <style:table-cell-properties style:vertical-align="middle" fo:background-color="#ffffff" fo:padding-left="0.212cm" fo:padding-right="0.212cm" fo:padding-top="0.141cm" fo:padding-bottom="0.141cm" fo:border="0.5pt solid #aaaaaa">
        <style:background-image/>
      </style:table-cell-properties>
    </style:style>
    <style:style style:name="P1" style:family="paragraph" style:parent-style-name="Standard">
      <style:paragraph-properties fo:margin-top="0cm" fo:margin-bottom="0.353cm" style:contextual-spacing="false" fo:text-align="center" style:justify-single-word="false"/>
      <style:text-properties fo:color="#146356" loext:opacity="100%" style:font-name="Liberation Sans1" fo:font-size="28pt" fo:font-weight="bold" style:font-name-asian="Liberation Sans" style:font-size-asian="28pt" style:font-weight-asian="bold" style:font-name-complex="Liberation Sans3" style:font-size-complex="28pt" style:font-weight-complex="bold"/>
    </style:style>
    <style:style style:name="P2" style:family="paragraph" style:parent-style-name="Standard">
      <style:paragraph-properties fo:margin-top="0cm" fo:margin-bottom="0.212cm" style:contextual-spacing="false" fo:text-align="center" style:justify-single-word="false"/>
      <style:text-properties fo:color="#333333" loext:opacity="100%" style:font-name="Liberation Sans1" fo:font-size="14pt" style:font-name-asian="Liberation Sans" style:font-size-asian="14pt" style:font-name-complex="Liberation Sans3" style:font-size-complex="14pt"/>
    </style:style>
    <style:style style:name="P3" style:family="paragraph" style:parent-style-name="Standard">
      <style:paragraph-properties fo:margin-top="0cm" fo:margin-bottom="0.141cm" style:contextual-spacing="false" fo:text-align="center" style:justify-single-word="false"/>
      <style:text-properties fo:color="#555555" loext:opacity="100%" style:font-name="Liberation Sans1" fo:font-size="12pt" fo:font-style="italic" style:font-name-asian="Liberation Sans" style:font-size-asian="12pt" style:font-style-asian="italic" style:font-name-complex="Liberation Sans3" style:font-size-complex="12pt" style:font-style-complex="italic"/>
    </style:style>
    <style:style style:name="P4" style:family="paragraph" style:parent-style-name="Standard">
      <style:paragraph-properties fo:margin-top="0cm" fo:margin-bottom="0.141cm" style:contextual-spacing="false" fo:text-align="center" style:justify-single-word="false"/>
      <style:text-properties style:font-name="Liberation Sans1" fo:font-size="12pt" fo:font-weight="bold" style:font-name-asian="Liberation Sans" style:font-size-asian="12pt" style:font-weight-asian="bold" style:font-name-complex="Liberation Sans3" style:font-size-complex="12pt" style:font-weight-complex="bold"/>
    </style:style>
    <style:style style:name="P5" style:family="paragraph" style:parent-style-name="Standard">
      <style:paragraph-properties fo:margin-top="0cm" fo:margin-bottom="0.141cm" style:contextual-spacing="false" fo:text-align="center" style:justify-single-word="false"/>
      <style:text-properties style:font-name="Liberation Sans1" fo:font-size="12pt" style:font-name-asian="Liberation Sans" style:font-size-asian="12pt" style:font-name-complex="Liberation Sans3" style:font-size-complex="12pt"/>
    </style:style>
    <style:style style:name="P6" style:family="paragraph" style:parent-style-name="Standard">
      <style:paragraph-properties fo:margin-top="0cm" fo:margin-bottom="0.141cm" style:contextual-spacing="false" fo:text-align="center" style:justify-single-word="false"/>
    </style:style>
    <style:style style:name="P7" style:family="paragraph" style:parent-style-name="Standard">
      <style:text-properties fo:color="#1a1a1a" loext:opacity="100%" style:text-position="super 58%" style:font-name="Liberation Sans1" fo:font-size="14pt" fo:font-weight="bold" officeooo:rsid="00161f0a" style:font-name-asian="Liberation Sans" style:font-size-asian="14pt" style:font-weight-asian="bold" style:font-name-complex="Liberation Sans3" style:font-size-complex="14pt" style:font-weight-complex="bold"/>
    </style:style>
    <style:style style:name="P8" style:family="paragraph" style:parent-style-name="Standard">
      <style:text-properties fo:color="#1a1a1a" loext:opacity="100%" style:text-position="0% 100%" style:font-name="Liberation Sans1" fo:font-size="14pt" fo:font-weight="bold" officeooo:rsid="00161f0a" style:font-name-asian="Liberation Sans" style:font-size-asian="14pt" style:font-weight-asian="bold" style:font-name-complex="Liberation Sans3" style:font-size-complex="14pt" style:font-weight-complex="bold"/>
    </style:style>
    <style:style style:name="P9" style:family="paragraph" style:parent-style-name="Heading_20_1">
      <style:paragraph-properties fo:margin-top="0.529cm" fo:margin-bottom="0.282cm" style:contextual-spacing="false" fo:break-before="page"/>
      <style:text-properties fo:color="#1a1a1a" loext:opacity="100%" style:font-name="Liberation Sans1" fo:font-size="14pt" fo:font-weight="bold" style:font-name-asian="Liberation Sans" style:font-size-asian="14pt" style:font-weight-asian="bold" style:font-name-complex="Liberation Sans3" style:font-size-complex="14pt" style:font-weight-complex="bold"/>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999cm" style:type="right" style:leader-style="dotted" style:leader-text="."/>
        </style:tab-stops>
      </style:paragraph-properties>
    </style:style>
    <style:style style:name="P12" style:family="paragraph" style:parent-style-name="Contents_20_3">
      <style:paragraph-properties>
        <style:tab-stops>
          <style:tab-stop style:position="16.999cm" style:type="right" style:leader-style="dotted" style:leader-text="."/>
        </style:tab-stops>
      </style:paragraph-properties>
    </style:style>
    <style:style style:name="P13" style:family="paragraph" style:parent-style-name="Standard">
      <style:text-properties fo:color="#1a1a1a" loext:opacity="100%" style:font-name="Liberation Sans1" fo:font-size="14pt" fo:font-weight="bold" style:font-name-asian="Liberation Sans" style:font-size-asian="14pt" style:font-weight-asian="bold" style:font-name-complex="Liberation Sans3" style:font-size-complex="14pt" style:font-weight-complex="bold"/>
    </style:style>
    <style:style style:name="P14" style:family="paragraph" style:parent-style-name="Standard">
      <style:paragraph-properties fo:margin-top="0cm" fo:margin-bottom="0.212cm" style:contextual-spacing="false" fo:text-align="justify" style:justify-single-word="false" loext:word-spacing-minimum="75%" loext:word-spacing-maximum="133%"/>
      <style:text-properties style:font-name="Liberation Sans1" fo:font-size="12pt" fo:font-style="normal" fo:font-weight="normal" style:font-name-asian="Liberation Sans" style:font-size-asian="12pt" style:font-style-asian="normal" style:font-weight-asian="normal" style:font-name-complex="Liberation Sans3" style:font-size-complex="12pt" style:font-style-complex="normal" style:font-weight-complex="normal"/>
    </style:style>
    <style:style style:name="P15" style:family="paragraph" style:parent-style-name="Heading_20_1">
      <style:paragraph-properties fo:margin-top="0.529cm" fo:margin-bottom="0.282cm" style:contextual-spacing="false"/>
      <style:text-properties fo:color="#1a1a1a" loext:opacity="100%" style:font-name="Liberation Sans1" fo:font-size="14pt" fo:font-weight="bold" style:font-name-asian="Liberation Sans" style:font-size-asian="14pt" style:font-weight-asian="bold" style:font-name-complex="Liberation Sans3" style:font-size-complex="14pt" style:font-weight-complex="bold"/>
    </style:style>
    <style:style style:name="P16" style:family="paragraph" style:parent-style-name="Heading_20_2">
      <style:paragraph-properties fo:margin-top="0.423cm" fo:margin-bottom="0.212cm" style:contextual-spacing="false"/>
      <style:text-properties fo:color="#1a1a1a" loext:opacity="100%" style:font-name="Liberation Sans1" fo:font-size="13pt" fo:font-weight="bold" style:font-name-asian="Liberation Sans" style:font-size-asian="13pt" style:font-weight-asian="bold" style:font-name-complex="Liberation Sans3" style:font-size-complex="13pt" style:font-weight-complex="bold"/>
    </style:style>
    <style:style style:name="P17" style:family="paragraph" style:parent-style-name="Heading_20_2">
      <style:paragraph-properties fo:margin-top="0.423cm" fo:margin-bottom="0.212cm" style:contextual-spacing="false" fo:break-before="page"/>
      <style:text-properties fo:color="#1a1a1a" loext:opacity="100%" style:font-name="Liberation Sans1" fo:font-size="13pt" fo:font-weight="bold" style:font-name-asian="Liberation Sans" style:font-size-asian="13pt" style:font-weight-asian="bold" style:font-name-complex="Liberation Sans3" style:font-size-complex="13pt" style:font-weight-complex="bold"/>
    </style:style>
    <style:style style:name="P18" style:family="paragraph" style:parent-style-name="List_20_Paragraph" style:list-style-name="WWNum2">
      <style:paragraph-properties fo:margin-top="0cm" fo:margin-bottom="0.141cm" style:contextual-spacing="false"/>
      <style:text-properties style:font-name="Liberation Sans1" fo:font-size="12pt" style:font-name-asian="Liberation Sans" style:font-size-asian="12pt" style:font-name-complex="Liberation Sans3" style:font-size-complex="12pt"/>
    </style:style>
    <style:style style:name="P19" style:family="paragraph" style:parent-style-name="Standard">
      <style:text-properties style:font-name="Liberation Sans1" fo:font-size="12pt" fo:font-weight="bold" style:font-name-asian="Liberation Sans" style:font-size-asian="12pt" style:font-weight-asian="bold" style:font-name-complex="Liberation Sans3" style:font-size-complex="12pt" style:font-weight-complex="bold"/>
    </style:style>
    <style:style style:name="P20" style:family="paragraph" style:parent-style-name="Standard">
      <style:text-properties style:font-name="Liberation Sans1" fo:font-size="12pt" fo:font-weight="normal" style:font-name-asian="Liberation Sans" style:font-size-asian="12pt" style:font-weight-asian="normal" style:font-name-complex="Liberation Sans3" style:font-size-complex="12pt" style:font-weight-complex="normal"/>
    </style:style>
    <style:style style:name="P21" style:family="paragraph" style:parent-style-name="Standard">
      <style:paragraph-properties fo:margin-top="0cm" fo:margin-bottom="0.212cm" style:contextual-spacing="false" fo:text-align="justify" style:justify-single-word="false" loext:word-spacing-minimum="75%" loext:word-spacing-maximum="133%"/>
      <style:text-properties style:font-name="Liberation Sans1" fo:font-size="12pt" fo:font-style="normal" fo:font-weight="normal" officeooo:paragraph-rsid="00161f0a" style:font-name-asian="Liberation Sans" style:font-size-asian="12pt" style:font-style-asian="normal" style:font-weight-asian="normal" style:font-name-complex="Liberation Sans3" style:font-size-complex="12pt" style:font-style-complex="normal" style:font-weight-complex="normal"/>
    </style:style>
    <style:style style:name="P22" style:family="paragraph" style:parent-style-name="Standard">
      <style:text-properties style:font-name="Liberation Sans1" fo:font-size="12pt" fo:font-style="normal" fo:font-weight="normal" style:font-name-asian="Liberation Sans" style:font-size-asian="12pt" style:font-style-asian="normal" style:font-weight-asian="normal" style:font-name-complex="Liberation Sans3" style:font-size-complex="12pt" style:font-style-complex="normal" style:font-weight-complex="normal"/>
    </style:style>
    <style:style style:name="P23" style:family="paragraph" style:parent-style-name="Heading_20_3">
      <style:paragraph-properties fo:margin-top="0.353cm" fo:margin-bottom="0.176cm" style:contextual-spacing="false"/>
      <style:text-properties fo:color="#1a1a1a" loext:opacity="100%" style:font-name="Liberation Sans1" fo:font-size="12pt" fo:font-weight="bold" style:font-name-asian="Liberation Sans" style:font-size-asian="12pt" style:font-weight-asian="bold" style:font-name-complex="Liberation Sans3" style:font-size-complex="12pt" style:font-weight-complex="bold"/>
    </style:style>
    <style:style style:name="P24" style:family="paragraph" style:parent-style-name="Heading_20_2">
      <style:paragraph-properties fo:margin-top="0.423cm" fo:margin-bottom="0.212cm" style:contextual-spacing="false"/>
    </style:style>
    <style:style style:name="P25" style:family="paragraph" style:parent-style-name="Heading_20_3">
      <style:paragraph-properties fo:margin-top="0.353cm" fo:margin-bottom="0.176cm" style:contextual-spacing="false" fo:break-before="page"/>
      <style:text-properties fo:color="#1a1a1a" loext:opacity="100%" style:font-name="Liberation Sans1" fo:font-size="12pt" fo:font-weight="bold" style:font-name-asian="Liberation Sans" style:font-size-asian="12pt" style:font-weight-asian="bold" style:font-name-complex="Liberation Sans3" style:font-size-complex="12pt" style:font-weight-complex="bold"/>
    </style:style>
    <style:style style:name="P26" style:family="paragraph" style:parent-style-name="Heading_20_3">
      <style:paragraph-properties fo:margin-top="0.353cm" fo:margin-bottom="0.176cm" style:contextual-spacing="false"/>
    </style:style>
    <style:style style:name="P27" style:family="paragraph" style:parent-style-name="Standard">
      <style:paragraph-properties fo:margin-top="0cm" fo:margin-bottom="0.212cm" style:contextual-spacing="false" fo:text-align="justify" style:justify-single-word="false" loext:word-spacing-minimum="75%" loext:word-spacing-maximum="133%"/>
    </style:style>
    <style:style style:name="P28" style:family="paragraph" style:parent-style-name="Standard">
      <style:paragraph-properties fo:margin-left="1.27cm" fo:margin-top="0cm" fo:margin-bottom="0.106cm" style:contextual-spacing="false"/>
      <style:text-properties fo:color="#333333" loext:opacity="100%" style:font-name="Liberation Sans2" fo:font-size="10pt" style:font-name-asian="Courier New" style:font-size-asian="10pt" style:font-name-complex="Courier New2" style:font-size-complex="10pt"/>
    </style:style>
    <style:style style:name="P29" style:family="paragraph" style:parent-style-name="Standard">
      <style:paragraph-properties fo:margin-left="1.27cm" fo:margin-top="0cm" fo:margin-bottom="0.106cm" style:contextual-spacing="false"/>
      <style:text-properties fo:color="#333333" loext:opacity="100%" style:font-name="Courier New1" fo:font-size="10pt" style:font-name-asian="Courier New" style:font-size-asian="10pt" style:font-name-complex="Courier New2" style:font-size-complex="10pt"/>
    </style:style>
    <style:style style:name="P30" style:family="paragraph" style:parent-style-name="Standard">
      <style:text-properties officeooo:rsid="001ed845" officeooo:paragraph-rsid="001ed845"/>
    </style:style>
    <style:style style:name="P31" style:family="paragraph" style:parent-style-name="Standard">
      <style:text-properties officeooo:rsid="001d39b4" officeooo:paragraph-rsid="001d39b4"/>
    </style:style>
    <style:style style:name="P32" style:family="paragraph" style:parent-style-name="Standard">
      <style:text-properties officeooo:rsid="001b9b0d" officeooo:paragraph-rsid="001b9b0d"/>
    </style:style>
    <style:style style:name="P33" style:family="paragraph" style:parent-style-name="Standard">
      <style:text-properties fo:font-size="12pt" style:font-size-asian="12pt" style:font-size-complex="12pt"/>
    </style:style>
    <style:style style:name="P34" style:family="paragraph" style:parent-style-name="Standard">
      <style:text-properties fo:font-weight="bold" style:font-weight-asian="bold" style:font-weight-complex="bold"/>
    </style:style>
    <style:style style:name="P35" style:family="paragraph" style:parent-style-name="Heading_20_1">
      <style:paragraph-properties fo:margin-top="0.529cm" fo:margin-bottom="0.282cm" style:contextual-spacing="false"/>
    </style:style>
    <style:style style:name="P36" style:family="paragraph" style:parent-style-name="Heading_20_1">
      <style:text-properties officeooo:paragraph-rsid="00050bb5"/>
    </style:style>
    <style:style style:name="P37" style:family="paragraph" style:parent-style-name="Standard">
      <style:paragraph-properties fo:text-align="justify" style:justify-single-word="false"/>
      <style:text-properties officeooo:rsid="00050bb5" officeooo:paragraph-rsid="00050bb5"/>
    </style:style>
    <style:style style:name="P38" style:family="paragraph" style:parent-style-name="Heading_20_2">
      <style:text-properties fo:color="#000000" loext:opacity="100%" officeooo:rsid="00073f1b" officeooo:paragraph-rsid="00073f1b"/>
    </style:style>
    <style:style style:name="P39" style:family="paragraph" style:parent-style-name="Standard">
      <style:text-properties officeooo:rsid="00123a9b" officeooo:paragraph-rsid="00123a9b"/>
    </style:style>
    <style:style style:name="P40" style:family="paragraph" style:parent-style-name="Standard">
      <style:text-properties fo:font-weight="bold" officeooo:rsid="00073f1b" officeooo:paragraph-rsid="00073f1b" style:font-weight-asian="bold" style:font-weight-complex="bold"/>
    </style:style>
    <style:style style:name="P41" style:family="paragraph" style:parent-style-name="Standard">
      <style:text-properties fo:font-weight="normal" officeooo:rsid="00073f1b" officeooo:paragraph-rsid="00073f1b" style:font-weight-asian="normal" style:font-weight-complex="normal"/>
    </style:style>
    <style:style style:name="P42" style:family="paragraph" style:parent-style-name="Text_20_body">
      <style:paragraph-properties fo:margin-top="0cm" fo:margin-bottom="0cm" style:contextual-spacing="false"/>
      <style:text-properties fo:font-weight="normal" officeooo:rsid="00073f1b" officeooo:paragraph-rsid="00073f1b" style:font-weight-asian="normal" style:font-weight-complex="normal"/>
    </style:style>
    <style:style style:name="P43" style:family="paragraph" style:parent-style-name="Text_20_body">
      <style:paragraph-properties fo:margin-top="0cm" fo:margin-bottom="0cm" style:contextual-spacing="false"/>
      <style:text-properties officeooo:rsid="00073f1b"/>
    </style:style>
    <style:style style:name="P44" style:family="paragraph" style:parent-style-name="Text_20_body" style:list-style-name="L1">
      <style:paragraph-properties fo:margin-top="0cm" fo:margin-bottom="0cm" style:contextual-spacing="false"/>
      <style:text-properties officeooo:rsid="00073f1b"/>
    </style:style>
    <style:style style:name="P45" style:family="paragraph" style:parent-style-name="Standard">
      <style:text-properties fo:font-weight="normal" officeooo:rsid="00123a9b" officeooo:paragraph-rsid="00123a9b" style:font-weight-asian="normal" style:font-weight-complex="normal"/>
    </style:style>
    <style:style style:name="P46" style:family="paragraph" style:parent-style-name="Standard">
      <style:text-properties fo:font-weight="bold" officeooo:rsid="00123a9b" officeooo:paragraph-rsid="00123a9b" style:font-weight-asian="bold" style:font-weight-complex="bold"/>
    </style:style>
    <style:style style:name="P47" style:family="paragraph" style:parent-style-name="Standard">
      <style:paragraph-properties fo:margin-top="0cm" fo:margin-bottom="0.212cm" style:contextual-spacing="false" fo:text-align="justify" style:justify-single-word="false" loext:word-spacing-minimum="75%" loext:word-spacing-maximum="133%"/>
      <style:text-properties style:font-name="Liberation Sans1" fo:font-size="12pt" fo:font-style="normal" fo:font-weight="normal" officeooo:paragraph-rsid="000d1d1b" style:font-name-asian="Liberation Sans" style:font-size-asian="12pt" style:font-style-asian="normal" style:font-weight-asian="normal" style:font-name-complex="Liberation Sans3" style:font-size-complex="12pt" style:font-style-complex="normal" style:font-weight-complex="normal"/>
    </style:style>
    <style:style style:name="P48" style:family="paragraph" style:parent-style-name="Standard">
      <style:paragraph-properties fo:margin-top="0cm" fo:margin-bottom="0.212cm" style:contextual-spacing="false" fo:text-align="justify" style:justify-single-word="false"/>
      <style:text-properties style:font-name="Liberation Sans1" fo:font-size="12pt" fo:font-style="normal" fo:font-weight="normal" officeooo:rsid="000f7085" officeooo:paragraph-rsid="000f7085" style:font-name-asian="Liberation Sans" style:font-size-asian="12pt" style:font-style-asian="normal" style:font-weight-asian="normal" style:font-name-complex="Liberation Sans3" style:font-size-complex="12pt" style:font-style-complex="normal" style:font-weight-complex="normal"/>
    </style:style>
    <style:style style:name="P49" style:family="paragraph" style:parent-style-name="List_20_Paragraph">
      <style:paragraph-properties fo:margin-top="0cm" fo:margin-bottom="0.141cm" style:contextual-spacing="false"/>
      <style:text-properties style:font-name="Liberation Sans1" fo:font-size="12pt" style:font-name-asian="Liberation Sans" style:font-size-asian="12pt" style:font-name-complex="Liberation Sans3" style:font-size-complex="12pt"/>
    </style:style>
    <style:style style:name="P50" style:family="paragraph" style:parent-style-name="List_20_Paragraph">
      <style:paragraph-properties fo:margin-top="0cm" fo:margin-bottom="0.141cm" style:contextual-spacing="false"/>
      <style:text-properties style:font-name="Liberation Sans1" fo:font-size="12pt" officeooo:rsid="000f7085" officeooo:paragraph-rsid="000f7085" style:font-name-asian="Liberation Sans" style:font-size-asian="12pt" style:font-name-complex="Liberation Sans3" style:font-size-complex="12pt"/>
    </style:style>
    <style:style style:name="P51" style:family="paragraph" style:parent-style-name="Standard" style:list-style-name="WWNum2">
      <style:paragraph-properties fo:margin-top="0cm" fo:margin-bottom="0.212cm" style:contextual-spacing="false" fo:text-align="justify" style:justify-single-word="false" loext:word-spacing-minimum="75%" loext:word-spacing-maximum="133%"/>
      <style:text-properties style:font-name="Liberation Sans1" fo:font-size="12pt" fo:font-style="normal" fo:font-weight="normal" officeooo:paragraph-rsid="0009931e" style:font-name-asian="Liberation Sans" style:font-size-asian="12pt" style:font-style-asian="normal" style:font-weight-asian="normal" style:font-name-complex="Liberation Sans3" style:font-size-complex="12pt" style:font-style-complex="normal" style:font-weight-complex="normal"/>
    </style:style>
    <style:style style:name="P52" style:family="paragraph" style:parent-style-name="List_20_Paragraph" style:list-style-name="WWNum2">
      <style:paragraph-properties fo:margin-top="0cm" fo:margin-bottom="0.141cm" style:contextual-spacing="false"/>
      <style:text-properties style:font-name="Liberation Sans1" fo:font-size="12pt" officeooo:paragraph-rsid="0009931e" style:font-name-asian="Liberation Sans" style:font-size-asian="12pt" style:font-name-complex="Liberation Sans3" style:font-size-complex="12pt"/>
    </style:style>
    <style:style style:name="P53" style:family="paragraph" style:parent-style-name="Standard" style:list-style-name="WWNum2">
      <style:text-properties officeooo:paragraph-rsid="0009931e"/>
    </style:style>
    <style:style style:name="P54" style:family="paragraph" style:parent-style-name="Standard">
      <style:text-properties officeooo:paragraph-rsid="0009931e"/>
    </style:style>
    <style:style style:name="P55" style:family="paragraph" style:parent-style-name="List_20_Paragraph" style:list-style-name="WWNum2">
      <style:paragraph-properties fo:margin-top="0cm" fo:margin-bottom="0.141cm" style:contextual-spacing="false"/>
      <style:text-properties style:font-name="Liberation Sans1" fo:font-size="12pt" officeooo:paragraph-rsid="000bc917" style:font-name-asian="Liberation Sans" style:font-size-asian="12pt" style:font-name-complex="Liberation Sans3" style:font-size-complex="12pt"/>
    </style:style>
    <style:style style:name="P56" style:family="paragraph" style:parent-style-name="Text_20_body">
      <style:paragraph-properties fo:margin-top="0cm" fo:margin-bottom="0.212cm" style:contextual-spacing="false" fo:text-align="justify" style:justify-single-word="false" loext:word-spacing-minimum="75%" loext:word-spacing-maximum="133%"/>
      <style:text-properties style:font-name="Liberation Sans1" fo:font-size="12pt" fo:font-style="normal" fo:font-weight="normal" style:font-name-asian="Liberation Sans" style:font-size-asian="12pt" style:font-style-asian="normal" style:font-weight-asian="normal" style:font-name-complex="Liberation Sans3" style:font-size-complex="12pt" style:font-style-complex="normal" style:font-weight-complex="normal"/>
    </style:style>
    <style:style style:name="P57" style:family="paragraph" style:parent-style-name="Text_20_body">
      <style:paragraph-properties fo:margin-top="0cm" fo:margin-bottom="0.212cm" style:contextual-spacing="false" fo:text-align="justify" style:justify-single-word="false" loext:word-spacing-minimum="75%" loext:word-spacing-maximum="133%"/>
    </style:style>
    <style:style style:name="P58" style:family="paragraph" style:parent-style-name="Standard">
      <style:paragraph-properties fo:margin-top="0cm" fo:margin-bottom="0.212cm" style:contextual-spacing="false" fo:text-align="justify" style:justify-single-word="false" loext:word-spacing-minimum="75%" loext:word-spacing-maximum="133%"/>
      <style:text-properties officeooo:paragraph-rsid="00044fee"/>
    </style:style>
    <style:style style:name="P59" style:family="paragraph" style:parent-style-name="Heading_20_1">
      <style:text-properties fo:color="#000000" loext:opacity="100%" officeooo:rsid="00044fee" officeooo:paragraph-rsid="00044fee"/>
    </style:style>
    <style:style style:name="P60" style:family="paragraph" style:parent-style-name="Title">
      <style:paragraph-properties fo:text-align="center" style:justify-single-word="false" fo:break-before="page"/>
      <style:text-properties officeooo:rsid="0009931e" officeooo:paragraph-rsid="0009931e"/>
    </style:style>
    <style:style style:name="P61" style:family="paragraph" style:parent-style-name="Standard">
      <style:text-properties officeooo:rsid="0009931e" officeooo:paragraph-rsid="0009931e"/>
    </style:style>
    <style:style style:name="P62" style:family="paragraph" style:parent-style-name="Standard">
      <style:text-properties fo:font-weight="bold" officeooo:rsid="0009931e" officeooo:paragraph-rsid="0009931e" style:font-weight-asian="bold" style:font-weight-complex="bold"/>
    </style:style>
    <style:style style:name="P63" style:family="paragraph" style:parent-style-name="Standard">
      <style:text-properties fo:font-weight="normal" officeooo:rsid="0009931e" officeooo:paragraph-rsid="0009931e" style:font-weight-asian="normal" style:font-weight-complex="normal"/>
    </style:style>
    <style:style style:name="P64" style:family="paragraph" style:parent-style-name="Standard">
      <style:paragraph-properties fo:text-align="center" style:justify-single-word="false"/>
      <style:text-properties fo:font-weight="bold" officeooo:rsid="0009931e" officeooo:paragraph-rsid="0009931e" style:font-weight-asian="bold" style:font-weight-complex="bold"/>
    </style:style>
    <style:style style:name="P65" style:family="paragraph" style:parent-style-name="Standard">
      <style:paragraph-properties fo:margin-top="0cm" fo:margin-bottom="0.212cm" style:contextual-spacing="false" fo:text-align="justify" style:justify-single-word="false" loext:word-spacing-minimum="75%" loext:word-spacing-maximum="133%"/>
      <style:text-properties style:font-name="Liberation Sans1" fo:font-size="12pt" fo:font-style="normal" fo:font-weight="normal" officeooo:rsid="0009e2f5" officeooo:paragraph-rsid="0009e2f5" style:font-name-asian="Liberation Sans" style:font-size-asian="12pt" style:font-style-asian="normal" style:font-weight-asian="normal" style:font-name-complex="Liberation Sans3" style:font-size-complex="12pt" style:font-style-complex="normal" style:font-weight-complex="normal"/>
    </style:style>
    <style:style style:name="P66" style:family="paragraph" style:parent-style-name="Standard">
      <style:paragraph-properties fo:margin-top="0cm" fo:margin-bottom="0.212cm" style:contextual-spacing="false" fo:text-align="justify" style:justify-single-word="false" loext:word-spacing-minimum="75%" loext:word-spacing-maximum="133%"/>
      <style:text-properties officeooo:paragraph-rsid="0009931e"/>
    </style:style>
    <style:style style:name="P67" style:family="paragraph" style:parent-style-name="Standard">
      <style:paragraph-properties fo:margin-top="0cm" fo:margin-bottom="0.212cm" style:contextual-spacing="false" fo:text-align="justify" style:justify-single-word="false" loext:word-spacing-minimum="75%" loext:word-spacing-maximum="133%"/>
      <style:text-properties style:font-name="Liberation Sans1" fo:font-size="12pt" fo:font-style="normal" fo:font-weight="normal" officeooo:rsid="0009931e" officeooo:paragraph-rsid="0009931e" style:font-name-asian="Liberation Sans" style:font-size-asian="12pt" style:font-style-asian="normal" style:font-weight-asian="normal" style:font-name-complex="Liberation Sans3" style:font-size-complex="12pt" style:font-style-complex="normal" style:font-weight-complex="normal"/>
    </style:style>
    <style:style style:name="P68" style:family="paragraph" style:parent-style-name="Standard">
      <style:paragraph-properties fo:margin-top="0cm" fo:margin-bottom="0.212cm" style:contextual-spacing="false" fo:text-align="justify" style:justify-single-word="false" loext:word-spacing-minimum="75%" loext:word-spacing-maximum="133%"/>
      <style:text-properties style:font-name="Liberation Sans1" fo:font-size="12pt" fo:font-style="normal" fo:font-weight="normal" officeooo:paragraph-rsid="0009931e" style:font-name-asian="Liberation Sans" style:font-size-asian="12pt" style:font-style-asian="normal" style:font-weight-asian="normal" style:font-name-complex="Liberation Sans3" style:font-size-complex="12pt" style:font-style-complex="normal" style:font-weight-complex="normal"/>
    </style:style>
    <style:style style:name="P69" style:family="paragraph" style:parent-style-name="Standard">
      <style:text-properties officeooo:paragraph-rsid="00195ead"/>
    </style:style>
    <style:style style:name="T1" style:family="text">
      <style:text-properties style:font-name="Liberation Sans1" fo:font-size="12pt" style:font-name-asian="Liberation Sans" style:font-size-asian="12pt" style:font-name-complex="Liberation Sans3" style:font-size-complex="12pt"/>
    </style:style>
    <style:style style:name="T2" style:family="text">
      <style:text-properties style:font-name="Liberation Sans1" fo:font-size="12pt" officeooo:rsid="00044fee" style:font-name-asian="Liberation Sans" style:font-size-asian="12pt" style:font-name-complex="Liberation Sans3" style:font-size-complex="12pt"/>
    </style:style>
    <style:style style:name="T3" style:family="text">
      <style:text-properties officeooo:rsid="000a2ab7"/>
    </style:style>
    <style:style style:name="T4" style:family="text">
      <style:text-properties officeooo:rsid="00161f0a"/>
    </style:style>
    <style:style style:name="T5" style:family="text">
      <style:text-properties fo:color="#1a1a1a" loext:opacity="100%" style:font-name="Liberation Sans1" fo:font-size="13pt" fo:font-weight="bold" style:font-name-asian="Liberation Sans" style:font-size-asian="13pt" style:font-weight-asian="bold" style:font-name-complex="Liberation Sans3" style:font-size-complex="13pt" style:font-weight-complex="bold"/>
    </style:style>
    <style:style style:name="T6" style:family="text">
      <style:text-properties officeooo:rsid="0017752a"/>
    </style:style>
    <style:style style:name="T7" style:family="text">
      <style:text-properties fo:color="#1a1a1a" loext:opacity="100%" style:font-name="Liberation Sans1" fo:font-size="12pt" fo:font-weight="bold" style:font-name-asian="Liberation Sans" style:font-size-asian="12pt" style:font-weight-asian="bold" style:font-name-complex="Liberation Sans3" style:font-size-complex="12pt" style:font-weight-complex="bold"/>
    </style:style>
    <style:style style:name="T8" style:family="text">
      <style:text-properties officeooo:rsid="000f7085"/>
    </style:style>
    <style:style style:name="T9" style:family="text">
      <style:text-properties style:font-name="Liberation Sans1" fo:font-size="12pt" fo:font-style="normal" fo:font-weight="normal" style:font-name-asian="Liberation Sans" style:font-size-asian="12pt" style:font-style-asian="normal" style:font-weight-asian="normal" style:font-name-complex="Liberation Sans3" style:font-size-complex="12pt" style:font-style-complex="normal" style:font-weight-complex="normal"/>
    </style:style>
    <style:style style:name="T10" style:family="text">
      <style:text-properties style:font-name="Liberation Sans1" fo:font-size="12pt" fo:font-style="normal" fo:font-weight="normal" officeooo:rsid="00161f0a" style:font-name-asian="Liberation Sans" style:font-size-asian="12pt" style:font-style-asian="normal" style:font-weight-asian="normal" style:font-name-complex="Liberation Sans3" style:font-size-complex="12pt" style:font-style-complex="normal" style:font-weight-complex="normal"/>
    </style:style>
    <style:style style:name="T11" style:family="text">
      <style:text-properties style:font-name="Liberation Sans1" fo:font-size="12pt" fo:font-style="normal" fo:font-weight="normal" officeooo:rsid="0017752a" style:font-name-asian="Liberation Sans" style:font-size-asian="12pt" style:font-style-asian="normal" style:font-weight-asian="normal" style:font-name-complex="Liberation Sans3" style:font-size-complex="12pt" style:font-style-complex="normal" style:font-weight-complex="normal"/>
    </style:style>
    <style:style style:name="T12" style:family="text">
      <style:text-properties officeooo:rsid="0015f4d0"/>
    </style:style>
    <style:style style:name="T13" style:family="text">
      <style:text-properties officeooo:rsid="001d39b4"/>
    </style:style>
    <style:style style:name="T14" style:family="text">
      <style:text-properties officeooo:rsid="001b9b0d"/>
    </style:style>
    <style:style style:name="T15" style:family="text">
      <style:text-properties officeooo:rsid="002374b2"/>
    </style:style>
    <style:style style:name="T16" style:family="text">
      <style:text-properties fo:color="#1a1a1a" loext:opacity="100%" style:font-name="Liberation Sans1" fo:font-size="14pt" fo:font-weight="bold" style:font-name-asian="Liberation Sans" style:font-size-asian="14pt" style:font-weight-asian="bold" style:font-name-complex="Liberation Sans3" style:font-size-complex="14pt" style:font-weight-complex="bold"/>
    </style:style>
    <style:style style:name="T17" style:family="text">
      <style:text-properties fo:color="#000000" loext:opacity="100%" officeooo:rsid="00050bb5"/>
    </style:style>
    <style:style style:name="T18" style:family="text">
      <style:text-properties fo:color="#000000" loext:opacity="100%" officeooo:rsid="000dd5f3"/>
    </style:style>
    <style:style style:name="T19" style:family="text">
      <style:text-properties officeooo:rsid="00070410"/>
    </style:style>
    <style:style style:name="T20" style:family="text">
      <style:text-properties officeooo:rsid="0017864e"/>
    </style:style>
    <style:style style:name="T21" style:family="text">
      <style:text-properties officeooo:rsid="00073f1b"/>
    </style:style>
    <style:style style:name="T22" style:family="text">
      <style:text-properties style:font-name="Liberation Sans2"/>
    </style:style>
    <style:style style:name="T23" style:family="text">
      <style:text-properties officeooo:rsid="0007cff8"/>
    </style:style>
    <style:style style:name="T24" style:family="text">
      <style:text-properties officeooo:rsid="00195ead"/>
    </style:style>
    <style:style style:name="T25" style:family="text">
      <style:text-properties fo:color="#1a1a1a" loext:opacity="100%" style:font-name="Liberation Sans1" fo:font-size="14pt" fo:font-weight="bold" officeooo:rsid="0007cff8" style:font-name-asian="Liberation Sans" style:font-size-asian="14pt" style:font-weight-asian="bold" style:font-name-complex="Liberation Sans3" style:font-size-complex="14pt" style:font-weight-complex="bold"/>
    </style:style>
    <style:style style:name="T26" style:family="text">
      <style:text-properties style:font-name="Liberation Sans1" fo:font-size="12pt" fo:font-style="normal" fo:font-weight="normal" officeooo:rsid="00050bb5" style:font-name-asian="Liberation Sans" style:font-size-asian="12pt" style:font-style-asian="normal" style:font-weight-asian="normal" style:font-name-complex="Liberation Sans3" style:font-size-complex="12pt" style:font-style-complex="normal" style:font-weight-complex="normal"/>
    </style:style>
    <style:style style:name="T27" style:family="text">
      <style:text-properties style:font-name="Liberation Sans1" fo:font-size="12pt" fo:font-style="normal" fo:font-weight="normal" officeooo:rsid="0007cff8" style:font-name-asian="Liberation Sans" style:font-size-asian="12pt" style:font-style-asian="normal" style:font-weight-asian="normal" style:font-name-complex="Liberation Sans3" style:font-size-complex="12pt" style:font-style-complex="normal" style:font-weight-complex="normal"/>
    </style:style>
    <style:style style:name="T28" style:family="text">
      <style:text-properties fo:color="#1a1a1a" loext:opacity="100%" style:font-name="Liberation Sans1" fo:font-size="14pt" fo:font-weight="bold" officeooo:rsid="00044fee" style:font-name-asian="Liberation Sans" style:font-size-asian="14pt" style:font-weight-asian="bold" style:font-name-complex="Liberation Sans3" style:font-size-complex="14pt" style:font-weight-complex="bold"/>
    </style:style>
    <style:style style:name="T29" style:family="text">
      <style:text-properties style:font-name="Liberation Sans1" fo:font-size="12pt" fo:font-style="normal" fo:font-weight="normal" officeooo:rsid="00044fee" style:font-name-asian="Liberation Sans" style:font-size-asian="12pt" style:font-style-asian="normal" style:font-weight-asian="normal" style:font-name-complex="Liberation Sans3" style:font-size-complex="12pt" style:font-style-complex="normal" style:font-weight-complex="normal"/>
    </style:style>
    <style:style style:name="T30" style:family="text">
      <style:text-properties style:font-name="Liberation Sans1" fo:font-size="12pt" fo:font-style="normal" fo:font-weight="normal" officeooo:rsid="00195ead" style:font-name-asian="Liberation Sans" style:font-size-asian="12pt" style:font-style-asian="normal" style:font-weight-asian="normal" style:font-name-complex="Liberation Sans3" style:font-size-complex="12pt" style:font-style-complex="normal" style:font-weight-complex="normal"/>
    </style:style>
    <style:style style:name="T31" style:family="text">
      <style:text-properties fo:color="#333333" loext:opacity="100%" style:font-name="Courier New1" fo:font-size="10pt" style:font-name-asian="Courier New" style:font-size-asian="10pt" style:font-name-complex="Courier New2" style:font-size-complex="10pt"/>
    </style:style>
    <style:style style:name="T32" style:family="text">
      <style:text-properties fo:font-weight="normal" style:font-weight-asian="normal" style:font-weight-complex="normal"/>
    </style:style>
    <style:style style:name="T33" style:family="text">
      <style:text-properties style:font-name="Liberation Sans1" fo:font-size="12pt" fo:font-style="normal" fo:font-weight="normal" officeooo:rsid="0009931e" style:font-name-asian="Liberation Sans" style:font-size-asian="12pt" style:font-style-asian="normal" style:font-weight-asian="normal" style:font-name-complex="Liberation Sans3" style:font-size-complex="12pt" style:font-style-complex="normal" style:font-weight-complex="normal"/>
    </style:style>
    <style:style style:name="T34" style:family="text">
      <style:text-properties officeooo:rsid="00108c49"/>
    </style:style>
    <style:style style:name="T35" style:family="text">
      <style:text-properties style:font-name="Liberation Sans1" fo:font-size="12pt" fo:font-style="normal" style:text-underline-style="none" fo:font-weight="normal" officeooo:rsid="0009931e" style:font-name-asian="Liberation Sans" style:font-size-asian="12pt" style:font-style-asian="normal" style:font-weight-asian="normal" style:font-name-complex="Liberation Sans3" style:font-size-complex="12pt" style:font-style-complex="normal" style:font-weight-complex="normal"/>
    </style:style>
    <style:style style:name="T36" style:family="text">
      <style:text-properties style:font-name="Liberation Sans1" fo:font-size="12pt" fo:font-style="normal" style:text-underline-style="none" fo:font-weight="normal" style:font-name-asian="Liberation Sans" style:font-size-asian="12pt" style:font-style-asian="normal" style:font-weight-asian="normal" style:font-name-complex="Liberation Sans3" style:font-size-complex="12pt" style:font-style-complex="normal" style:font-weight-complex="normal"/>
    </style:style>
    <style:style style:name="T37" style:family="text">
      <style:text-properties officeooo:rsid="0009931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VisionBot</text:p>
      <text:p text:style-name="P2">Webgesteuertes Fahrzeug mit Kameraübertragung</text:p>
      <text:p text:style-name="Standard"/>
      <text:p text:style-name="P3">Projektdokumentation – Informationstechnik</text:p>
      <text:p text:style-name="Standard"/>
      <text:p text:style-name="Standard"/>
      <text:p text:style-name="P4">Team:</text:p>
      <text:p text:style-name="P5">Kevin Seeling &amp; Eren Baser</text:p>
      <text:p text:style-name="P6"><text:span text:style-name="T1">Stand: </text:span><text:span text:style-name="T2">26</text:span><text:span text:style-name="T1">.04.2026</text:span></text:p>
      <text:p text:style-name="P7"/>
      <text:p text:style-name="P8"><draw:frame draw:style-name="fr1" draw:name="Rahmen1" text:anchor-type="char" svg:x="2.963cm" svg:y="0.145cm" svg:width="12.231cm" draw:z-index="0"><draw:text-box fo:min-height="10.343cm"><text:p text:style-name="Figure"><draw:frame draw:style-name="fr2" draw:name="Bild1" text:anchor-type="paragraph" svg:width="12.231cm" style:rel-width="100%" svg:height="10.343cm" style:rel-height="scale" draw:z-index="1"><draw:image xlink:href="Pictures/1000000000000247000001EDF4CF7BDA.png" xlink:type="simple" xlink:show="embed" xlink:actuate="onLoad" draw:mime-type="image/png"/></draw:frame>Schaubild <text:sequence text:ref-name="refFigure0" text:name="Figure" text:formula="ooow:Figure+1" style:num-format="1">1</text:sequence>: Bild des Esp32-Cam Rc-Cars (Im Angebot <text:span text:style-name="T3">auf</text:span> AliExpress <text:span text:style-name="T3">abgebildet</text:span>)</text:p></draw:text-box></draw:frame></text:p>
      <text:h text:style-name="P9" text:outline-level="1"><text:bookmark-start text:name="__RefHeading___Toc5641_2530169349"/>1. Inhaltsverzeichnis<text:bookmark-end text:name="__RefHeading___Toc5641_2530169349"/></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0"><text:a xlink:type="simple" xlink:href="#__RefHeading___Toc5641_2530169349" office:name="1. Inhaltsverzeichnis" text:style-name="Index_20_Link" text:visited-style-name="Index_20_Link">1. Inhaltsverzeichnis<text:tab/>2</text:a></text:p>
          <text:p text:style-name="P10"><text:a xlink:type="simple" xlink:href="#__RefHeading___Toc5643_2530169349" office:name="2. Zusammenfassung" text:style-name="Index_20_Link" text:visited-style-name="Index_20_Link">2. Zusammenfassung<text:tab/>4</text:a></text:p>
          <text:p text:style-name="P10"><text:a xlink:type="simple" xlink:href="#__RefHeading___Toc5645_2530169349" office:name="3. Einleitung" text:style-name="Index_20_Link" text:visited-style-name="Index_20_Link">3. Einleitung<text:tab/>4</text:a></text:p>
          <text:p text:style-name="P11"><text:a xlink:type="simple" xlink:href="#__RefHeading___Toc5647_2530169349" office:name="3.1 Hintergrund und Motivation" text:style-name="Index_20_Link" text:visited-style-name="Index_20_Link">3.1 Hintergrund und Motivation<text:tab/>4</text:a></text:p>
          <text:p text:style-name="P11"><text:a xlink:type="simple" xlink:href="#__RefHeading___Toc5649_2530169349" office:name="3.2 Projektziel" text:style-name="Index_20_Link" text:visited-style-name="Index_20_Link">3.2 Projektziel<text:tab/>5</text:a></text:p>
          <text:p text:style-name="P11"><text:a xlink:type="simple" xlink:href="#__RefHeading___Toc5651_2530169349" office:name="3.3 Aufteilung der Aufgaben" text:style-name="Index_20_Link" text:visited-style-name="Index_20_Link">3.3 Aufteilung der Aufgaben<text:tab/>5</text:a></text:p>
          <text:p text:style-name="P11"><text:a xlink:type="simple" xlink:href="#__RefHeading___Toc5653_2530169349" office:name="3.4 Projektzeitplan (Gantt-Diagramm)" text:style-name="Index_20_Link" text:visited-style-name="Index_20_Link">3.4 Projektzeitplan (Gantt-Diagramm)<text:tab/>6</text:a></text:p>
          <text:p text:style-name="P10"><text:a xlink:type="simple" xlink:href="#__RefHeading___Toc5655_2530169349" office:name="4. Projektstruktur" text:style-name="Index_20_Link" text:visited-style-name="Index_20_Link">4. Projektstruktur<text:tab/>8</text:a></text:p>
          <text:p text:style-name="P11"><text:a xlink:type="simple" xlink:href="#__RefHeading___Toc5657_2530169349" office:name="4.1 Aufgabenstellung" text:style-name="Index_20_Link" text:visited-style-name="Index_20_Link">4.1 Aufgabenstellung<text:tab/>8</text:a></text:p>
          <text:p text:style-name="P11"><text:a xlink:type="simple" xlink:href="#__RefHeading___Toc5659_2530169349" office:name="4.2 Blockschaltbild – Zusammenwirken der Komponenten" text:style-name="Index_20_Link" text:visited-style-name="Index_20_Link">4.2 Blockschaltbild – Zusammenwirken der Komponenten<text:tab/>8</text:a></text:p>
          <text:p text:style-name="P11"><text:a xlink:type="simple" xlink:href="#__RefHeading___Toc5661_2530169349" office:name="4.3 Erkannte Teilprobleme" text:style-name="Index_20_Link" text:visited-style-name="Index_20_Link">4.3 Erkannte Teilprobleme<text:tab/>9</text:a></text:p>
          <text:p text:style-name="P10"><text:a xlink:type="simple" xlink:href="#__RefHeading___Toc5663_2530169349" office:name="5. Hardware" text:style-name="Index_20_Link" text:visited-style-name="Index_20_Link">5. Hardware<text:tab/>9</text:a></text:p>
          <text:p text:style-name="P11"><text:a xlink:type="simple" xlink:href="#__RefHeading___Toc5665_2530169349" office:name="5.1 Komponenten-Liste" text:style-name="Index_20_Link" text:visited-style-name="Index_20_Link">5.1 Komponenten-Liste<text:tab/>9</text:a></text:p>
          <text:p text:style-name="P11"><text:a xlink:type="simple" xlink:href="#__RefHeading___Toc5667_2530169349" office:name="5.2 Das 4WD-Chassis (ZYC0024)" text:style-name="Index_20_Link" text:visited-style-name="Index_20_Link">5.2 Das 4WD-Chassis (ZYC0024)<text:tab/>10</text:a></text:p>
          <text:p text:style-name="P12"><text:a xlink:type="simple" xlink:href="#__RefHeading___Toc5669_2530169349" office:name="5.2.1 Aufbau und Montage des Chassis" text:style-name="Index_20_Link" text:visited-style-name="Index_20_Link">5.2.1 Aufbau und Montage des Chassis<text:tab/>10</text:a></text:p>
          <text:p text:style-name="P11"><text:a xlink:type="simple" xlink:href="#__RefHeading___Toc5671_2530169349" office:name="5.3 Die TT DC-Getriebemotoren" text:style-name="Index_20_Link" text:visited-style-name="Index_20_Link">5.3 Die TT DC-Getriebemotoren<text:tab/>11</text:a></text:p>
          <text:p text:style-name="P12"><text:a xlink:type="simple" xlink:href="#__RefHeading___Toc5673_2530169349" office:name="5.3.1 Technisches Prinzip des DC-Motors" text:style-name="Index_20_Link" text:visited-style-name="Index_20_Link">5.3.1 Technisches Prinzip des DC-Motors<text:tab/>11</text:a></text:p>
          <text:p text:style-name="P12"><text:a xlink:type="simple" xlink:href="#__RefHeading___Toc5675_2530169349" office:name="5.3.2 Motoranordnung im 4WD-System" text:style-name="Index_20_Link" text:visited-style-name="Index_20_Link">5.3.2 Motoranordnung im 4WD-System<text:tab/>11</text:a></text:p>
          <text:p text:style-name="P12"><text:a xlink:type="simple" xlink:href="#__RefHeading___Toc5677_2530169349" office:name="5.3.3 Fahrtrichtungen im Detail" text:style-name="Index_20_Link" text:visited-style-name="Index_20_Link">5.3.3 Fahrtrichtungen im Detail<text:tab/>12</text:a></text:p>
          <text:p text:style-name="P11"><text:a xlink:type="simple" xlink:href="#__RefHeading___Toc5679_2530169349" office:name="5.4 Der L298N H-Bridge Motortreiber" text:style-name="Index_20_Link" text:visited-style-name="Index_20_Link">5.4 Der L298N H-Bridge Motortreiber<text:tab/>12</text:a></text:p>
          <text:p text:style-name="P12"><text:a xlink:type="simple" xlink:href="#__RefHeading___Toc5681_2530169349" office:name="5.4.1 Warum ein Motortreiber notwendig ist" text:style-name="Index_20_Link" text:visited-style-name="Index_20_Link">5.4.1 Warum ein Motortreiber notwendig ist<text:tab/>13</text:a></text:p>
          <text:p text:style-name="P12"><text:a xlink:type="simple" xlink:href="#__RefHeading___Toc5683_2530169349" office:name="5.4.2 Das H-Bridge-Prinzip" text:style-name="Index_20_Link" text:visited-style-name="Index_20_Link">5.4.2 Das H-Bridge-Prinzip<text:tab/>13</text:a></text:p>
          <text:p text:style-name="P12"><text:a xlink:type="simple" xlink:href="#__RefHeading___Toc5685_2530169349" office:name="5.4.3 Pinbelegung und Funktion des L298N-Moduls" text:style-name="Index_20_Link" text:visited-style-name="Index_20_Link">5.4.3 Pinbelegung und Funktion des L298N-Moduls<text:tab/>14</text:a></text:p>
          <text:p text:style-name="P12"><text:a xlink:type="simple" xlink:href="#__RefHeading___Toc5687_2530169349" office:name="5.4.4 Steuerlogik: HIGH/LOW an IN1-IN4" text:style-name="Index_20_Link" text:visited-style-name="Index_20_Link">5.4.4 Steuerlogik: HIGH/LOW an IN1-IN4<text:tab/>14</text:a></text:p>
          <text:p text:style-name="P11"><text:a xlink:type="simple" xlink:href="#__RefHeading___Toc5689_2530169349" office:name="5.5 ESP32-CAM (AI-Thinker) als Hauptcontroller" text:style-name="Index_20_Link" text:visited-style-name="Index_20_Link">5.5 ESP32-CAM (AI-Thinker) als Hauptcontroller<text:tab/>15</text:a></text:p>
          <text:p text:style-name="P12"><text:a xlink:type="simple" xlink:href="#__RefHeading___Toc5691_2530169349" office:name="5.5.1 Einschränkungen der GPIO-Pins" text:style-name="Index_20_Link" text:visited-style-name="Index_20_Link">5.5.1 Einschränkungen der GPIO-Pins<text:tab/>15</text:a></text:p>
          <text:p text:style-name="P12"><text:a xlink:type="simple" xlink:href="#__RefHeading___Toc5693_2530169349" office:name="5.5.2 Die OV2640-Kamera" text:style-name="Index_20_Link" text:visited-style-name="Index_20_Link">5.5.2 Die OV2640-Kamera<text:tab/>16</text:a></text:p>
          <text:p text:style-name="P11"><text:a xlink:type="simple" xlink:href="#__RefHeading___Toc5695_2530169349" office:name="5.6 Stromversorgung: 18650-Lithium-Akkus" text:style-name="Index_20_Link" text:visited-style-name="Index_20_Link">5.6 Stromversorgung: 18650-Lithium-Akkus<text:tab/>16</text:a></text:p>
          <text:p text:style-name="P11"><text:a xlink:type="simple" xlink:href="#__RefHeading___Toc5697_2530169349" office:name="5.7 Die externe WLAN-Antenne" text:style-name="Index_20_Link" text:visited-style-name="Index_20_Link">5.7 Die externe WLAN-Antenne<text:tab/>16</text:a></text:p>
          <text:p text:style-name="P11"><text:a xlink:type="simple" xlink:href="#__RefHeading___Toc5699_2530169349" office:name="5.8 Pin-Belegung (Gesamtübersicht)" text:style-name="Index_20_Link" text:visited-style-name="Index_20_Link">5.8 Pin-Belegung (Gesamtübersicht)<text:tab/>17</text:a></text:p>
          <text:p text:style-name="P11"><text:a xlink:type="simple" xlink:href="#__RefHeading___Toc5701_2530169349" office:name="5.9 Schaltplan" text:style-name="Index_20_Link" text:visited-style-name="Index_20_Link">5.9 Schaltplan<text:tab/>17</text:a></text:p>
          <text:p text:style-name="P11"><text:a xlink:type="simple" xlink:href="#__RefHeading___Toc6498_2530169349" text:style-name="Index_20_Link" text:visited-style-name="Index_20_Link"><text:tab/>18</text:a></text:p>
          <text:p text:style-name="P11"><text:a xlink:type="simple" xlink:href="#__RefHeading___Toc5703_2530169349" office:name="5.10 Montage-Schritte" text:style-name="Index_20_Link" text:visited-style-name="Index_20_Link">5.10 Montage-Schritte<text:tab/>18</text:a></text:p>
          <text:p text:style-name="P11"><text:a xlink:type="simple" xlink:href="#__RefHeading___Toc5705_2530169349" office:name="5.11 Hardware-Probleme und deren Lösungen" text:style-name="Index_20_Link" text:visited-style-name="Index_20_Link">5.11 Hardware-Probleme und deren Lösungen<text:tab/>19</text:a></text:p>
          <text:p text:style-name="P12"><text:a xlink:type="simple" xlink:href="#__RefHeading___Toc5707_2530169349" office:name="5.11.1 Problem: Wackelige Motoren" text:style-name="Index_20_Link" text:visited-style-name="Index_20_Link">5.11.1 Problem: Wackelige Motoren<text:tab/>19</text:a></text:p>
          <text:p text:style-name="P12"><text:a xlink:type="simple" xlink:href="#__RefHeading___Toc5709_2530169349" office:name="5.11.2 Problem: Herausfallende Motorkabel" text:style-name="Index_20_Link" text:visited-style-name="Index_20_Link">5.11.2 Problem: Herausfallende Motorkabel<text:tab/>19</text:a></text:p>
          <text:p text:style-name="P12"><text:a xlink:type="simple" xlink:href="#__RefHeading___Toc5711_2530169349" office:name="5.11.3 Problem: Nicht befestigte Kamera" text:style-name="Index_20_Link" text:visited-style-name="Index_20_Link">5.11.3 Problem: Nicht befestigte Kamera<text:tab/>20</text:a></text:p>
          <text:p text:style-name="P11"><text:a xlink:type="simple" xlink:href="#__RefHeading___Toc5713_2530169349" office:name="5.12 Zusammenspiel aller Hardwarekomponenten" text:style-name="Index_20_Link" text:visited-style-name="Index_20_Link">5.12 Zusammenspiel aller Hardwarekomponenten<text:tab/>20</text:a></text:p>
          <text:p text:style-name="P10"><text:a xlink:type="simple" xlink:href="#__RefHeading___Toc5715_2530169349" office:name="6. Software" text:style-name="Index_20_Link" text:visited-style-name="Index_20_Link">6. Software<text:tab/>21</text:a></text:p>
          <text:p text:style-name="P11"><text:a xlink:type="simple" xlink:href="#__RefHeading___Toc5717_2530169349" office:name="6.1 Software-Zweck &amp; Gesamtarchitektur" text:style-name="Index_20_Link" text:visited-style-name="Index_20_Link">6.1 Software-Zweck &amp; Gesamtarchitektur<text:tab/>21</text:a></text:p>
          <text:p text:style-name="P12"><text:a xlink:type="simple" xlink:href="#__RefHeading___Toc5719_2530169349" office:name="6.1.1 Primärer Zweck des Codes" text:style-name="Index_20_Link" text:visited-style-name="Index_20_Link">6.1.1 Primärer Zweck des Codes<text:tab/>21</text:a></text:p>
          <text:p text:style-name="P12"><text:a xlink:type="simple" xlink:href="#__RefHeading___Toc5721_2530169349" office:name="6.1.2 Architektur-Überblick" text:style-name="Index_20_Link" text:visited-style-name="Index_20_Link">6.1.2 Architektur-Überblick<text:tab/>21</text:a></text:p>
          <text:p text:style-name="P11"><text:a xlink:type="simple" xlink:href="#__RefHeading___Toc5723_2530169349" office:name="6.2 Entwicklungsumgebung &amp; Voraussetzungen" text:style-name="Index_20_Link" text:visited-style-name="Index_20_Link">6.2 Entwicklungsumgebung &amp; Voraussetzungen<text:tab/>21</text:a></text:p>
          <text:p text:style-name="P11"><text:a xlink:type="simple" xlink:href="#__RefHeading___Toc5725_2530169349" office:name="6.3 Detaillierte Pin-Analyse &amp; Hardware-Mapping" text:style-name="Index_20_Link" text:visited-style-name="Index_20_Link">6.3 Detaillierte Pin-Analyse &amp; Hardware-Mapping<text:tab/>22</text:a></text:p>
          <text:p text:style-name="P12"><text:a xlink:type="simple" xlink:href="#__RefHeading___Toc5727_2530169349" office:name="6.3.1 Motor-Pin-Definitionen" text:style-name="Index_20_Link" text:visited-style-name="Index_20_Link">6.3.1 Motor-Pin-Definitionen<text:tab/>22</text:a></text:p>
          <text:p text:style-name="P12"><text:a xlink:type="simple" xlink:href="#__RefHeading___Toc5729_2530169349" office:name="6.3.2 Kamera-Pin-Definitionen (AI-Thinker)" text:style-name="Index_20_Link" text:visited-style-name="Index_20_Link">6.3.2 Kamera-Pin-Definitionen (AI-Thinker)<text:tab/>22</text:a></text:p>
          <text:p text:style-name="P11"><text:a xlink:type="simple" xlink:href="#__RefHeading___Toc5731_2530169349" office:name="6.4 Setup(): Fünf Initialisierungs-Phasen" text:style-name="Index_20_Link" text:visited-style-name="Index_20_Link"><text:soft-page-break/>6.4 Setup(): Fünf Initialisierungs-Phasen<text:tab/>23</text:a></text:p>
          <text:p text:style-name="P12"><text:a xlink:type="simple" xlink:href="#__RefHeading___Toc5733_2530169349" office:name="6.4.1 Phase 1: Diagnose und Sicherheitstest" text:style-name="Index_20_Link" text:visited-style-name="Index_20_Link">6.4.1 Phase 1: Diagnose und Sicherheitstest<text:tab/>23</text:a></text:p>
          <text:p text:style-name="P12"><text:a xlink:type="simple" xlink:href="#__RefHeading___Toc5735_2530169349" office:name="6.4.2 Phase 2: Kamera-Systeminitialisierung" text:style-name="Index_20_Link" text:visited-style-name="Index_20_Link">6.4.2 Phase 2: Kamera-Systeminitialisierung<text:tab/>23</text:a></text:p>
          <text:p text:style-name="P12"><text:a xlink:type="simple" xlink:href="#__RefHeading___Toc5737_2530169349" office:name="6.4.3 Phase 3: Kamera-Kalibrierung" text:style-name="Index_20_Link" text:visited-style-name="Index_20_Link">6.4.3 Phase 3: Kamera-Kalibrierung<text:tab/>24</text:a></text:p>
          <text:p text:style-name="P12"><text:a xlink:type="simple" xlink:href="#__RefHeading___Toc5739_2530169349" office:name="6.4.4 Phase 4: WLAN-Client und Webserver" text:style-name="Index_20_Link" text:visited-style-name="Index_20_Link">6.4.4 Phase 4: WLAN-Client und Webserver<text:tab/>24</text:a></text:p>
          <text:p text:style-name="P12"><text:a xlink:type="simple" xlink:href="#__RefHeading___Toc5741_2530169349" office:name="6.4.5 Phase 5: Server-Start" text:style-name="Index_20_Link" text:visited-style-name="Index_20_Link">6.4.5 Phase 5: Server-Start<text:tab/>24</text:a></text:p>
          <text:p text:style-name="P11"><text:a xlink:type="simple" xlink:href="#__RefHeading___Toc5743_2530169349" office:name="6.5 Loop(): Event-Architektur" text:style-name="Index_20_Link" text:visited-style-name="Index_20_Link">6.5 Loop(): Event-Architektur<text:tab/>24</text:a></text:p>
          <text:p text:style-name="P11"><text:a xlink:type="simple" xlink:href="#__RefHeading___Toc5745_2530169349" office:name="6.6 Webserver-Endpunkte: Funktionsweise" text:style-name="Index_20_Link" text:visited-style-name="Index_20_Link">6.6 Webserver-Endpunkte: Funktionsweise<text:tab/>25</text:a></text:p>
          <text:p text:style-name="P12"><text:a xlink:type="simple" xlink:href="#__RefHeading___Toc5747_2530169349" office:name="6.6.1 Hauptinterface (&quot;/&quot;)" text:style-name="Index_20_Link" text:visited-style-name="Index_20_Link">6.6.1 Hauptinterface ("/")<text:tab/>25</text:a></text:p>
          <text:p text:style-name="P12"><text:a xlink:type="simple" xlink:href="#__RefHeading___Toc5749_2530169349" office:name="6.6.2 Kamera-Stream (&quot;/stream&quot;)" text:style-name="Index_20_Link" text:visited-style-name="Index_20_Link">6.6.2 Kamera-Stream ("/stream")<text:tab/>25</text:a></text:p>
          <text:p text:style-name="P11"><text:a xlink:type="simple" xlink:href="#__RefHeading___Toc5751_2530169349" office:name="6.7 Motor-Steuerungslogik" text:style-name="Index_20_Link" text:visited-style-name="Index_20_Link">6.7 Motor-Steuerungslogik<text:tab/>26</text:a></text:p>
          <text:p text:style-name="P11"><text:a xlink:type="simple" xlink:href="#__RefHeading___Toc5753_2530169349" office:name="6.8 Weboberfläche" text:style-name="Index_20_Link" text:visited-style-name="Index_20_Link">6.8 Weboberfläche<text:tab/>26</text:a></text:p>
          <text:p text:style-name="P12"><text:a xlink:type="simple" xlink:href="#__RefHeading___Toc5755_2530169349" office:name="6.8.1 Design und Layout" text:style-name="Index_20_Link" text:visited-style-name="Index_20_Link">6.8.1 Design und Layout<text:tab/>26</text:a></text:p>
          <text:p text:style-name="P12"><text:a xlink:type="simple" xlink:href="#__RefHeading___Toc5757_2530169349" office:name="6.8.2 Steuerungsimplementierung" text:style-name="Index_20_Link" text:visited-style-name="Index_20_Link">6.8.2 Steuerungsimplementierung<text:tab/>27</text:a></text:p>
          <text:p text:style-name="P11"><text:a xlink:type="simple" xlink:href="#__RefHeading___Toc5759_2530169349" office:name="6.9 Testphase und Vorgehensweise" text:style-name="Index_20_Link" text:visited-style-name="Index_20_Link">6.9 Testphase und Vorgehensweise<text:tab/>27</text:a></text:p>
          <text:p text:style-name="P12"><text:a xlink:type="simple" xlink:href="#__RefHeading___Toc5761_2530169349" office:name="6.9.1 Erster Test: Motoren allein" text:style-name="Index_20_Link" text:visited-style-name="Index_20_Link">6.9.1 Erster Test: Motoren allein<text:tab/>27</text:a></text:p>
          <text:p text:style-name="P12"><text:a xlink:type="simple" xlink:href="#__RefHeading___Toc5763_2530169349" office:name="6.9.2 Zweiter Test: Kamera-Funktion" text:style-name="Index_20_Link" text:visited-style-name="Index_20_Link">6.9.2 Zweiter Test: Kamera-Funktion<text:tab/>27</text:a></text:p>
          <text:p text:style-name="P12"><text:a xlink:type="simple" xlink:href="#__RefHeading___Toc5765_2530169349" office:name="6.9.3 Dritter Test: Zusammengeführter Gesamtcode" text:style-name="Index_20_Link" text:visited-style-name="Index_20_Link">6.9.3 Dritter Test: Zusammengeführter Gesamtcode<text:tab/>27</text:a></text:p>
          <text:p text:style-name="P12"><text:a xlink:type="simple" xlink:href="#__RefHeading___Toc5767_2530169349" office:name="6.9.4 Probleme während der Testphase" text:style-name="Index_20_Link" text:visited-style-name="Index_20_Link">6.9.4 Probleme während der Testphase<text:tab/>28</text:a></text:p>
          <text:p text:style-name="P12"><text:a xlink:type="simple" xlink:href="#__RefHeading___Toc5769_2530169349" office:name="6.9.5 Lösung der Probleme" text:style-name="Index_20_Link" text:visited-style-name="Index_20_Link">6.9.5 Lösung der Probleme<text:tab/>28</text:a></text:p>
          <text:p text:style-name="P12"><text:a xlink:type="simple" xlink:href="#__RefHeading___Toc5779_2530169349" office:name="6.9.6 Warum diese Testmethode sinnvoll war" text:style-name="Index_20_Link" text:visited-style-name="Index_20_Link">6.9.6 Warum diese Testmethode sinnvoll war<text:tab/>28</text:a></text:p>
          <text:p text:style-name="P10"><text:a xlink:type="simple" xlink:href="#__RefHeading___Toc5781_2530169349" office:name="7. Ergebnisse und Bewertung" text:style-name="Index_20_Link" text:visited-style-name="Index_20_Link">7. Ergebnisse und Bewertung<text:tab/>29</text:a></text:p>
          <text:p text:style-name="P11"><text:a xlink:type="simple" xlink:href="#__RefHeading___Toc5783_2530169349" office:name="7.1 Erfüllung der Anforderungen" text:style-name="Index_20_Link" text:visited-style-name="Index_20_Link">7.1 Erfüllung der Anforderungen<text:tab/>29</text:a></text:p>
          <text:p text:style-name="P11"><text:a xlink:type="simple" xlink:href="#__RefHeading___Toc5785_2530169349" office:name="7.2 Technische Erkenntnisse" text:style-name="Index_20_Link" text:visited-style-name="Index_20_Link">7.2 Technische Erkenntnisse<text:tab/>29</text:a></text:p>
          <text:p text:style-name="P11"><text:a xlink:type="simple" xlink:href="#__RefHeading___Toc5787_2530169349" office:name="7.3 Grenzen des Systems" text:style-name="Index_20_Link" text:visited-style-name="Index_20_Link">7.3 Grenzen des Systems<text:tab/>29</text:a></text:p>
          <text:p text:style-name="P10"><text:a xlink:type="simple" xlink:href="#__RefHeading___Toc5789_2530169349" office:name="8. Fazit und Ausblick" text:style-name="Index_20_Link" text:visited-style-name="Index_20_Link">8. Fazit und Ausblick<text:tab/>30</text:a></text:p>
          <text:p text:style-name="P11"><text:a xlink:type="simple" xlink:href="#__RefHeading___Toc5791_2530169349" office:name="8.1 Fazit" text:style-name="Index_20_Link" text:visited-style-name="Index_20_Link">8.1 Fazit<text:tab/>30</text:a></text:p>
          <text:p text:style-name="P11"><text:a xlink:type="simple" xlink:href="#__RefHeading___Toc5793_2530169349" office:name="8.2 Ausblick – Mögliche Erweiterungen" text:style-name="Index_20_Link" text:visited-style-name="Index_20_Link">8.2 Ausblick – Mögliche Erweiterungen<text:tab/>30</text:a></text:p>
          <text:p text:style-name="P10"><text:a xlink:type="simple" xlink:href="#__RefHeading___Toc5795_2530169349" office:name="9. Nutzung der KI (ChatGpt GPT-5.3 und Claude Sonnet 4.6)" text:style-name="Index_20_Link" text:visited-style-name="Index_20_Link">9. Nutzung der KI (ChatGpt GPT-5.3 und Claude Sonnet 4.6)<text:tab/>31</text:a></text:p>
          <text:p text:style-name="P11"><text:a xlink:type="simple" xlink:href="#__RefHeading___Toc5797_2530169349" office:name="9.1 Prompts und Ergebnisse ( ChatGpt GPT-5.3)" text:style-name="Index_20_Link" text:visited-style-name="Index_20_Link">9.1 Prompts und Ergebnisse ( ChatGpt GPT-5.3)<text:tab/>31</text:a></text:p>
          <text:p text:style-name="P10"><text:a xlink:type="simple" xlink:href="#__RefHeading___Toc5799_2530169349" office:name="10. Quellenverzeichnis" text:style-name="Index_20_Link" text:visited-style-name="Index_20_Link">10. Quellenverzeichnis<text:tab/>32</text:a></text:p>
          <text:p text:style-name="P10"><text:a xlink:type="simple" xlink:href="#__RefHeading___Toc5801_2530169349" office:name=" 11. English Summary" text:style-name="Index_20_Link" text:visited-style-name="Index_20_Link"><text:s/>11. English Summary<text:tab/>33</text:a></text:p>
          <text:p text:style-name="P10"><text:a xlink:type="simple" xlink:href="#__RefHeading___Toc5803_2530169349" office:name="A. Anhang" text:style-name="Index_20_Link" text:visited-style-name="Index_20_Link">A. Anhang<text:tab/>34</text:a></text:p>
          <text:p text:style-name="P11"><text:a xlink:type="simple" xlink:href="#__RefHeading___Toc5805_2530169349" office:name="A.1 Quellcode" text:style-name="Index_20_Link" text:visited-style-name="Index_20_Link">A.1 Quellcode<text:tab/>34</text:a></text:p>
          <text:p text:style-name="P10"><text:a xlink:type="simple" xlink:href="#__RefHeading___Toc5807_2530169349" office:name="B. Bedienungs-Anleitung" text:style-name="Index_20_Link" text:visited-style-name="Index_20_Link">B. Bedienungs-Anleitung<text:tab/>34</text:a></text:p>
          <text:p text:style-name="P11"><text:a xlink:type="simple" xlink:href="#__RefHeading___Toc5809_2530169349" office:name="B.1 Voraussetzungen" text:style-name="Index_20_Link" text:visited-style-name="Index_20_Link">B.1 Voraussetzungen<text:tab/>34</text:a></text:p>
          <text:p text:style-name="P11"><text:a xlink:type="simple" xlink:href="#__RefHeading___Toc5811_2530169349" office:name="B.2 Inbetriebnahme" text:style-name="Index_20_Link" text:visited-style-name="Index_20_Link">B.2 Inbetriebnahme<text:tab/>34</text:a></text:p>
          <text:p text:style-name="P11"><text:a xlink:type="simple" xlink:href="#__RefHeading___Toc5813_2530169349" office:name="B.3 Steuerung" text:style-name="Index_20_Link" text:visited-style-name="Index_20_Link">B.3 Steuerung<text:tab/>35</text:a></text:p>
          <text:p text:style-name="P11"><text:a xlink:type="simple" xlink:href="#__RefHeading___Toc5815_2530169349" office:name="B.4 Fehlerbehebung" text:style-name="Index_20_Link" text:visited-style-name="Index_20_Link">B.4 Fehlerbehebung<text:tab/>35</text:a></text:p>
          <text:p text:style-name="P11"><text:a xlink:type="simple" xlink:href="#__RefHeading___Toc5817_2530169349" office:name=" B.5 Sicherheitshinweise" text:style-name="Index_20_Link" text:visited-style-name="Index_20_Link"><text:s/>B.5 Sicherheitshinweise<text:tab/>36</text:a></text:p>
        </text:index-body>
      </text:table-of-content>
      <text:p text:style-name="Standard"/>
      <text:p text:style-name="P13"/>
      <text:h text:style-name="P9" text:outline-level="1"><text:bookmark-start text:name="__RefHeading___Toc5643_2530169349"/>2. Zusammenfassung<text:bookmark-end text:name="__RefHeading___Toc5643_2530169349"/></text:h>
      <text:p text:style-name="P14">Das Projekt VisionBot realisiert ein fernsteuerbares 4WD-RC-Fahrzeug auf Basis des ESP32-CAM-Mikrocontrollers. Ziel war es, ein Fahrzeug zu entwickeln, das vollständig über einen Webbrowser gesteuert werden kann und dabei in Echtzeit ein Kamerabild überträgt – ohne dass eine separate App oder eine direkte Kabelverbindung notwendig ist.</text:p>
      <text:p text:style-name="Standard"/>
      <text:p text:style-name="P14">Das Fahrzeug verbindet sich automatisch mit einem WLAN-Hotspot, erhält eine IP-Adresse per DHCP und stellt einen Webserver auf Port 80 bereit. Dieser hostet eine Bedienoberfläche mit Live-Kamera-Stream (MJPEG) sowie neun Steuerrichtungen (Vorwärts, Rückwärts, Links, Rechts, vier Diagonalrichtungen sowie Stopp). Die Motorsteuerung erfolgt über eine L298N H-Bridge mit vier DC-Motoren.</text:p>
      <text:p text:style-name="Standard"/>
      <text:p text:style-name="P14">Aktueller Stand: Das Fahrzeug ist als voll funktionsfähiger Prototyp fertiggestellt. Motorsteuerung, Kameraübertragung und Websteuerung funktionieren zuverlässig zusammen. Geplante Erweiterungen wie PWM-basierte Geschwindigkeitsregelung sind für einen späteren Zeitpunkt vorgesehen.</text:p>
      <text:p text:style-name="Standard"/>
      <text:h text:style-name="P15" text:outline-level="1"><text:bookmark-start text:name="__RefHeading___Toc5645_2530169349"/>3. Einleitung<text:bookmark-end text:name="__RefHeading___Toc5645_2530169349"/></text:h>
      <text:p text:style-name="P14">Dieses Kapitel beschreibt den Ausgangspunkt des Projekts, die konkrete Zielsetzung, die Aufgabenverteilung im Team sowie den aktuellen Entwicklungsstand.</text:p>
      <text:p text:style-name="Standard"/>
      <text:h text:style-name="P16" text:outline-level="2"><text:bookmark-start text:name="__RefHeading___Toc5647_2530169349"/>3.1 Hintergrund und Motivation<text:bookmark-end text:name="__RefHeading___Toc5647_2530169349"/></text:h>
      <text:p text:style-name="P14">Im Rahmen des Unterrichts im Fach Informationstechnik sollte ein praxisnahes Projekt entwickelt werden, das grundlegende Kompetenzen in den Bereichen Embedded Systems, Netzwerktechnik und Softwareentwicklung verbindet. Die Idee, ein ferngesteuertes Fahrzeug mit Kameraübertragung zu bauen, entstand aus dem Wunsch, mehrere technische Disziplinen in einem einzigen Gerät zu vereinen.</text:p>
      <text:p text:style-name="Standard"/>
      <text:p text:style-name="P14">Herkömmliche RC-Fahrzeuge benötigen dedizierte Fernbedienungen mit proprietären Protokollen. Mit dem ESP32-CAM existiert jedoch eine kostengünstige, leistungsstarke Plattform, die WLAN-Kommunikation, Kamera und Mikrocontroller auf einer einzigen Platine vereint. Diese Kombination macht es möglich, ein smartes Fahrzeug zu entwickeln, das über jeden handelsüblichen Browser steuerbar ist – sei es per Smartphone, Tablet oder Computer.</text:p>
      <text:p text:style-name="Standard"/>
      <text:p text:style-name="P14">Ein weiterer Motivationspunkt war die Auseinandersetzung mit Echtzeitsystemen: Wie kann ein kleiner Mikrocontroller gleichzeitig Videodaten streamen und auf Steuerbefehle reagieren? Welche Kompromisse sind dabei notwendig? Diese Fragen machen das Projekt technisch anspruchsvoll und lehrreich zugleich.</text:p>
      <text:p text:style-name="Standard"/>
      <text:h text:style-name="P16" text:outline-level="2"/>
      <text:h text:style-name="P17" text:outline-level="2"><text:bookmark-start text:name="__RefHeading___Toc5649_2530169349"/>3.2 Projektziel<text:bookmark-end text:name="__RefHeading___Toc5649_2530169349"/></text:h>
      <text:p text:style-name="P14">Das Projekt VisionBot zielt auf die Entwicklung eines vollständig webgestützten 4WD-RC-Fahrzeugs mit ESP32-CAM ab, das drei Kernkompetenzen aus dem Bereich Embedded Systems vereint: Echtzeit-Videoübertragung, WLAN-Kommunikation und Motorsteuerung.</text:p>
      <text:p text:style-name="Standard"/>
      <text:p text:style-name="P14">Im Einzelnen wurden folgende Anforderungen definiert:</text:p>
      <text:list text:style-name="WWNum2">
        <text:list-item text:start-value="1">
          <text:p text:style-name="P18">Fernsteuerung über Browser – keine dedizierte App oder Fernbedienung erforderlich</text:p>
        </text:list-item>
        <text:list-item>
          <text:p text:style-name="P18">Live-Kameraübertragung mit möglichst geringer Latenz für eine präzise Navigation</text:p>
        </text:list-item>
        <text:list-item>
          <text:p text:style-name="P18">Vollständiger 4WD-Antrieb mit Differential-Lenkung (Tank-Turn) und diagonalen Fahrtrichtungen</text:p>
        </text:list-item>
        <text:list-item>
          <text:p text:style-name="P18">Automatischer WLAN-Verbindungsaufbau per DHCP – keine manuelle IP-Konfiguration notwendig</text:p>
        </text:list-item>
        <text:list-item>
          <text:p text:style-name="P18">Stabile Gleichzeitigkeit von Kamerastream und Motorsteuerung auf demselben Mikrocontroller</text:p>
        </text:list-item>
        <text:list-item>
          <text:p text:style-name="P18">Robuste und reaktionsschnelle Weboberfläche, die sowohl auf Desktop als auch auf mobilen Geräten funktioniert</text:p>
        </text:list-item>
      </text:list>
      <text:p text:style-name="Standard"/>
      <text:p text:style-name="P14">Der Fokus lag dabei nicht auf einer besonders aufwendigen Mechanik, sondern auf der softwareseitigen Integration der verschiedenen Komponenten und der Lösung der dabei entstehenden technischen Herausforderungen.</text:p>
      <text:p text:style-name="Standard"/>
      <text:h text:style-name="P16" text:outline-level="2"><text:bookmark-start text:name="__RefHeading___Toc5651_2530169349"/>3.3 Aufteilung der Aufgaben<text:bookmark-end text:name="__RefHeading___Toc5651_2530169349"/></text:h>
      <text:p text:style-name="P14">Die Aufgaben wurden zwischen den beiden Teammitgliedern wie folgt aufgeteilt:</text:p>
      <text:p text:style-name="Standard"/>
      <text:list text:continue-numbering="true" text:style-name="WWNum2">
        <text:list-item>
          <text:p text:style-name="P18">Hardware (Kevin Seeling): Chassis-Montage, Motorverkabelung, Anschluss des ESP32-CAM, Verdrahtung des L298N-Motortreibers sowie Aufbau der Stromversorgung.</text:p>
        </text:list-item>
        <text:list-item>
          <text:p text:style-name="P18">Software (Eren Baser): Entwicklung des Firmware-Codes in C++ (Arduino IDE), Implementierung der Weboberfläche mit HTML/CSS/JavaScript, WLAN-Integration, Kamera-Konfiguration und Debugging.</text:p>
        </text:list-item>
      </text:list>
      <text:p text:style-name="Standard"/>
      <text:p text:style-name="P14">Die enge Zusammenarbeit beider Bereiche war besonders beim Zusammenführen von Hardware und Software entscheidend: Änderungen an der Verdrahtung hatten direkten Einfluss auf den Code und umgekehrt.</text:p>
      <text:p text:style-name="Standard"/>
      <text:h text:style-name="P16" text:outline-level="2"/>
      <text:h text:style-name="P17" text:outline-level="2"><text:bookmark-start text:name="__RefHeading___Toc5653_2530169349"/>3.4 Projektzeitplan (Gantt-Diagramm)<text:bookmark-end text:name="__RefHeading___Toc5653_2530169349"/></text:h>
      <text:p text:style-name="P14">Der Projektverlauf wurde in zehn Arbeitspakete (AP) gegliedert, die zeitlich aufeinander aufbauen. Das folgende Gantt-Diagramm zeigt die geplante und tatsächlich eingehaltene Zeitplanung von Anfang November 2025 bis Mitte Januar 2026.</text:p>
      <text:p text:style-name="Standard"/>
      <text:p text:style-name="P14"><draw:frame draw:style-name="fr3" draw:name="Rahmen3" text:anchor-type="char" svg:width="17cm" draw:z-index="4"><draw:text-box fo:min-height="9.172cm"><text:p text:style-name="Figure"><draw:frame draw:style-name="fr2" draw:name="Bild3" text:anchor-type="paragraph" svg:width="17cm" style:rel-width="100%" svg:height="9.172cm" style:rel-height="scale" draw:z-index="5"><draw:image xlink:href="Pictures/100000000000053C000002D3CFCC92DC.png" xlink:type="simple" xlink:show="embed" xlink:actuate="onLoad" draw:mime-type="image/png"/></draw:frame>Schaubild <text:sequence text:ref-name="refFigure1" text:name="Figure" text:formula="ooow:Figure+1" style:num-format="1">2</text:sequence>: Gantt-Diagramm erstellt mit ChatGpt GPT5.3</text:p></draw:text-box></draw:frame></text:p>
      <text:p text:style-name="Standard"/>
      <text:p text:style-name="Standard"/>
      <text:p text:style-name="Standard"/>
      <table:table table:name="Tabelle1" table:style-name="Tabelle1">
        <table:table-column table:style-name="Tabelle1.A"/>
        <table:table-column table:style-name="Tabelle1.B"/>
        <table:table-column table:style-name="Tabelle1.C"/>
        <table:table-column table:style-name="Tabelle1.D"/>
        <table:table-header-rows>
          <table:table-row table:style-name="Tabelle1.1">
            <table:table-cell table:style-name="Tabelle1.A1" office:value-type="string">
              <text:p text:style-name="P19">Arbeitspaket</text:p>
            </table:table-cell>
            <table:table-cell table:style-name="Tabelle1.A1" office:value-type="string">
              <text:p text:style-name="P19">Bezeichnung</text:p>
            </table:table-cell>
            <table:table-cell table:style-name="Tabelle1.A1" office:value-type="string">
              <text:p text:style-name="P19">Zeitraum (geplant)</text:p>
            </table:table-cell>
            <table:table-cell table:style-name="Tabelle1.A1" office:value-type="string">
              <text:p text:style-name="P19">Beschreibung</text:p>
            </table:table-cell>
          </table:table-row>
        </table:table-header-rows>
        <table:table-row table:style-name="Tabelle1.1">
          <table:table-cell table:style-name="Tabelle1.A2" office:value-type="string">
            <text:p text:style-name="P20">AP1</text:p>
          </table:table-cell>
          <table:table-cell table:style-name="Tabelle1.A2" office:value-type="string">
            <text:p text:style-name="P20">Planung &amp; Material</text:p>
          </table:table-cell>
          <table:table-cell table:style-name="Tabelle1.A2" office:value-type="string">
            <text:p text:style-name="P20">02.11. – 15.11.2025</text:p>
          </table:table-cell>
          <table:table-cell table:style-name="Tabelle1.A2" office:value-type="string">
            <text:p text:style-name="P20">Anforderungsanalyse, Komponentenauswahl, Bestellung des ZYC0024-Kits</text:p>
          </table:table-cell>
        </table:table-row>
        <table:table-row table:style-name="Tabelle1.1">
          <table:table-cell table:style-name="Tabelle1.A2" office:value-type="string">
            <text:p text:style-name="P20">AP2</text:p>
          </table:table-cell>
          <table:table-cell table:style-name="Tabelle1.A2" office:value-type="string">
            <text:p text:style-name="P20">Mechanischer Aufbau</text:p>
          </table:table-cell>
          <table:table-cell table:style-name="Tabelle1.A2" office:value-type="string">
            <text:p text:style-name="P20">16.11. – 22.11.2025</text:p>
          </table:table-cell>
          <table:table-cell table:style-name="Tabelle1.A2" office:value-type="string">
            <text:p text:style-name="P20">Chassis-Montage, Motoren einbauen, Räder befestigen</text:p>
          </table:table-cell>
        </table:table-row>
        <table:table-row table:style-name="Tabelle1.1">
          <table:table-cell table:style-name="Tabelle1.A2" office:value-type="string">
            <text:p text:style-name="P20">AP3</text:p>
          </table:table-cell>
          <table:table-cell table:style-name="Tabelle1.A2" office:value-type="string">
            <text:p text:style-name="P20">Elektrische Verdrahtung</text:p>
          </table:table-cell>
          <table:table-cell table:style-name="Tabelle1.A2" office:value-type="string">
            <text:p text:style-name="P20">16.11. – 30.11.2025</text:p>
          </table:table-cell>
          <table:table-cell table:style-name="Tabelle1.A2" office:value-type="string">
            <text:p text:style-name="P20">Motorkabel anschliessen, L298N verdrahten, Stromversorgung aufbauen</text:p>
          </table:table-cell>
        </table:table-row>
        <table:table-row table:style-name="Tabelle1.1">
          <table:table-cell table:style-name="Tabelle1.A2" office:value-type="string">
            <text:p text:style-name="P20">AP4</text:p>
          </table:table-cell>
          <table:table-cell table:style-name="Tabelle1.A2" office:value-type="string">
            <text:p text:style-name="P20">Entwicklungsumgebung</text:p>
          </table:table-cell>
          <table:table-cell table:style-name="Tabelle1.A2" office:value-type="string">
            <text:p text:style-name="P20">16.11. – 22.11.2025</text:p>
          </table:table-cell>
          <table:table-cell table:style-name="Tabelle1.A2" office:value-type="string">
            <text:p text:style-name="P20">Arduino IDE einrichten, ESP32-Board installieren, CH340-Treiber</text:p>
          </table:table-cell>
        </table:table-row>
        <table:table-row table:style-name="Tabelle1.1">
          <table:table-cell table:style-name="Tabelle1.A2" office:value-type="string">
            <text:p text:style-name="P20">AP5</text:p>
          </table:table-cell>
          <table:table-cell table:style-name="Tabelle1.A2" office:value-type="string">
            <text:p text:style-name="P20">Kamera &amp; Livestream</text:p>
          </table:table-cell>
          <table:table-cell table:style-name="Tabelle1.A2" office:value-type="string">
            <text:p text:style-name="P20">23.11. – 02.12.2025</text:p>
          </table:table-cell>
          <table:table-cell table:style-name="Tabelle1.A2" office:value-type="string">
            <text:p text:style-name="P20">OV2640 initialisieren, JPEG-Stream testen, Bildausrichtung korrigieren</text:p>
          </table:table-cell>
        </table:table-row>
        <text:soft-page-break/>
        <table:table-row table:style-name="Tabelle1.1">
          <table:table-cell table:style-name="Tabelle1.A2" office:value-type="string">
            <text:p text:style-name="P20">AP6</text:p>
          </table:table-cell>
          <table:table-cell table:style-name="Tabelle1.A2" office:value-type="string">
            <text:p text:style-name="P20">Motorsteuerung</text:p>
          </table:table-cell>
          <table:table-cell table:style-name="Tabelle1.A2" office:value-type="string">
            <text:p text:style-name="P20">30.11. – 14.12.2025</text:p>
          </table:table-cell>
          <table:table-cell table:style-name="Tabelle1.A2" office:value-type="string">
            <text:p text:style-name="P20">H-Bridge-Logik implementieren, alle 9 Fahrtrichtungen testen</text:p>
          </table:table-cell>
        </table:table-row>
        <table:table-row table:style-name="Tabelle1.1">
          <table:table-cell table:style-name="Tabelle1.A2" office:value-type="string">
            <text:p text:style-name="P20">AP7</text:p>
          </table:table-cell>
          <table:table-cell table:style-name="Tabelle1.A2" office:value-type="string">
            <text:p text:style-name="P20">Websteuerung</text:p>
          </table:table-cell>
          <table:table-cell table:style-name="Tabelle1.A2" office:value-type="string">
            <text:p text:style-name="P20">30.11. – 14.12.2025</text:p>
          </table:table-cell>
          <table:table-cell table:style-name="Tabelle1.A2" office:value-type="string">
            <text:p text:style-name="P20">HTML/CSS/JS-Interface entwickeln, fetch()-Steuerung implementieren</text:p>
          </table:table-cell>
        </table:table-row>
        <table:table-row table:style-name="Tabelle1.1">
          <table:table-cell table:style-name="Tabelle1.A2" office:value-type="string">
            <text:p text:style-name="P20">AP8</text:p>
          </table:table-cell>
          <table:table-cell table:style-name="Tabelle1.A2" office:value-type="string">
            <text:p text:style-name="P20">Integration &amp; Test</text:p>
          </table:table-cell>
          <table:table-cell table:style-name="Tabelle1.A2" office:value-type="string">
            <text:p text:style-name="P20">14.12. – 28.12.2025</text:p>
          </table:table-cell>
          <table:table-cell table:style-name="Tabelle1.A2" office:value-type="string">
            <text:p text:style-name="P20">Kamera + Motorsteuerung zusammenführen, Gesamtsystem testen</text:p>
          </table:table-cell>
        </table:table-row>
        <table:table-row table:style-name="Tabelle1.1">
          <table:table-cell table:style-name="Tabelle1.A2" office:value-type="string">
            <text:p text:style-name="P20">AP9</text:p>
          </table:table-cell>
          <table:table-cell table:style-name="Tabelle1.A2" office:value-type="string">
            <text:p text:style-name="P20">Optimierung</text:p>
          </table:table-cell>
          <table:table-cell table:style-name="Tabelle1.A2" office:value-type="string">
            <text:p text:style-name="P20">28.12.2025 – 07.01.2026</text:p>
          </table:table-cell>
          <table:table-cell table:style-name="Tabelle1.A2" office:value-type="string">
            <text:p text:style-name="P20">Auflösung reduzieren, Latenz verbessern, Steuerung stabilisieren</text:p>
          </table:table-cell>
        </table:table-row>
        <table:table-row table:style-name="Tabelle1.1">
          <table:table-cell table:style-name="Tabelle1.A2" office:value-type="string">
            <text:p text:style-name="P20">AP10</text:p>
          </table:table-cell>
          <table:table-cell table:style-name="Tabelle1.A2" office:value-type="string">
            <text:p text:style-name="P20">Dokumentation &amp; Pr<text:span text:style-name="T4">ä</text:span>sentation</text:p>
          </table:table-cell>
          <table:table-cell table:style-name="Tabelle1.A2" office:value-type="string">
            <text:p text:style-name="P20">07.01. – 16.01.2026</text:p>
          </table:table-cell>
          <table:table-cell table:style-name="Tabelle1.A2" office:value-type="string">
            <text:p text:style-name="P20">Projektdokumentation verfassen, Pr<text:span text:style-name="T4">ä</text:span>sentation vorbereiten</text:p>
          </table:table-cell>
        </table:table-row>
      </table:table>
      <text:p text:style-name="Standard"/>
      <text:p text:style-name="Standard"/>
      <text:p text:style-name="P21">Die Arbeitspakete AP2 und AP4 wurden parallel bearbeitet, da Hardware-Aufbau (Kevin) und Software-Vorbereitung (Eren) voneinander unabhängig waren. Ab AP5 nahm die Zusammenarbeit zu, da Software-Entscheidungen direkte Auswirkungen auf die Hardware-Konfiguration hatten und umgekehrt. Die l<text:span text:style-name="T4">ä</text:span>ngste Phase war AP8 (Integration &amp; Test), was die technische Komplexit<text:span text:style-name="T4">ä</text:span>t des Zusammenspiels aller Komponenten widerspiegelt.</text:p>
      <text:p text:style-name="Standard"/>
      <text:p text:style-name="P14">Zum Zeitpunkt der Dokumentation befindet sich das Projekt in einem voll funktionsfähigen Prototypen-Zustand. Im Einzelnen sind folgende Meilensteine erreicht:</text:p>
      <text:p text:style-name="Standard"/>
      <text:list text:continue-numbering="true" text:style-name="WWNum2">
        <text:list-item>
          <text:p text:style-name="P18">Hardware vollständig aufgebaut und verkabelt</text:p>
        </text:list-item>
        <text:list-item>
          <text:p text:style-name="P18">Spannungsversorgung eingerichtet, alle vier Motoren funktionsfähig</text:p>
        </text:list-item>
        <text:list-item>
          <text:p text:style-name="P18">ESP32-CAM hostet Webseite mit Live-Kamerastream</text:p>
        </text:list-item>
        <text:list-item>
          <text:p text:style-name="P18">Steuerung des Fahrzeugs per Webbrowser ohne Kabelverbindung möglich</text:p>
        </text:list-item>
        <text:list-item>
          <text:p text:style-name="P18">Neun Fahrtrichtungen (inkl. Diagonalbewegungen) implementiert</text:p>
        </text:list-item>
        <text:list-item>
          <text:p text:style-name="P18">Keyboard-Steuerung über WASD-Tasten funktioniert</text:p>
        </text:list-item>
      </text:list>
      <text:p text:style-name="Standard"/>
      <text:p text:style-name="P14">Noch ausstehend bzw. für spätere Versionen geplant:</text:p>
      <text:list text:continue-numbering="true" text:style-name="WWNum2">
        <text:list-item>
          <text:p text:style-name="P18">PWM-basierte Geschwindigkeitsregelung (stufenlose Drehzahlsteuerung)</text:p>
        </text:list-item>
        <text:list-item>
          <text:p text:style-name="P18">Verbesserte Weboberfläche mit Statusanzeige und Konnektivitätsmeldungen</text:p>
        </text:list-item>
        <text:list-item>
          <text:p text:style-name="P18">Optimierung der Kameralatenz durch angepasste Stream-Parameter</text:p>
        </text:list-item>
      </text:list>
      <text:h text:style-name="P15" text:outline-level="1"/>
      <text:h text:style-name="P9" text:outline-level="1"><text:bookmark-start text:name="__RefHeading___Toc5655_2530169349"/>4. Projektstruktur<text:bookmark-end text:name="__RefHeading___Toc5655_2530169349"/></text:h>
      <text:p text:style-name="P14">Dieses Kapitel beschreibt die Aufgabenstellung des Projekts, das Zusammenwirken aller Komponenten als Blockschaltbild sowie die Teilprobleme, die während der Entwicklung erkannt und gelöst wurden.</text:p>
      <text:p text:style-name="Standard"/>
      <text:h text:style-name="P16" text:outline-level="2"><text:bookmark-start text:name="__RefHeading___Toc5657_2530169349"/>4.1 Aufgabenstellung<text:bookmark-end text:name="__RefHeading___Toc5657_2530169349"/></text:h>
      <text:p text:style-name="P14">Ziel des Projekts war die Entwicklung eines ferngesteuerten 4WD-Fahrzeugs, das vollständig über einen Webbrowser bedient werden kann. Das Fahrzeug soll ohne dedizierte App oder Fernbedienung steuerbar sein und dabei in Echtzeit ein Kamerabild übertragen.</text:p>
      <text:p text:style-name="Standard"/>
      <text:p text:style-name="P14">Die Kernfunktionen des VisionBot im Überblick:</text:p>
      <text:list text:continue-numbering="true" text:style-name="WWNum2">
        <text:list-item>
          <text:p text:style-name="P18">Webcam-Livestream: Der Fahrer sieht in Echtzeit, was die Kamera des Fahrzeugs aufnimmt.</text:p>
        </text:list-item>
        <text:list-item>
          <text:p text:style-name="P18">9-Richtungs-Steuerung: Vorwärts, Rückwärts, Links, Rechts sowie vier Diagonalrichtungen über Browser-Buttons oder WASD-Tastatur.</text:p>
        </text:list-item>
        <text:list-item>
          <text:p text:style-name="P18">WLAN-Betrieb: Das Fahrzeug verbindet sich automatisch mit einem Hotspot – keine Kabelverbindung nötig.</text:p>
        </text:list-item>
        <text:list-item>
          <text:p text:style-name="P18">Plattformunabhängig: Die Steuerseite funktioniert auf Smartphone, Tablet und PC, da sie reines HTML/CSS/JS ist.</text:p>
        </text:list-item>
      </text:list>
      <text:p text:style-name="Standard"/>
      <text:h text:style-name="P16" text:outline-level="2"><text:bookmark-start text:name="__RefHeading___Toc5659_2530169349"/>4.2 Blockschaltbild – Zusammenwirken der Komponenten<text:bookmark-end text:name="__RefHeading___Toc5659_2530169349"/></text:h>
      <text:p text:style-name="P14">Das folgende Blockschaltbild zeigt das Zusammenwirken aller Hardware- und Software-Komponenten des VisionBot. Der Signalfluss verläuft vom Nutzer (Browser) über das WLAN zum ESP32-CAM, der sowohl die Motorsteuerung als auch den Kamerastream koordiniert.</text:p>
      <text:p text:style-name="P22"/>
      <text:p text:style-name="Standard"/>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19">Schicht</text:p>
            </table:table-cell>
            <table:table-cell table:style-name="Tabelle2.A1" office:value-type="string">
              <text:p text:style-name="P19">Komponente</text:p>
            </table:table-cell>
            <table:table-cell table:style-name="Tabelle2.A1" office:value-type="string">
              <text:p text:style-name="P19">Aufgabe</text:p>
            </table:table-cell>
          </table:table-row>
        </table:table-header-rows>
        <table:table-row table:style-name="Tabelle2.1">
          <table:table-cell table:style-name="Tabelle2.A2" office:value-type="string">
            <text:p text:style-name="P20">Benutzerinterface</text:p>
          </table:table-cell>
          <table:table-cell table:style-name="Tabelle2.A2" office:value-type="string">
            <text:p text:style-name="P20">Browser (HTML/CSS/JS)</text:p>
          </table:table-cell>
          <table:table-cell table:style-name="Tabelle2.A2" office:value-type="string">
            <text:p text:style-name="P20">Steuerbuttons + Kamerabild anzeigen</text:p>
          </table:table-cell>
        </table:table-row>
        <table:table-row table:style-name="Tabelle2.1">
          <table:table-cell table:style-name="Tabelle2.A2" office:value-type="string">
            <text:p text:style-name="P20">Kommunikation</text:p>
          </table:table-cell>
          <table:table-cell table:style-name="Tabelle2.A2" office:value-type="string">
            <text:p text:style-name="P20">WLAN (2,4 GHz)</text:p>
          </table:table-cell>
          <table:table-cell table:style-name="Tabelle2.A2" office:value-type="string">
            <text:p text:style-name="P20">HTTP-Requests und JPEG-Stream übertragen</text:p>
          </table:table-cell>
        </table:table-row>
        <table:table-row table:style-name="Tabelle2.1">
          <table:table-cell table:style-name="Tabelle2.A2" office:value-type="string">
            <text:p text:style-name="P20">Steuereinheit</text:p>
          </table:table-cell>
          <table:table-cell table:style-name="Tabelle2.A2" office:value-type="string">
            <text:p text:style-name="P20">ESP32-CAM (AI-Thinker)</text:p>
          </table:table-cell>
          <table:table-cell table:style-name="Tabelle2.A2" office:value-type="string">
            <text:p text:style-name="P20">Webserver, Kamera, GPIO-Steuerung</text:p>
          </table:table-cell>
        </table:table-row>
        <table:table-row table:style-name="Tabelle2.1">
          <table:table-cell table:style-name="Tabelle2.A2" office:value-type="string">
            <text:p text:style-name="P20">Motoransteuerung</text:p>
          </table:table-cell>
          <table:table-cell table:style-name="Tabelle2.A2" office:value-type="string">
            <text:p text:style-name="P20">L298N H-Bridge</text:p>
          </table:table-cell>
          <table:table-cell table:style-name="Tabelle2.A2" office:value-type="string">
            <text:p text:style-name="P20">Schwache GPIO-Signale in Motorstrom umwandeln</text:p>
          </table:table-cell>
        </table:table-row>
        <table:table-row table:style-name="Tabelle2.1">
          <table:table-cell table:style-name="Tabelle2.A2" office:value-type="string">
            <text:p text:style-name="P20">Antrieb</text:p>
          </table:table-cell>
          <table:table-cell table:style-name="Tabelle2.A2" office:value-type="string">
            <text:p text:style-name="P20">4x TT DC-Getriebemotor</text:p>
          </table:table-cell>
          <table:table-cell table:style-name="Tabelle2.A2" office:value-type="string">
            <text:p text:style-name="P20">Mechanische Bewegung des Fahrzeugs</text:p>
          </table:table-cell>
        </table:table-row>
        <table:table-row table:style-name="Tabelle2.1">
          <table:table-cell table:style-name="Tabelle2.A2" office:value-type="string">
            <text:p text:style-name="P20">Bilderfassung</text:p>
          </table:table-cell>
          <table:table-cell table:style-name="Tabelle2.A2" office:value-type="string">
            <text:p text:style-name="P20">OV2640 Kamera (im ESP32-CAM)</text:p>
          </table:table-cell>
          <table:table-cell table:style-name="Tabelle2.A2" office:value-type="string">
            <text:p text:style-name="P20">JPEG-Bilder aufnehmen und liefern</text:p>
          </table:table-cell>
        </table:table-row>
        <text:soft-page-break/>
        <table:table-row table:style-name="Tabelle2.1">
          <table:table-cell table:style-name="Tabelle2.A2" office:value-type="string">
            <text:p text:style-name="P20">Energieversorgung</text:p>
          </table:table-cell>
          <table:table-cell table:style-name="Tabelle2.A2" office:value-type="string">
            <text:p text:style-name="P20">2x 18650-Akku (7,4V)</text:p>
          </table:table-cell>
          <table:table-cell table:style-name="Tabelle2.A2" office:value-type="string">
            <text:p text:style-name="P20">Gesamtes System mit Strom versorgen</text:p>
          </table:table-cell>
        </table:table-row>
      </table:table>
      <text:p text:style-name="Standard"/>
      <text:h text:style-name="P16" text:outline-level="2"><text:bookmark-start text:name="__RefHeading___Toc5661_2530169349"/>4.3 Erkannte Teilprobleme<text:bookmark-end text:name="__RefHeading___Toc5661_2530169349"/></text:h>
      <text:p text:style-name="P14">Zu Beginn des Projekts wurden die wesentlichen Teilprobleme identifiziert, die voneinander getrennt gelöst werden mussten, bevor eine Integration möglich war:</text:p>
      <text:p text:style-name="Standard"/>
      <text:list text:continue-numbering="true" text:style-name="WWNum2">
        <text:list-item>
          <text:p text:style-name="P18">Teilproblem 1 – Motorsteuerung: Wie können vier DC-Motoren über einen Mikrocontroller in beide Richtungen angesteuert werden? Lösung: L298N H-Bridge als Motortreiber.</text:p>
        </text:list-item>
        <text:list-item>
          <text:p text:style-name="P18">Teilproblem 2 – Kameraübertragung: Wie kann ein Kamerabild in Echtzeit über WLAN an einen Browser gesendet werden? Lösung: JPEG-Poll-Stream über HTTP.</text:p>
        </text:list-item>
        <text:list-item>
          <text:p text:style-name="P18">Teilproblem 3 – Parallelverarbeitung: Wie können Kamerastream und Motorsteuerung gleichzeitig auf einem Mikrocontroller laufen? Lösung: Non-blocking Webserver-Architektur (server.handleClient() ohne delay()).</text:p>
        </text:list-item>
        <text:list-item>
          <text:p text:style-name="P18">Teilproblem 4 – Pin-Knappheit: Der ESP32-CAM hat kaum freie GPIO-Pins, da die meisten von der Kamera belegt sind. Lösung: Vier Pins (2, 13, 14, 15) sorgfältig ausgewählt, die nicht mit der Kamera kollidieren.</text:p>
        </text:list-item>
        <text:list-item>
          <text:p text:style-name="P18">Teilproblem 5 – Mechanische Stabilität: Kabel und Motoren lösten sich durch Vibrationen. Lösung: Verlöten der Motoranschlüsse, festere Verschraubung.</text:p>
        </text:list-item>
      </text:list>
      <text:p text:style-name="Standard"/>
      <text:h text:style-name="P15" text:outline-level="1"><text:bookmark-start text:name="__RefHeading___Toc5663_2530169349"/>5. Hardware<text:bookmark-end text:name="__RefHeading___Toc5663_2530169349"/></text:h>
      <text:p text:style-name="P14">Dieses Kapitel beschreibt alle eingesetzten Hardwarekomponenten des VisionBot im Detail, erklärt wie sie zusammenwirken, dokumentiert die aufgetretenen mechanischen Probleme und deren Lösungen.</text:p>
      <text:p text:style-name="Standard"/>
      <text:h text:style-name="P16" text:outline-level="2"><text:bookmark-start text:name="__RefHeading___Toc5665_2530169349"/>5.1 Komponenten-Liste<text:bookmark-end text:name="__RefHeading___Toc5665_2530169349"/></text:h>
      <table:table table:name="Tabelle3" table:style-name="Tabelle3">
        <table:table-column table:style-name="Tabelle3.A"/>
        <table:table-column table:style-name="Tabelle3.B"/>
        <table:table-column table:style-name="Tabelle3.C"/>
        <table:table-header-rows>
          <table:table-row table:style-name="Tabelle3.1">
            <table:table-cell table:style-name="Tabelle3.A1" office:value-type="string">
              <text:p text:style-name="P19">Komponente</text:p>
            </table:table-cell>
            <table:table-cell table:style-name="Tabelle3.A1" office:value-type="string">
              <text:p text:style-name="P19">Menge</text:p>
            </table:table-cell>
            <table:table-cell table:style-name="Tabelle3.A1" office:value-type="string">
              <text:p text:style-name="P19">Spezifikation</text:p>
            </table:table-cell>
          </table:table-row>
        </table:table-header-rows>
        <table:table-row table:style-name="Tabelle3.1">
          <table:table-cell table:style-name="Tabelle3.A2" office:value-type="string">
            <text:p text:style-name="P20">ESP32-CAM (AI-Thinker)</text:p>
          </table:table-cell>
          <table:table-cell table:style-name="Tabelle3.A2" office:value-type="string">
            <text:p text:style-name="P20">1</text:p>
          </table:table-cell>
          <table:table-cell table:style-name="Tabelle3.A2" office:value-type="string">
            <text:p text:style-name="P20">ESP32-S Chip, OV2640 Kamera, 4MB Flash, 4MB PSRAM</text:p>
          </table:table-cell>
        </table:table-row>
        <table:table-row table:style-name="Tabelle3.1">
          <table:table-cell table:style-name="Tabelle3.A2" office:value-type="string">
            <text:p text:style-name="P20">L298N H-Bridge Motortreiber</text:p>
          </table:table-cell>
          <table:table-cell table:style-name="Tabelle3.A2" office:value-type="string">
            <text:p text:style-name="P20">1</text:p>
          </table:table-cell>
          <table:table-cell table:style-name="Tabelle3.A2" office:value-type="string">
            <text:p text:style-name="P20">Dualer Vollbrücken-Treiber, 5-35V, max. 2A pro Kanal</text:p>
          </table:table-cell>
        </table:table-row>
        <table:table-row table:style-name="Tabelle3.1">
          <table:table-cell table:style-name="Tabelle3.A2" office:value-type="string">
            <text:p text:style-name="P20">TT DC-Getriebemotor</text:p>
          </table:table-cell>
          <table:table-cell table:style-name="Tabelle3.A2" office:value-type="string">
            <text:p text:style-name="P20">4</text:p>
          </table:table-cell>
          <table:table-cell table:style-name="Tabelle3.A2" office:value-type="string">
            <text:p text:style-name="P20">3-6V DC, TT-Standardbauform, Kunststoffgetriebe</text:p>
          </table:table-cell>
        </table:table-row>
        <table:table-row table:style-name="Tabelle3.1">
          <table:table-cell table:style-name="Tabelle3.A2" office:value-type="string">
            <text:p text:style-name="P20">4WD-Acryl-Chassis (ZYC0024)</text:p>
          </table:table-cell>
          <table:table-cell table:style-name="Tabelle3.A2" office:value-type="string">
            <text:p text:style-name="P20">1</text:p>
          </table:table-cell>
          <table:table-cell table:style-name="Tabelle3.A2" office:value-type="string">
            <text:p text:style-name="P20">Zwei-Ebenen-Aufbau, Acrylplatten, Metallhalterungen</text:p>
          </table:table-cell>
        </table:table-row>
        <text:soft-page-break/>
        <table:table-row table:style-name="Tabelle3.1">
          <table:table-cell table:style-name="Tabelle3.A2" office:value-type="string">
            <text:p text:style-name="P20">18650 Lithium-Akku</text:p>
          </table:table-cell>
          <table:table-cell table:style-name="Tabelle3.A2" office:value-type="string">
            <text:p text:style-name="P20">2</text:p>
          </table:table-cell>
          <table:table-cell table:style-name="Tabelle3.A2" office:value-type="string">
            <text:p text:style-name="P20">3,7V / 2200mAh, in Reihe: ca. 7,4V</text:p>
          </table:table-cell>
        </table:table-row>
        <table:table-row table:style-name="Tabelle3.1">
          <table:table-cell table:style-name="Tabelle3.A2" office:value-type="string">
            <text:p text:style-name="P20">18650 Batteriehalter</text:p>
          </table:table-cell>
          <table:table-cell table:style-name="Tabelle3.A2" office:value-type="string">
            <text:p text:style-name="P20">1</text:p>
          </table:table-cell>
          <table:table-cell table:style-name="Tabelle3.A2" office:value-type="string">
            <text:p text:style-name="P20">2-Zellen-Halter mit Anschlusskabeln</text:p>
          </table:table-cell>
        </table:table-row>
        <table:table-row table:style-name="Tabelle3.1">
          <table:table-cell table:style-name="Tabelle3.A2" office:value-type="string">
            <text:p text:style-name="P20">Externe WLAN-Antenne</text:p>
          </table:table-cell>
          <table:table-cell table:style-name="Tabelle3.A2" office:value-type="string">
            <text:p text:style-name="P20">1</text:p>
          </table:table-cell>
          <table:table-cell table:style-name="Tabelle3.A2" office:value-type="string">
            <text:p text:style-name="P20">2,4 GHz, IPX/u.FL-Anschluss, im Kit enthalten</text:p>
          </table:table-cell>
        </table:table-row>
        <table:table-row table:style-name="Tabelle3.1">
          <table:table-cell table:style-name="Tabelle3.A2" office:value-type="string">
            <text:p text:style-name="P20">Dupont-Kabel / Jumper Wire</text:p>
          </table:table-cell>
          <table:table-cell table:style-name="Tabelle3.A2" office:value-type="string">
            <text:p text:style-name="P20">mehrere</text:p>
          </table:table-cell>
          <table:table-cell table:style-name="Tabelle3.A2" office:value-type="string">
            <text:p text:style-name="P20">Verbindungskabel zwischen ESP32-CAM und L298N</text:p>
          </table:table-cell>
        </table:table-row>
      </table:table>
      <text:p text:style-name="Standard"/>
      <text:h text:style-name="P16" text:outline-level="2"><text:bookmark-start text:name="__RefHeading___Toc5667_2530169349"/>5.2 Das 4WD-Chassis (ZYC0024)<text:bookmark-end text:name="__RefHeading___Toc5667_2530169349"/></text:h>
      <text:p text:style-name="P14">Das Chassis des VisionBot basiert auf einem handelsüblichen Zwei-Ebenen-Acryl-Roboter-Fahrgestell (Modell ZYC0024). Es besteht aus zwei transparenten Acrylplatten, die durch Abstandshalter (Spacer) aus Metall miteinander verbunden werden. Die untere Platte nimmt die vier DC-Motoren auf, die in Metallhalterungen (Motor-Brackets) an den vier Ecken verschraubt werden. Die obere Platte dient als Montagefläche für den L298N-Motortreiber, den Batteriehalter und den ESP32-CAM.</text:p>
      <text:p text:style-name="Standard"/>
      <text:p text:style-name="P14">Das Chassis besteht aus zwei transparenten Acrylplatten, die mit MetallAbstandshaltern auf Abstand gehalten werden. Die Acrylplatten sind mit vorgestanzten Löchern für die Motorhalterungen, Spacer und weitere Komponenten versehen. Die genauen Abmessungen sind dem offiziellen Aufbauguide des ZYC0024-Kits zu entnehmen (Ordner: 1_Get_start/1_Assembly_guide).</text:p>
      <text:h text:style-name="P23" text:outline-level="3"><text:bookmark-start text:name="__RefHeading___Toc5669_2530169349"/>5.2.1 Aufbau und Montage des Chassis<text:bookmark-end text:name="__RefHeading___Toc5669_2530169349"/></text:h>
      <text:p text:style-name="P14">Der Zusammenbau erfolgt in mehreren Schritten:</text:p>
      <text:p text:style-name="Standard"/>
      <text:list text:continue-numbering="true" text:style-name="WWNum2">
        <text:list-item>
          <text:p text:style-name="P18">Schritt 1 – Motoren einbauen: Jeder der vier TT-DC-Motoren wird mit zwei Schrauben in einer Metallhalterung (L-förmiges Bracket) befestigt. Diese Halterungen werden anschließend an den vier Ecken der unteren Acrylplatte verschraubt. Dabei ist zu beachten, dass jeweils zwei Motoren spiegelbildlich montiert werden, damit alle vier Räder in dieselbe physische Richtung drehen, wenn die gleiche elektrische Polung angelegt wird.</text:p>
        </text:list-item>
        <text:list-item>
          <text:p text:style-name="P18">Schritt 2 – Räder aufsetzen: Die Kunststoffräder werden auf die D-förmige Motorwelle geschoben. Die abgeflachte Seite der D-Welle muss mit der entsprechenden Aussparung im Rad fluchten. Danach wird die Radhalterungsschraube festgezogen, um das Rad zu fixieren.</text:p>
        </text:list-item>
        <text:list-item>
          <text:p text:style-name="P18">Schritt 3 – Spacer montieren: Die Abstandshalter (typischerweise M3-Messingspacer, 30 mm Länge) werden an den Bohrungen der unteren Platte befestigt. Sie stellen den Abstand zur oberen Platte sicher.</text:p>
        </text:list-item>
        <text:list-item>
          <text:p text:style-name="P18">Schritt 4 – Obere Platte aufsetzen: Die obere Acrylplatte wird auf die Spacer aufgelegt und mit M3-Schrauben gesichert.</text:p>
        </text:list-item>
        <text:list-item>
          <text:p text:style-name="P18">Schritt 5 – Komponenten platzieren: L298N-Modul, Batteriehalter und ESP32-CAM werden auf der oberen Platte positioniert und mit Schrauben, Klettverschluss oder Kabelbindern befestigt.</text:p>
        </text:list-item>
      </text:list>
      <text:h text:style-name="P24" text:outline-level="2"><text:bookmark-start text:name="__RefHeading___Toc5671_2530169349"/><text:soft-page-break/><text:span text:style-name="T5">5.3 Die TT DC-Getriebemotoren</text:span><text:bookmark-end text:name="__RefHeading___Toc5671_2530169349"/></text:h>
      <text:p text:style-name="P14">Das Fahrzeug verwendet vier baugleiche TT DC-Getriebemotoren. Diese Motoren sind in der Hobby-Robotik weit verbreitet und bieten ein gutes Verhältnis aus Drehmoment, Geschwindigkeit und Preis. Der Begriff TT beschreibt die standardisierte Bauform mit dem charakteristischen gelben Kunststoffgehäuse und der D-förmigen Ausgangswelle.</text:p>
      <text:p text:style-name="Standard"/>
      <text:h text:style-name="P23" text:outline-level="3"><text:bookmark-start text:name="__RefHeading___Toc5673_2530169349"/>5.3.1 Technisches Prinzip des DC-Motors<text:bookmark-end text:name="__RefHeading___Toc5673_2530169349"/></text:h>
      <text:p text:style-name="P14">Ein DC-Motor (Gleichstrommotor) wandelt elektrische Energie in mechanische Rotationsenergie um. Im Inneren des Motors befinden sich zwei Hauptkomponenten: Der Stator (feststehende Permanentmagnete) und der Rotor (drehende Spule, auch Anker genannt). Wenn Gleichstrom durch die Rotowicklung fließt, entsteht ein Magnetfeld, das mit dem Feld der Permanentmagnete wechselwirkt. Diese magnetische Wechselwirkung erzeugt ein Drehmoment, das den Rotor in Bewegung versetzt.</text:p>
      <text:p text:style-name="Standard"/>
      <text:p text:style-name="P14">Die Richtung des Stroms durch die Spule bestimmt die Drehrichtung des Motors. Dreht man die Polung der angelegten Spannung um (Plus und Minus tauschen), dreht sich der Motor in die entgegengesetzte Richtung. Genau dieses Prinzip nutzt die H-Bridge des L298N: Sie kann die Polarität der Spannung an den Motorausgängen elektronisch umschalten, ohne dass Kabel physisch umpgesteckt werden müssen.</text:p>
      <text:p text:style-name="Standard"/>
      <text:p text:style-name="P14">Das Getriebe (Getriebestufe) reduziert die hohe Drehzahl des Elektromotors auf eine für das Fahrzeug nutzbare Geschwindigkeit und erhöht dabei gleichzeitig das Drehmoment. Die genaue Getriebeuntersetzung der im ZYC0024-Kit enthaltenen TT-Motoren ist nicht im Datenblatt spezifiziert. Bei vergleichbaren TT-Motoren liegt sie typischerweise im Bereich 1:48 bis 1:120, wobei niedrigere Untersetzungen höhere Drehzahl aber weniger Drehmoment bedeuten.</text:p>
      <text:p text:style-name="Standard"/>
      <text:h text:style-name="P23" text:outline-level="3"><text:bookmark-start text:name="__RefHeading___Toc5675_2530169349"/>5.3.2 Motoranordnung im 4WD-System<text:bookmark-end text:name="__RefHeading___Toc5675_2530169349"/></text:h>
      <text:p text:style-name="P14">Im VisionBot sind die vier Motoren in zwei Gruppen aufgeteilt: die rechte Motorgruppe (vorne rechts + hinten rechts) und die linke Motorgruppe (vorne links + hinten links). Alle Motoren einer Gruppe werden jeweils gleich angesteuert, da sie immer synchron laufen sollen.</text:p>
      <text:p text:style-name="Standard"/>
      <text:p text:style-name="P14">Wichtig bei der Montage: Da die Motoren auf beiden Seiten des Chassis gespiegelt eingebaut sind, würden zwei identisch angesteuerte Motoren in entgegengesetzter Richtung drehen, wenn man sie an dieselbe Polung anschließt. Beim ZYC0024-Chassis wird dies dadurch kompensiert, dass die Motoren einer Seite elektrisch in derselben Polarität angeschlossen werden, die der mechanischen Spiegelung Rechnung trägt. Alternativ kann dies auch im Code durch das Tauschen von HIGH/LOW-Signalen korrigiert werden – was im VisionBot-Projekt auch gemacht wurde (siehe Kapitel 6.9.5).</text:p>
      <text:p text:style-name="Standard"/>
      <text:h text:style-name="P23" text:outline-level="3"/>
      <text:h text:style-name="P25" text:outline-level="3"><text:bookmark-start text:name="__RefHeading___Toc5677_2530169349"/>5.3.3 Fahrtrichtungen im Detail<text:bookmark-end text:name="__RefHeading___Toc5677_2530169349"/></text:h>
      <text:p text:style-name="P14">Durch die gezielte Ansteuerung der beiden Motorgruppen lassen sich folgende Fahrtrichtungen realisieren:</text:p>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19">Fahrtrichtung</text:p>
            </table:table-cell>
            <table:table-cell table:style-name="Tabelle4.A1" office:value-type="string">
              <text:p text:style-name="P19">Rechte Gruppe (IN1/IN2)</text:p>
            </table:table-cell>
            <table:table-cell table:style-name="Tabelle4.A1" office:value-type="string">
              <text:p text:style-name="P19">Linke Gruppe (IN3/IN4)</text:p>
            </table:table-cell>
            <table:table-cell table:style-name="Tabelle4.A1" office:value-type="string">
              <text:p text:style-name="P19">Ergebnis</text:p>
            </table:table-cell>
          </table:table-row>
        </table:table-header-rows>
        <table:table-row table:style-name="Tabelle4.1">
          <table:table-cell table:style-name="Tabelle4.A2" office:value-type="string">
            <text:p text:style-name="P20">Vorwärts</text:p>
          </table:table-cell>
          <table:table-cell table:style-name="Tabelle4.A2" office:value-type="string">
            <text:p text:style-name="P20">Vorwärts (IN2=HIGH)</text:p>
          </table:table-cell>
          <table:table-cell table:style-name="Tabelle4.A2" office:value-type="string">
            <text:p text:style-name="P20">Vorwärts (IN4=HIGH)</text:p>
          </table:table-cell>
          <table:table-cell table:style-name="Tabelle4.A2" office:value-type="string">
            <text:p text:style-name="P20">Beide Seiten drehen gleichsinnig vorwärts</text:p>
          </table:table-cell>
        </table:table-row>
        <table:table-row table:style-name="Tabelle4.1">
          <table:table-cell table:style-name="Tabelle4.A2" office:value-type="string">
            <text:p text:style-name="P20">Rückwärts</text:p>
          </table:table-cell>
          <table:table-cell table:style-name="Tabelle4.A2" office:value-type="string">
            <text:p text:style-name="P20">Rückwärts (IN1=HIGH)</text:p>
          </table:table-cell>
          <table:table-cell table:style-name="Tabelle4.A2" office:value-type="string">
            <text:p text:style-name="P20">Rückwärts (IN3=HIGH)</text:p>
          </table:table-cell>
          <table:table-cell table:style-name="Tabelle4.A2" office:value-type="string">
            <text:p text:style-name="P20">Beide Seiten drehen gleichsinnig rückwärts</text:p>
          </table:table-cell>
        </table:table-row>
        <table:table-row table:style-name="Tabelle4.1">
          <table:table-cell table:style-name="Tabelle4.A2" office:value-type="string">
            <text:p text:style-name="P20">Links (Tank)</text:p>
          </table:table-cell>
          <table:table-cell table:style-name="Tabelle4.A2" office:value-type="string">
            <text:p text:style-name="P20">Vorwärts (IN2=HIGH)</text:p>
          </table:table-cell>
          <table:table-cell table:style-name="Tabelle4.A2" office:value-type="string">
            <text:p text:style-name="P20">Rückwärts (IN3=HIGH)</text:p>
          </table:table-cell>
          <table:table-cell table:style-name="Tabelle4.A2" office:value-type="string">
            <text:p text:style-name="P20">Rechte Seite vor, linke zurück: dreht links auf der Stelle</text:p>
          </table:table-cell>
        </table:table-row>
        <table:table-row table:style-name="Tabelle4.1">
          <table:table-cell table:style-name="Tabelle4.A2" office:value-type="string">
            <text:p text:style-name="P20">Rechts (Tank)</text:p>
          </table:table-cell>
          <table:table-cell table:style-name="Tabelle4.A2" office:value-type="string">
            <text:p text:style-name="P20">Rückwärts (IN1=HIGH)</text:p>
          </table:table-cell>
          <table:table-cell table:style-name="Tabelle4.A2" office:value-type="string">
            <text:p text:style-name="P20">Vorwärts (IN4=HIGH)</text:p>
          </table:table-cell>
          <table:table-cell table:style-name="Tabelle4.A2" office:value-type="string">
            <text:p text:style-name="P20">Linke Seite vor, rechte zurück: dreht rechts auf der Stelle</text:p>
          </table:table-cell>
        </table:table-row>
        <table:table-row table:style-name="Tabelle4.1">
          <table:table-cell table:style-name="Tabelle4.A2" office:value-type="string">
            <text:p text:style-name="P20">Vorwärts-Links (Kurve)</text:p>
          </table:table-cell>
          <table:table-cell table:style-name="Tabelle4.A2" office:value-type="string">
            <text:p text:style-name="P20">Vorwärts (IN2=HIGH)</text:p>
          </table:table-cell>
          <table:table-cell table:style-name="Tabelle4.A2" office:value-type="string">
            <text:p text:style-name="P20">Stop (alle LOW)</text:p>
          </table:table-cell>
          <table:table-cell table:style-name="Tabelle4.A2" office:value-type="string">
            <text:p text:style-name="P20">Rechte Seite treibt, linke l<text:span text:style-name="T6">äu</text:span>ft frei: sanfte Linkskurve</text:p>
          </table:table-cell>
        </table:table-row>
        <table:table-row table:style-name="Tabelle4.1">
          <table:table-cell table:style-name="Tabelle4.A2" office:value-type="string">
            <text:p text:style-name="P20">Vorwärts-Rechts (Kurve)</text:p>
          </table:table-cell>
          <table:table-cell table:style-name="Tabelle4.A2" office:value-type="string">
            <text:p text:style-name="P20">Stop (alle LOW)</text:p>
          </table:table-cell>
          <table:table-cell table:style-name="Tabelle4.A2" office:value-type="string">
            <text:p text:style-name="P20">Vorwärts (IN4=HIGH)</text:p>
          </table:table-cell>
          <table:table-cell table:style-name="Tabelle4.A2" office:value-type="string">
            <text:p text:style-name="P20">Linke Seite treibt, rechte l<text:span text:style-name="T6">äu</text:span>ft frei: sanfte Rechtskurve</text:p>
          </table:table-cell>
        </table:table-row>
        <table:table-row table:style-name="Tabelle4.1">
          <table:table-cell table:style-name="Tabelle4.A2" office:value-type="string">
            <text:p text:style-name="P20">Rückwärts-Links</text:p>
          </table:table-cell>
          <table:table-cell table:style-name="Tabelle4.A2" office:value-type="string">
            <text:p text:style-name="P20">Rückwärts (IN1=HIGH)</text:p>
          </table:table-cell>
          <table:table-cell table:style-name="Tabelle4.A2" office:value-type="string">
            <text:p text:style-name="P20">Stop (alle LOW)</text:p>
          </table:table-cell>
          <table:table-cell table:style-name="Tabelle4.A2" office:value-type="string">
            <text:p text:style-name="P20">Rechte Seite rückwärts, linke frei</text:p>
          </table:table-cell>
        </table:table-row>
        <table:table-row table:style-name="Tabelle4.1">
          <table:table-cell table:style-name="Tabelle4.A2" office:value-type="string">
            <text:p text:style-name="P20">Rückwärts-Rechts</text:p>
          </table:table-cell>
          <table:table-cell table:style-name="Tabelle4.A2" office:value-type="string">
            <text:p text:style-name="P20">Stop (alle LOW)</text:p>
          </table:table-cell>
          <table:table-cell table:style-name="Tabelle4.A2" office:value-type="string">
            <text:p text:style-name="P20">Rückwärts (IN3=HIGH)</text:p>
          </table:table-cell>
          <table:table-cell table:style-name="Tabelle4.A2" office:value-type="string">
            <text:p text:style-name="P20">Linke Seite rückwärts, rechte frei</text:p>
          </table:table-cell>
        </table:table-row>
        <table:table-row table:style-name="Tabelle4.1">
          <table:table-cell table:style-name="Tabelle4.A2" office:value-type="string">
            <text:p text:style-name="P20">Stopp</text:p>
          </table:table-cell>
          <table:table-cell table:style-name="Tabelle4.A2" office:value-type="string">
            <text:p text:style-name="P20">Stop (alle LOW)</text:p>
          </table:table-cell>
          <table:table-cell table:style-name="Tabelle4.A2" office:value-type="string">
            <text:p text:style-name="P20">Stop (alle LOW)</text:p>
          </table:table-cell>
          <table:table-cell table:style-name="Tabelle4.A2" office:value-type="string">
            <text:p text:style-name="P20">Alle Motoren stromlos, High-Impedanz</text:p>
          </table:table-cell>
        </table:table-row>
      </table:table>
      <text:p text:style-name="Standard"/>
      <text:p text:style-name="P14">Die Tank-Lenkung (reines Links/Rechts) dreht das Fahrzeug praktisch auf der Stelle um seinen Mittelpunkt. Dies ist bei einem 4WD-Fahrzeug ohne lenkbare Vorderachse die einzige Möglichkeit, die Richtung zu <text:span text:style-name="T4">ä</text:span>ndern. Die Diagonalbewegungen (Vorwärts-Links usw.) erzeugen eine weichere Kurve, weil nur eine Motorseite aktiv ist, während die andere frei mitläuft.</text:p>
      <text:p text:style-name="Standard"/>
      <text:h text:style-name="P16" text:outline-level="2"><text:bookmark-start text:name="__RefHeading___Toc5679_2530169349"/>5.4 Der L298N H-Bridge Motortreiber<text:bookmark-end text:name="__RefHeading___Toc5679_2530169349"/></text:h>
      <text:p text:style-name="P14">Der L298N ist das Herzstück der Motorsteuerung. Er fungiert als elektronischer Schalter zwischen dem ESP32-CAM (der nur winzige Steuerströme liefern kann) und den DC-Motoren (die deutlich höhere Ströme benötigen).</text:p>
      <text:p text:style-name="Standard"/>
      <text:h text:style-name="P23" text:outline-level="3"><text:bookmark-start text:name="__RefHeading___Toc5681_2530169349"/><text:soft-page-break/>5.4.1 Warum ein Motortreiber notwendig ist<text:bookmark-end text:name="__RefHeading___Toc5681_2530169349"/></text:h>
      <text:p text:style-name="P14">Ein Mikrocontroller wie der ESP32 liefert an seinen GPIO-Pins lediglich 3,3 V Logikspannung und kann maximal etwa 12 mA pro Pin bereitstellen. Ein DC-Motor benötigt dagegen typischerweise 200-500 mA bei 3-6 V Betriebsspannung. Ein direkter Anschluss eines Motors an einen GPIO-Pin würde den ESP32 sofort zerstören. Der L298N übernimmt deshalb die Aufgabe, die schwachen Steuersignale des Mikrocontrollers in leistungsstarke Motorsignale umzusetzen.</text:p>
      <text:p text:style-name="Standard"/>
      <table:table table:name="Tabelle5" table:style-name="Tabelle5">
        <table:table-column table:style-name="Tabelle5.A"/>
        <table:table-column table:style-name="Tabelle5.B"/>
        <table:table-header-rows>
          <table:table-row table:style-name="Tabelle5.1">
            <table:table-cell table:style-name="Tabelle5.A1" office:value-type="string">
              <text:p text:style-name="P19">Parameter</text:p>
            </table:table-cell>
            <table:table-cell table:style-name="Tabelle5.A1" office:value-type="string">
              <text:p text:style-name="P19">Wert (Herstellerangabe)</text:p>
            </table:table-cell>
          </table:table-row>
        </table:table-header-rows>
        <table:table-row table:style-name="Tabelle5.1">
          <table:table-cell table:style-name="Tabelle5.A2" office:value-type="string">
            <text:p text:style-name="P20">Treiber-Chip</text:p>
          </table:table-cell>
          <table:table-cell table:style-name="Tabelle5.A2" office:value-type="string">
            <text:p text:style-name="P20">L298N Doppel-H-Bridge DC Motor Treiber</text:p>
          </table:table-cell>
        </table:table-row>
        <table:table-row table:style-name="Tabelle5.1">
          <table:table-cell table:style-name="Tabelle5.A2" office:value-type="string">
            <text:p text:style-name="P20">Motorversorgung Vs (direkt)</text:p>
          </table:table-cell>
          <table:table-cell table:style-name="Tabelle5.A2" office:value-type="string">
            <text:p text:style-name="P20">+5V bis +35V</text:p>
          </table:table-cell>
        </table:table-row>
        <table:table-row table:style-name="Tabelle5.1">
          <table:table-cell table:style-name="Tabelle5.A2" office:value-type="string">
            <text:p text:style-name="P20">Motorversorgung Vs (mit Board-Versorgung)</text:p>
          </table:table-cell>
          <table:table-cell table:style-name="Tabelle5.A2" office:value-type="string">
            <text:p text:style-name="P20">+7V bis +35V</text:p>
          </table:table-cell>
        </table:table-row>
        <table:table-row table:style-name="Tabelle5.1">
          <table:table-cell table:style-name="Tabelle5.A2" office:value-type="string">
            <text:p text:style-name="P20">Peak-Strom Motorkanal (Io)</text:p>
          </table:table-cell>
          <table:table-cell table:style-name="Tabelle5.A2" office:value-type="string">
            <text:p text:style-name="P20">2A pro Kanal</text:p>
          </table:table-cell>
        </table:table-row>
        <table:table-row table:style-name="Tabelle5.1">
          <table:table-cell table:style-name="Tabelle5.A2" office:value-type="string">
            <text:p text:style-name="P20">Logikversorgung Vss</text:p>
          </table:table-cell>
          <table:table-cell table:style-name="Tabelle5.A2" office:value-type="string">
            <text:p text:style-name="P20">+5V bis +7V</text:p>
          </table:table-cell>
        </table:table-row>
        <table:table-row table:style-name="Tabelle5.1">
          <table:table-cell table:style-name="Tabelle5.A2" office:value-type="string">
            <text:p text:style-name="P20">Logik-Arbeitsstrombereich</text:p>
          </table:table-cell>
          <table:table-cell table:style-name="Tabelle5.A2" office:value-type="string">
            <text:p text:style-name="P20">0 - 36 mA</text:p>
          </table:table-cell>
        </table:table-row>
        <table:table-row table:style-name="Tabelle5.1">
          <table:table-cell table:style-name="Tabelle5.A2" office:value-type="string">
            <text:p text:style-name="P20">Steuersignal LOW-Pegel</text:p>
          </table:table-cell>
          <table:table-cell table:style-name="Tabelle5.A2" office:value-type="string">
            <text:p text:style-name="P20">-0,3V bis 1,5V</text:p>
          </table:table-cell>
        </table:table-row>
        <table:table-row table:style-name="Tabelle5.1">
          <table:table-cell table:style-name="Tabelle5.A2" office:value-type="string">
            <text:p text:style-name="P20">Steuersignal HIGH-Pegel</text:p>
          </table:table-cell>
          <table:table-cell table:style-name="Tabelle5.A2" office:value-type="string">
            <text:p text:style-name="P20">2,3V bis Vss</text:p>
          </table:table-cell>
        </table:table-row>
        <table:table-row table:style-name="Tabelle5.1">
          <table:table-cell table:style-name="Tabelle5.A2" office:value-type="string">
            <text:p text:style-name="P20">Enable-Signal LOW (inaktiv)</text:p>
          </table:table-cell>
          <table:table-cell table:style-name="Tabelle5.A2" office:value-type="string">
            <text:p text:style-name="P20">-0,3V bis 1,5V</text:p>
          </table:table-cell>
        </table:table-row>
        <table:table-row table:style-name="Tabelle5.1">
          <table:table-cell table:style-name="Tabelle5.A2" office:value-type="string">
            <text:p text:style-name="P20">Enable-Signal HIGH (aktiv)</text:p>
          </table:table-cell>
          <table:table-cell table:style-name="Tabelle5.A2" office:value-type="string">
            <text:p text:style-name="P20">2,3V bis Vss</text:p>
          </table:table-cell>
        </table:table-row>
        <table:table-row table:style-name="Tabelle5.1">
          <table:table-cell table:style-name="Tabelle5.A2" office:value-type="string">
            <text:p text:style-name="P20">Maximale Verlustleistung</text:p>
          </table:table-cell>
          <table:table-cell table:style-name="Tabelle5.A2" office:value-type="string">
            <text:p text:style-name="P20">20 W (bei T=75 Grad)</text:p>
          </table:table-cell>
        </table:table-row>
      </table:table>
      <text:p text:style-name="Standard"/>
      <text:h text:style-name="P23" text:outline-level="3"><text:bookmark-start text:name="__RefHeading___Toc5683_2530169349"/>5.4.2 Das H-Bridge-Prinzip<text:bookmark-end text:name="__RefHeading___Toc5683_2530169349"/></text:h>
      <text:p text:style-name="P14">Das Kernprinzip des L298N ist die H-Bridge (H-Brücke). Dieses Schaltungskonzept hat seinen Namen von der visuellen Ähnlichkeit mit dem Buchstaben H: Vier elektronische Schalter (im L298N sind dies bipolare Transistoren) sind so angeordnet, dass der Motor im Querstück des H hängt. Durch gezieltes Schliessen von jeweils zwei der vier Schalter kann die Stromrichtung durch den Motor umgekehrt werden.</text:p>
      <text:p text:style-name="Standard"/>
      <text:p text:style-name="P14">Konkret funktioniert das so: Werden der linke obere Schalter (S1) und der rechte untere Schalter (S4) geschlossen, fliesst Strom von links nach rechts durch den Motor – er dreht in Richtung A. Werden stattdessen der rechte obere Schalter (S2) und der linke untere Schalter (S3) geschlossen, fliesst der Strom von rechts nach links – der Motor dreht in Richtung B. Sind alle Schalter offen, fliesst kein Strom und der Motor läuft frei aus (Freilauf).</text:p>
      <text:p text:style-name="P14">Der L298N enthält zwei vollständige H-Bridge-Schaltungen (Kanal A und Kanal B), kann also gleichzeitig zwei unabhängige DC-Motoren in beide Richtungen ansteuern. Im VisionBot werden beide Kanäle für je eine Motorseite (links/rechts) genutzt, wobei die beiden Motoren einer Seite parallel an denselben Ausgang angeschlossen sind.</text:p>
      <text:h text:style-name="P26" text:outline-level="3"><text:bookmark-start text:name="__RefHeading___Toc5685_2530169349"/><text:soft-page-break/><text:span text:style-name="T7">5.4.3 Pinbelegung und Funktion des L298N-Moduls</text:span><text:bookmark-end text:name="__RefHeading___Toc5685_2530169349"/></text:h>
      <table:table table:name="Tabelle6" table:style-name="Tabelle6">
        <table:table-column table:style-name="Tabelle6.A"/>
        <table:table-column table:style-name="Tabelle6.B"/>
        <table:table-column table:style-name="Tabelle6.C"/>
        <table:table-header-rows>
          <table:table-row table:style-name="Tabelle6.1">
            <table:table-cell table:style-name="Tabelle6.A1" office:value-type="string">
              <text:p text:style-name="P19">Pin / Anschluss</text:p>
            </table:table-cell>
            <table:table-cell table:style-name="Tabelle6.A1" office:value-type="string">
              <text:p text:style-name="P19">Bezeichnung</text:p>
            </table:table-cell>
            <table:table-cell table:style-name="Tabelle6.A1" office:value-type="string">
              <text:p text:style-name="P19">Funktion im VisionBot</text:p>
            </table:table-cell>
          </table:table-row>
        </table:table-header-rows>
        <table:table-row table:style-name="Tabelle6.1">
          <table:table-cell table:style-name="Tabelle6.A2" office:value-type="string">
            <text:p text:style-name="P20">IN1</text:p>
          </table:table-cell>
          <table:table-cell table:style-name="Tabelle6.A2" office:value-type="string">
            <text:p text:style-name="P20">Eingang Kanal A, Signal 1</text:p>
          </table:table-cell>
          <table:table-cell table:style-name="Tabelle6.A2" office:value-type="string">
            <text:p text:style-name="P20">GPIO 2 (ESP32): Rechte Motoren vorwärts</text:p>
          </table:table-cell>
        </table:table-row>
        <table:table-row table:style-name="Tabelle6.1">
          <table:table-cell table:style-name="Tabelle6.A2" office:value-type="string">
            <text:p text:style-name="P20">IN2</text:p>
          </table:table-cell>
          <table:table-cell table:style-name="Tabelle6.A2" office:value-type="string">
            <text:p text:style-name="P20">Eingang Kanal A, Signal 2</text:p>
          </table:table-cell>
          <table:table-cell table:style-name="Tabelle6.A2" office:value-type="string">
            <text:p text:style-name="P20">GPIO 14 (ESP32): Rechte Motoren rückwärts</text:p>
          </table:table-cell>
        </table:table-row>
        <table:table-row table:style-name="Tabelle6.1">
          <table:table-cell table:style-name="Tabelle6.A2" office:value-type="string">
            <text:p text:style-name="P20">IN3</text:p>
          </table:table-cell>
          <table:table-cell table:style-name="Tabelle6.A2" office:value-type="string">
            <text:p text:style-name="P20">Eingang Kanal B, Signal 1</text:p>
          </table:table-cell>
          <table:table-cell table:style-name="Tabelle6.A2" office:value-type="string">
            <text:p text:style-name="P20">GPIO 15 (ESP32): Linke Motoren vorwärts</text:p>
          </table:table-cell>
        </table:table-row>
        <table:table-row table:style-name="Tabelle6.1">
          <table:table-cell table:style-name="Tabelle6.A2" office:value-type="string">
            <text:p text:style-name="P20">IN4</text:p>
          </table:table-cell>
          <table:table-cell table:style-name="Tabelle6.A2" office:value-type="string">
            <text:p text:style-name="P20">Eingang Kanal B, Signal 2</text:p>
          </table:table-cell>
          <table:table-cell table:style-name="Tabelle6.A2" office:value-type="string">
            <text:p text:style-name="P20">GPIO 13 (ESP32): Linke Motoren rückwärts</text:p>
          </table:table-cell>
        </table:table-row>
        <table:table-row table:style-name="Tabelle6.1">
          <table:table-cell table:style-name="Tabelle6.A2" office:value-type="string">
            <text:p text:style-name="P20">ENA</text:p>
          </table:table-cell>
          <table:table-cell table:style-name="Tabelle6.A2" office:value-type="string">
            <text:p text:style-name="P20">Enable Kanal A (Jumper)</text:p>
          </table:table-cell>
          <table:table-cell table:style-name="Tabelle6.A2" office:value-type="string">
            <text:p text:style-name="P20">Dauerhaft aktiviert (Jumper gesteckt = Vollgas)</text:p>
          </table:table-cell>
        </table:table-row>
        <table:table-row table:style-name="Tabelle6.1">
          <table:table-cell table:style-name="Tabelle6.A2" office:value-type="string">
            <text:p text:style-name="P20">ENB</text:p>
          </table:table-cell>
          <table:table-cell table:style-name="Tabelle6.A2" office:value-type="string">
            <text:p text:style-name="P20">Enable Kanal B (Jumper)</text:p>
          </table:table-cell>
          <table:table-cell table:style-name="Tabelle6.A2" office:value-type="string">
            <text:p text:style-name="P20">Dauerhaft aktiviert (Jumper gesteckt = Vollgas)</text:p>
          </table:table-cell>
        </table:table-row>
        <table:table-row table:style-name="Tabelle6.1">
          <table:table-cell table:style-name="Tabelle6.A2" office:value-type="string">
            <text:p text:style-name="P20">OUT1 / OUT2</text:p>
          </table:table-cell>
          <table:table-cell table:style-name="Tabelle6.A2" office:value-type="string">
            <text:p text:style-name="P20">Motorausgang Kanal A</text:p>
          </table:table-cell>
          <table:table-cell table:style-name="Tabelle6.A2" office:value-type="string">
            <text:p text:style-name="P20">Rechte Motorgruppe (vorne + hinten)</text:p>
          </table:table-cell>
        </table:table-row>
        <table:table-row table:style-name="Tabelle6.1">
          <table:table-cell table:style-name="Tabelle6.A2" office:value-type="string">
            <text:p text:style-name="P20">OUT3 / OUT4</text:p>
          </table:table-cell>
          <table:table-cell table:style-name="Tabelle6.A2" office:value-type="string">
            <text:p text:style-name="P20">Motorausgang Kanal B</text:p>
          </table:table-cell>
          <table:table-cell table:style-name="Tabelle6.A2" office:value-type="string">
            <text:p text:style-name="P20">Linke Motorgruppe (vorne + hinten)</text:p>
          </table:table-cell>
        </table:table-row>
        <table:table-row table:style-name="Tabelle6.1">
          <table:table-cell table:style-name="Tabelle6.A2" office:value-type="string">
            <text:p text:style-name="P20">VIN (Motorversorgung)</text:p>
          </table:table-cell>
          <table:table-cell table:style-name="Tabelle6.A2" office:value-type="string">
            <text:p text:style-name="P20">Motorversorgung</text:p>
          </table:table-cell>
          <table:table-cell table:style-name="Tabelle6.A2" office:value-type="string">
            <text:p text:style-name="P20">Akkuspannung: ca. 7,4V von 2x 18650</text:p>
          </table:table-cell>
        </table:table-row>
        <table:table-row table:style-name="Tabelle6.1">
          <table:table-cell table:style-name="Tabelle6.A2" office:value-type="string">
            <text:p text:style-name="P20">GND</text:p>
          </table:table-cell>
          <table:table-cell table:style-name="Tabelle6.A2" office:value-type="string">
            <text:p text:style-name="P20">Masse</text:p>
          </table:table-cell>
          <table:table-cell table:style-name="Tabelle6.A2" office:value-type="string">
            <text:p text:style-name="P20">Gemeinsame Masse mit ESP32-CAM</text:p>
          </table:table-cell>
        </table:table-row>
        <table:table-row table:style-name="Tabelle6.1">
          <table:table-cell table:style-name="Tabelle6.A2" office:value-type="string">
            <text:p text:style-name="P20">5V-Ausgang</text:p>
          </table:table-cell>
          <table:table-cell table:style-name="Tabelle6.A2" office:value-type="string">
            <text:p text:style-name="P20">Logikversorgung</text:p>
          </table:table-cell>
          <table:table-cell table:style-name="Tabelle6.A2" office:value-type="string">
            <text:p text:style-name="P20">Intern: 78M05 Spannungsregler liefert 5V</text:p>
          </table:table-cell>
        </table:table-row>
      </table:table>
      <text:p text:style-name="Standard"/>
      <text:p text:style-name="P14">Laut Herstellerdatenblatt (About this kit-EN.pdf) unterstützt der L298N-Motortreiber eine Motorversorgungsspannung (Vs) von +5V bis +35V. Wird das Board selbst über den VIN-Anschluss versorgt (wie im VisionBot), benötigt er mindestens +7V. Die Peakstrombelastbarkeit pro Kanal bet<text:span text:style-name="T4">rä</text:span>gt 2A. Die Logikversorgung (Vss) liegt bei +5V bis +7V, der Logikarbeitsstrombereich bei 0-36 mA. Die maximale Verlustleistung betr<text:span text:style-name="T4">ä</text:span>gt 20 W (bei 75 Grad Celsius). Der interne 78M05-Spannungsregler erzeugt aus der Akkuspannung eine stabile 5V-Logikspannung. Der L298N hat einen internen Spannungsabfall von ca. 2V, d.h. bei 7,4V Akkuspannung erhalten die Motoren effektiv nur ca. 5,4V.</text:p>
      <text:p text:style-name="Standard"/>
      <text:h text:style-name="P23" text:outline-level="3"><text:bookmark-start text:name="__RefHeading___Toc5687_2530169349"/>5.4.4 Steuerlogik: HIGH/LOW an IN1-IN4<text:bookmark-end text:name="__RefHeading___Toc5687_2530169349"/></text:h>
      <text:p text:style-name="P14">Die Drehrichtung jeder Motorgruppe wird durch die Kombination der Signale an den IN-Pins bestimmt. Die folgende Logik gilt für jeden der beiden Kan<text:span text:style-name="T4">ä</text:span>le:</text:p>
      <text:p text:style-name="Standard"/>
      <table:table table:name="Tabelle7" table:style-name="Tabelle7">
        <table:table-column table:style-name="Tabelle7.A"/>
        <table:table-column table:style-name="Tabelle7.B"/>
        <table:table-column table:style-name="Tabelle7.C"/>
        <table:table-header-rows>
          <text:soft-page-break/>
          <table:table-row table:style-name="Tabelle7.1">
            <table:table-cell table:style-name="Tabelle7.A1" office:value-type="string">
              <text:p text:style-name="P19">IN-Pin A (z.B. IN1)</text:p>
            </table:table-cell>
            <table:table-cell table:style-name="Tabelle7.A1" office:value-type="string">
              <text:p text:style-name="P19">IN-Pin B (z.B. IN2)</text:p>
            </table:table-cell>
            <table:table-cell table:style-name="Tabelle7.A1" office:value-type="string">
              <text:p text:style-name="P19">Motorverhalten</text:p>
            </table:table-cell>
          </table:table-row>
        </table:table-header-rows>
        <table:table-row table:style-name="Tabelle7.1">
          <table:table-cell table:style-name="Tabelle7.A2" office:value-type="string">
            <text:p text:style-name="P20">LOW (0V)</text:p>
          </table:table-cell>
          <table:table-cell table:style-name="Tabelle7.A2" office:value-type="string">
            <text:p text:style-name="P20">HIGH (3,3V)</text:p>
          </table:table-cell>
          <table:table-cell table:style-name="Tabelle7.A2" office:value-type="string">
            <text:p text:style-name="P20">Motor dreht Richtung 'Vorwärts'</text:p>
          </table:table-cell>
        </table:table-row>
        <table:table-row table:style-name="Tabelle7.1">
          <table:table-cell table:style-name="Tabelle7.A2" office:value-type="string">
            <text:p text:style-name="P20">HIGH (3,3V)</text:p>
          </table:table-cell>
          <table:table-cell table:style-name="Tabelle7.A2" office:value-type="string">
            <text:p text:style-name="P20">LOW (0V)</text:p>
          </table:table-cell>
          <table:table-cell table:style-name="Tabelle7.A2" office:value-type="string">
            <text:p text:style-name="P20">Motor dreht Richtung 'Rückwärts'</text:p>
          </table:table-cell>
        </table:table-row>
        <table:table-row table:style-name="Tabelle7.1">
          <table:table-cell table:style-name="Tabelle7.A2" office:value-type="string">
            <text:p text:style-name="P20">LOW</text:p>
          </table:table-cell>
          <table:table-cell table:style-name="Tabelle7.A2" office:value-type="string">
            <text:p text:style-name="P20">LOW</text:p>
          </table:table-cell>
          <table:table-cell table:style-name="Tabelle7.A2" office:value-type="string">
            <text:p text:style-name="P20">Motor stoppt (High-Impedanz, l<text:span text:style-name="T8">äu</text:span>ft aus)</text:p>
          </table:table-cell>
        </table:table-row>
        <table:table-row table:style-name="Tabelle7.1">
          <table:table-cell table:style-name="Tabelle7.A2" office:value-type="string">
            <text:p text:style-name="P20">HIGH</text:p>
          </table:table-cell>
          <table:table-cell table:style-name="Tabelle7.A2" office:value-type="string">
            <text:p text:style-name="P20">HIGH</text:p>
          </table:table-cell>
          <table:table-cell table:style-name="Tabelle7.A2" office:value-type="string">
            <text:p text:style-name="P20">Motor stoppt (Kurzschluss-Bremse, hält sofort)</text:p>
          </table:table-cell>
        </table:table-row>
      </table:table>
      <text:p text:style-name="Standard"/>
      <text:p text:style-name="P14">Im VisionBot-Code wird für den Stopp-Befehl die High-Impedanz-Variante verwendet (alle LOW), die einen sanften Auslauf der Motoren ermöglicht, statt einer harten Bremsung.</text:p>
      <text:p text:style-name="Standard"/>
      <text:h text:style-name="P16" text:outline-level="2"><text:bookmark-start text:name="__RefHeading___Toc5689_2530169349"/>5.5 ESP32-CAM (AI-Thinker) als Hauptcontroller<text:bookmark-end text:name="__RefHeading___Toc5689_2530169349"/></text:h>
      <text:p text:style-name="P14">Der ESP32-CAM ist das Gehirn des VisionBot. Er vereint auf einer einzigen kleinen Platine (27 x 40,5 x 4,5 mm, Gewicht 10 g laut Herstellerdatenblatt) einen leistungsfähigen 32-Bit-Doppelkernprozessor, integriertes WLAN und Bluetooth, 32 Mbit (4 MB) SPI-Flash-Speicher, 520 KB internes SRAM plus 4 MB externes PSRAM sowie ein OV2640-Kameramodul.</text:p>
      <text:p text:style-name="Standard"/>
      <text:p text:style-name="P14">Auf dem Modul befindet sich ein ESP32-S-Chip, der auf zwei Xtensa LX6-Prozessorkernen mit bis zu 240 MHz Taktfrequenz läuft. Dies ist wichtig für das VisionBot, da gleichzeitig der Webserver, die Bildaufnahme, die JPEG-Kompression und die Motorsteuerung bearbeitet werden müssen.</text:p>
      <text:p text:style-name="Standard"/>
      <text:h text:style-name="P23" text:outline-level="3"><text:bookmark-start text:name="__RefHeading___Toc5691_2530169349"/>5.5.1 Einschränkungen der GPIO-Pins<text:bookmark-end text:name="__RefHeading___Toc5691_2530169349"/></text:h>
      <text:p text:style-name="P14">Eine besondere Herausforderung beim ESP32-CAM ist die stark eingeschr<text:span text:style-name="T4">ä</text:span>nkte Verfügbarkeit freier GPIO-Pins. Von den physisch vorhandenen Anschlüssen sind nahezu alle durch die Kameraschnittstelle (OV2640) belegt. Das 8-Bit-Parallel-Daten-Interface der Kamera allein beansprucht 8 GPIO-Pins (Y2-Y9), dazu kommen Takt-, Synchronisierungs- und Konfigurationspins. Effektiv verbleiben für externe Peripherie (also für den L298N-Anschluss) nur fünf verwendbare GPIO-Pins: GPIO 2, 12, 13, 14 und 15.</text:p>
      <text:p text:style-name="Standard"/>
      <text:p text:style-name="P14">Im VisionBot wurden GPIO 2, 13, 14 und 15 für die vier IN-Pins des L298N verwendet. GPIO 12 wurde bewusst nicht genutzt, da dieser Pin während des Bootens einen bestimmten Pegel benötigt (er beeinflusst den Flash-Spannungsmodus) und bei falscher Beschaltung den Start des ESP32 verhindern kann. Wichtig: Laut Herstellerdokumentation sind GPIO 14 (CLK), GPIO 15 (CMD), GPIO 2 (Data 0), GPIO 4 (Data 1 / onboard LED), GPIO 12 (Data 2) und GPIO 13 (Data 3) intern mit dem microSD-Kartenslot verbunden. Im VisionBot-Projekt wird keine SD-Karte verwendet, daher können GPIO 2, 13, 14 und 15 für die Motorsteuerung genutzt werden. Eine gleichzeitige Nutzung von SD-Karte und Motorsteuerung w<text:span text:style-name="T4">ä</text:span>re mit dieser Pin-Belegung jedoch nicht möglich.</text:p>
      <text:p text:style-name="Standard"/>
      <text:h text:style-name="P23" text:outline-level="3"><text:bookmark-start text:name="__RefHeading___Toc5693_2530169349"/><text:soft-page-break/>5.5.2 Die OV2640-Kamera<text:bookmark-end text:name="__RefHeading___Toc5693_2530169349"/></text:h>
      <text:p text:style-name="P14">Das im ESP32-CAM integrierte OV2640 ist ein 2-Megapixel-CMOS-Bildsensor von OmniVision. Er unterstützt verschiedene Auflösungen von QQVGA (160x120 Pixel) bis zu 1600x1200 Pixel (UXGA) sowie das direkte Ausgeben von JPEG-komprimierten Bilddaten. Die Verbindung zum ESP32-Chip erfolgt über einen 8-Bit-Parallelbus, der deutlich mehr Datendurchsatz ermöglicht als serielle Schnittstellen.</text:p>
      <text:p text:style-name="Standard"/>
      <text:p text:style-name="P14">Für das VisionBot wurde die QQVGA-Auflösung (160x120 Pixel) gewählt, da sie die geringste Prozessorlast verursacht und schnelle Bildwiederholraten bei stabiler WLAN-Übertragung ermöglicht. Eine höhere Auflösung (z.B. QVGA mit 320x240) f<text:span text:style-name="T6">ü</text:span>hrt beim ESP32-CAM zu spürbarer Verzögerung in der Motorsteuerung, weil die Bildverarbeitung zu viel CPU-Zeit beansprucht.</text:p>
      <text:p text:style-name="Standard"/>
      <text:h text:style-name="P16" text:outline-level="2"><text:bookmark-start text:name="__RefHeading___Toc5695_2530169349"/>5.6 Stromversorgung: 18650-Lithium-Akkus<text:bookmark-end text:name="__RefHeading___Toc5695_2530169349"/></text:h>
      <text:p text:style-name="P14">Das VisionBot wird von zwei 18650-Lithium-Ionen-Akkus in Reihenschaltung mit Strom versorgt. Die Bezeichnung 18650 gibt die physische Dimension an: 18 mm Durchmesser und 65 mm L<text:span text:style-name="T4">ä</text:span>nge. Jeder Akku liefert eine Nennspannung von 3,7V. Die genaue Kapazit<text:span text:style-name="T4">ä</text:span>t hängt vom verwendeten Akku-Modell ab; im Projekt wurden Akkus mit ca. 2200 mAh eingesetzt.</text:p>
      <text:p text:style-name="Standard"/>
      <text:p text:style-name="P14">Durch die Reihenschaltung addieren sich die Spannungen: 2 x 3,7V = 7,4V Gesamtspannung (bei geladenem Zustand bis zu 8,4V). Diese Spannung versorgt den L298N-Motortreiber direkt. Der L298N erzeugt daraus intern die 5V-Logikspannung für seinen Betrieb. Der ESP32-CAM wird über einen eigenen 5V-Anschluss versorgt, der ebenfalls vom L298N-Modul bereitgestellt werden kann.</text:p>
      <text:p text:style-name="Standard"/>
      <text:p text:style-name="P27"><text:span text:style-name="T9">Laut Herstellerdatenblatt betr</text:span><text:span text:style-name="T10">ä</text:span><text:span text:style-name="T9">gt der Stromverbrauch des ESP32-CAM allein: 180 mA bei 5V (Flash deaktiviert) bzw. 310 mA bei 5V (Flash auf Maximum). Im Tiefschlaf kann er auf unter 6 mA sinken. Der Hersteller empfiehlt eine stabile 5V/2A-Stromversorgung. Der Gesamtstromverbrauch des VisionBot (ESP32-CAM + 4 Motoren über L298N) hängt stark von der Fahrintensit</text:span><text:span text:style-name="T10">ä</text:span><text:span text:style-name="T9">t ab. Exakte Messungen wurden im Rahmen dieses Projekts nicht durchgef</text:span><text:span text:style-name="T11">ü</text:span><text:span text:style-name="T9">hrt.</text:span></text:p>
      <text:h text:style-name="P16" text:outline-level="2"><text:bookmark-start text:name="__RefHeading___Toc5697_2530169349"/>5.7 Die externe WLAN-Antenne<text:bookmark-end text:name="__RefHeading___Toc5697_2530169349"/></text:h>
      <text:p text:style-name="P27"><text:span text:style-name="T9">Standardm</text:span><text:span text:style-name="T10">ä</text:span><text:span text:style-name="T9">ssig ist auf dem AI-Thinker ESP32-CAM-Modul eine integrierte PCB-Antenne verbaut. Laut Herstellerdatenblatt (SKU: ZYZ0054) hat diese eine Verstärkung von 2 dBi und deckt das 2,4-GHz-Band (2412-2484 MHz) ab. Die Sendeleistung betr</text:span><text:span text:style-name="T10">ä</text:span><text:span text:style-name="T9">gt je nach WLAN-Standard 802.11b: 17+/-2 dBm, 802.11g: 14+/-2 dBm und 802.11n: 13+/-2 dBm. Da das VisionBot auch über größere Distanzen steuerbar sein soll, wurde eine externe WLAN-Antenne angeschlossen.</text:span></text:p>
      <text:p text:style-name="P14">Die externe Antenne wird über den kleinen IPX/u.FL-Steckverbinder auf dem ESP32-CAM-Modul angeschlossen. Damit die externe Antenne genutzt wird, muss auf der ESP32-CAM-Platine ein 0-Ohm-Widerstand (oder eine Lötbrücke) umgesetzt werden, um das Antennensignal vom internen PCB-Antennenanschluss auf den externen IPX-Anschluss umzuleiten. Dies ist eine Hardware-Modifikation, die beim AI-Thinker-Modul standardm<text:span text:style-name="T4">ä</text:span>ssig vorgesehen ist.</text:p>
      <text:p text:style-name="Standard"><text:soft-page-break/></text:p>
      <text:p text:style-name="P14">Durch die externe Antenne verbessert sich die WLAN-Reichweite gegenüber der integrierten PCB-Antenne (2 dBi) deutlich. Im praktischen Betrieb wurde festgestellt, dass die Verbindung stabiler ist und weniger Bildausfälle beim Stream auftreten, wenn das Fahrzeug sich in etwas größerer Entfernung zum Hotspot befindet.</text:p>
      <text:p text:style-name="Standard"/>
      <text:h text:style-name="P16" text:outline-level="2"><text:bookmark-start text:name="__RefHeading___Toc5699_2530169349"/>5.8 Pin-Belegung (Gesamtübersicht)<text:bookmark-end text:name="__RefHeading___Toc5699_2530169349"/></text:h>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19">Funktion</text:p>
            </table:table-cell>
            <table:table-cell table:style-name="Tabelle8.A1" office:value-type="string">
              <text:p text:style-name="P19">ESP32-CAM GPIO</text:p>
            </table:table-cell>
            <table:table-cell table:style-name="Tabelle8.A1" office:value-type="string">
              <text:p text:style-name="P19">Verbunden mit</text:p>
            </table:table-cell>
          </table:table-row>
        </table:table-header-rows>
        <table:table-row table:style-name="Tabelle8.1">
          <table:table-cell table:style-name="Tabelle8.A2" office:value-type="string">
            <text:p text:style-name="P20">Motor IN1 (rechte Gruppe vorwärts)</text:p>
          </table:table-cell>
          <table:table-cell table:style-name="Tabelle8.A2" office:value-type="string">
            <text:p text:style-name="P20">GPIO 2</text:p>
          </table:table-cell>
          <table:table-cell table:style-name="Tabelle8.A2" office:value-type="string">
            <text:p text:style-name="P20">L298N IN1</text:p>
          </table:table-cell>
        </table:table-row>
        <table:table-row table:style-name="Tabelle8.1">
          <table:table-cell table:style-name="Tabelle8.A2" office:value-type="string">
            <text:p text:style-name="P20">Motor IN2 (rechte Gruppe rückwärts)</text:p>
          </table:table-cell>
          <table:table-cell table:style-name="Tabelle8.A2" office:value-type="string">
            <text:p text:style-name="P20">GPIO 14</text:p>
          </table:table-cell>
          <table:table-cell table:style-name="Tabelle8.A2" office:value-type="string">
            <text:p text:style-name="P20">L298N IN2</text:p>
          </table:table-cell>
        </table:table-row>
        <table:table-row table:style-name="Tabelle8.1">
          <table:table-cell table:style-name="Tabelle8.A2" office:value-type="string">
            <text:p text:style-name="P20">Motor IN3 (linke Gruppe vorwärts)</text:p>
          </table:table-cell>
          <table:table-cell table:style-name="Tabelle8.A2" office:value-type="string">
            <text:p text:style-name="P20">GPIO 15</text:p>
          </table:table-cell>
          <table:table-cell table:style-name="Tabelle8.A2" office:value-type="string">
            <text:p text:style-name="P20">L298N IN3</text:p>
          </table:table-cell>
        </table:table-row>
        <table:table-row table:style-name="Tabelle8.1">
          <table:table-cell table:style-name="Tabelle8.A2" office:value-type="string">
            <text:p text:style-name="P20">Motor IN4 (linke Gruppe rückwärts)</text:p>
          </table:table-cell>
          <table:table-cell table:style-name="Tabelle8.A2" office:value-type="string">
            <text:p text:style-name="P20">GPIO 13</text:p>
          </table:table-cell>
          <table:table-cell table:style-name="Tabelle8.A2" office:value-type="string">
            <text:p text:style-name="P20">L298N IN4</text:p>
          </table:table-cell>
        </table:table-row>
        <table:table-row table:style-name="Tabelle8.1">
          <table:table-cell table:style-name="Tabelle8.A2" office:value-type="string">
            <text:p text:style-name="P20">GND (Masse)</text:p>
          </table:table-cell>
          <table:table-cell table:style-name="Tabelle8.A2" office:value-type="string">
            <text:p text:style-name="P20">GND</text:p>
          </table:table-cell>
          <table:table-cell table:style-name="Tabelle8.A2" office:value-type="string">
            <text:p text:style-name="P20">L298N GND</text:p>
          </table:table-cell>
        </table:table-row>
        <table:table-row table:style-name="Tabelle8.1">
          <table:table-cell table:style-name="Tabelle8.A2" office:value-type="string">
            <text:p text:style-name="P20">5V Versorgung</text:p>
          </table:table-cell>
          <table:table-cell table:style-name="Tabelle8.A2" office:value-type="string">
            <text:p text:style-name="P20">5V-Pin</text:p>
          </table:table-cell>
          <table:table-cell table:style-name="Tabelle8.A2" office:value-type="string">
            <text:p text:style-name="P20">L298N 5V-Ausgang (78M05)</text:p>
          </table:table-cell>
        </table:table-row>
        <table:table-row table:style-name="Tabelle8.1">
          <table:table-cell table:style-name="Tabelle8.A2" office:value-type="string">
            <text:p text:style-name="P20">Kamera PWDN</text:p>
          </table:table-cell>
          <table:table-cell table:style-name="Tabelle8.A2" office:value-type="string">
            <text:p text:style-name="P20">GPIO 32</text:p>
          </table:table-cell>
          <table:table-cell table:style-name="Tabelle8.A2" office:value-type="string">
            <text:p text:style-name="P20">OV2640 Power-Down (intern)</text:p>
          </table:table-cell>
        </table:table-row>
        <table:table-row table:style-name="Tabelle8.1">
          <table:table-cell table:style-name="Tabelle8.A2" office:value-type="string">
            <text:p text:style-name="P20">Kamera XCLK</text:p>
          </table:table-cell>
          <table:table-cell table:style-name="Tabelle8.A2" office:value-type="string">
            <text:p text:style-name="P20">GPIO 0</text:p>
          </table:table-cell>
          <table:table-cell table:style-name="Tabelle8.A2" office:value-type="string">
            <text:p text:style-name="P20">OV2640 Clock (intern)</text:p>
          </table:table-cell>
        </table:table-row>
        <table:table-row table:style-name="Tabelle8.1">
          <table:table-cell table:style-name="Tabelle8.A2" office:value-type="string">
            <text:p text:style-name="P20">Kamera Datenbus Y2-Y9</text:p>
          </table:table-cell>
          <table:table-cell table:style-name="Tabelle8.A2" office:value-type="string">
            <text:p text:style-name="P20">GPIO 5,18,19,21,36,39,34,35</text:p>
          </table:table-cell>
          <table:table-cell table:style-name="Tabelle8.A2" office:value-type="string">
            <text:p text:style-name="P20">OV2640 Parallelbus (intern)</text:p>
          </table:table-cell>
        </table:table-row>
        <table:table-row table:style-name="Tabelle8.1">
          <table:table-cell table:style-name="Tabelle8.A2" office:value-type="string">
            <text:p text:style-name="P20">Kamera VSYNC/HREF/PCLK</text:p>
          </table:table-cell>
          <table:table-cell table:style-name="Tabelle8.A2" office:value-type="string">
            <text:p text:style-name="P20">GPIO 25,23,22</text:p>
          </table:table-cell>
          <table:table-cell table:style-name="Tabelle8.A2" office:value-type="string">
            <text:p text:style-name="P20">OV2640 Sync-Pins (intern)</text:p>
          </table:table-cell>
        </table:table-row>
        <table:table-row table:style-name="Tabelle8.1">
          <table:table-cell table:style-name="Tabelle8.A2" office:value-type="string">
            <text:p text:style-name="P20">Kamera I2C (SIOD/SIOC)</text:p>
          </table:table-cell>
          <table:table-cell table:style-name="Tabelle8.A2" office:value-type="string">
            <text:p text:style-name="P20">GPIO 26,27</text:p>
          </table:table-cell>
          <table:table-cell table:style-name="Tabelle8.A2" office:value-type="string">
            <text:p text:style-name="P20">OV2640 Konfigurationsbus (intern)</text:p>
          </table:table-cell>
        </table:table-row>
        <table:table-row table:style-name="Tabelle8.1">
          <table:table-cell table:style-name="Tabelle8.A2" office:value-type="string">
            <text:p text:style-name="P20">Externe WLAN-Antenne</text:p>
          </table:table-cell>
          <table:table-cell table:style-name="Tabelle8.A2" office:value-type="string">
            <text:p text:style-name="P20">IPX/u.FL Stecker</text:p>
          </table:table-cell>
          <table:table-cell table:style-name="Tabelle8.A2" office:value-type="string">
            <text:p text:style-name="P20">Externe 2,4 GHz Antenne</text:p>
          </table:table-cell>
        </table:table-row>
      </table:table>
      <text:p text:style-name="Standard"/>
      <text:h text:style-name="P16" text:outline-level="2"><text:bookmark-start text:name="__RefHeading___Toc5701_2530169349"/>5.9 Schaltplan<text:bookmark-end text:name="__RefHeading___Toc5701_2530169349"/></text:h>
      <text:p text:style-name="P14">Der Schaltplan zeigt die elektrischen Verbindungen zwischen ESP32-CAM, L298N-Motortreiber und den vier DC-Motoren. Die Stromversorgung erfolgt über zwei 18650-Lithium-Akkus in Reihe (ca. 7,4V), die den L298N direkt speisen. Der L298N stellt intern eine 5V-Versorgung für die Logik bereit.</text:p>
      <text:p text:style-name="Standard"><draw:frame draw:style-name="fr4" draw:name="Rahmen2" text:anchor-type="char" svg:x="0.572cm" svg:y="0.508cm" svg:width="15.857cm" draw:z-index="2"><draw:text-box fo:min-height="8.996cm"><text:p text:style-name="Figure"><draw:frame draw:style-name="fr2" draw:name="Bild2" text:anchor-type="paragraph" svg:width="15.857cm" style:rel-width="100%" svg:height="8.996cm" style:rel-height="scale" draw:z-index="3"><draw:image xlink:href="Pictures/1000000000000383000001FEECF940F6.png" xlink:type="simple" xlink:show="embed" xlink:actuate="onLoad" draw:mime-type="image/png"/></draw:frame>Schaubild <text:sequence text:ref-name="refFigure2" text:name="Figure" text:formula="ooow:Figure+1" style:num-format="1">3</text:sequence>: Schaltplan (In dem Herstellerdokument abgebildet unter 1_Get_start/1_Assembly_guide/24-带天线组装手册.pdf</text:p></draw:text-box></draw:frame><text:soft-page-break/></text:p>
      <text:h text:style-name="P16" text:outline-level="2"><text:bookmark-start text:name="__RefHeading___Toc6498_2530169349"/><text:tab/><text:bookmark-end text:name="__RefHeading___Toc6498_2530169349"/></text:h>
      <text:h text:style-name="P16" text:outline-level="2"><text:bookmark-start text:name="__RefHeading___Toc5703_2530169349"/>5.10 Montage-Schritte<text:bookmark-end text:name="__RefHeading___Toc5703_2530169349"/></text:h>
      <text:p text:style-name="P14">Die Montage des VisionBot erfolgt in f<text:span text:style-name="T6">ü</text:span>nf Hauptphasen:</text:p>
      <text:p text:style-name="Standard"/>
      <text:list text:continue-numbering="true" text:style-name="WWNum2">
        <text:list-item>
          <text:p text:style-name="P18">Phase 1 – Chassis aufbauen: Untere Acrylplatte auf ebener Fl<text:span text:style-name="T4">ä</text:span>che ausrichten. Motorhalterungen (L-Brackets) an den vier Ecken mit M3-Schrauben befestigen. TT-Motoren in die Halterungen einsetzen und mit zwei Schrauben je Motor fixieren. Sicherstellen, dass die Motorwellen nach aussen zeigen.</text:p>
        </text:list-item>
        <text:list-item>
          <text:p text:style-name="P18">Phase 2 – R<text:span text:style-name="T4">ä</text:span>der montieren: Kunststoffr<text:span text:style-name="T4">ä</text:span>der auf die D-f<text:span text:style-name="T4">ö</text:span>rmigen Motorwellen aufsetzen. Die abgeflachte Seite der Welle muss in die entsprechende Nut des Rades passen. Rad mit der Sicherungsschraube (Madenschraube) fixieren, um ein Abrutschen während der Fahrt zu verhindern.</text:p>
        </text:list-item>
        <text:list-item>
          <text:p text:style-name="P18">Phase 3 – Spacer und obere Platte: Abstandshalter an den vorgesehenen Bohrungen der unteren Platte befestigen. Obere Acrylplatte aufsetzen und mit M3-Schrauben sichern.</text:p>
        </text:list-item>
        <text:list-item>
          <text:p text:style-name="P18">Phase 4 – Elektronik montieren: L298N-Modul auf der oberen Platte positionieren und befestigen. Batteriehalter montieren. ESP32-CAM auf einem Halterungsrahmen (Camera Support Frame) befestigen und auf der oberen Platte positionieren.</text:p>
        </text:list-item>
        <text:list-item>
          <text:p text:style-name="P18">Phase 5 – Verkabelung: Motorleitungen an OUT1/2 (rechte Gruppe) und OUT3/4 (linke Gruppe) des L298N anschließen. Steuerleitungen (IN1-IN4) zwischen ESP32-CAM und L298N verbinden. Akkus in den Halter einlegen und die Versorgungsleitungen anschließen. Externe Antenne am IPX-Stecker befestigen.</text:p>
        </text:list-item>
      </text:list>
      <text:p text:style-name="Standard"/>
      <text:h text:style-name="P16" text:outline-level="2"><text:bookmark-start text:name="__RefHeading___Toc5705_2530169349"/><text:soft-page-break/>5.11 Hardware-Probleme und deren Lösungen<text:bookmark-end text:name="__RefHeading___Toc5705_2530169349"/></text:h>
      <text:p text:style-name="P14">Während des Zusammenbaus und der Testphase traten mehrere mechanische und elektrische Probleme auf, die das Fahrverhalten beeinflussten.</text:p>
      <text:p text:style-name="Standard"/>
      <text:h text:style-name="P23" text:outline-level="3"><text:bookmark-start text:name="__RefHeading___Toc5707_2530169349"/>5.11.1 Problem: Wackelige Motoren<text:bookmark-end text:name="__RefHeading___Toc5707_2530169349"/></text:h>
      <text:p text:style-name="P14">Nach dem ersten Zusammenbau stellte sich heraus, dass die Motoren im Fahrbetrieb deutlich wackelten. Dies äusserte sich durch ungleichm<text:span text:style-name="T4">ä</text:span>ssige Bewegungen, Vibrationen und instabiles Fahrverhalten, insbesondere bei schnellen Richtungswechseln. Die Ursache lag in der Art, wie die Motoren in den Halterungen befestigt waren: Die Schrauben zogen sich durch die Vibrationen des Fahrbetriebs leicht heraus, da das Acrylchassis und die Halterungen geringe Fertigungstoleranzen aufweisen.</text:p>
      <text:p text:style-name="Standard"/>
      <text:p text:style-name="P14">Auswirkungen auf das Fahrverhalten: Wackelige Motoren f<text:span text:style-name="T6">ü</text:span>hren dazu, dass der Abstand zwischen Motorwelle und Chassis variiert, was Schlagloch-artige Bewegungen erzeugt. Ausserdem können sich die R<text:span text:style-name="T4">ä</text:span>der verkanten, was den Stromverbrauch erhoht und im schlimmsten Fall Motoren oder Halterungen besch<text:span text:style-name="T4">ä</text:span>digt.</text:p>
      <text:p text:style-name="Standard"/>
      <text:p text:style-name="P14">Empfohlene Lösung: Alle Motorschrauben mit erhöhtem Anzugsmoment festziehen. Sicherungsmuttern (Nyloc-Muttern) verwenden, die sich durch Vibration nicht selbst lösen. Alternativ können die Schraubengewinde mit einer kleinen Menge Gewindekleber (Loctite 243 oder vergleichbar) gesichert werden. Zusätzlich kann eine d<text:span text:style-name="T6">ü</text:span>nne Gummiunterlegscheibe zwischen Motor und Halterung die übertragene Vibration reduzieren.</text:p>
      <text:p text:style-name="Standard"/>
      <text:h text:style-name="P23" text:outline-level="3"><text:bookmark-start text:name="__RefHeading___Toc5709_2530169349"/>5.11.2 Problem: Herausfallende Motorkabel<text:bookmark-end text:name="__RefHeading___Toc5709_2530169349"/></text:h>
      <text:p text:style-name="P14">Die Anschlusskabel der DC-Motoren werden standardm<text:span text:style-name="T4">ä</text:span>ssig einfach in die Schraubklemmen des L298N-Moduls eingesteckt. Im Betrieb mit den Motorvibrationen und bei Ersch<text:span text:style-name="T6">ü</text:span>tterungen durch das Fahren kam es regelmäßig dazu, dass die Kabel aus den Klemmen rutschten. Dies f<text:span text:style-name="T6">ü</text:span>hrte zum kompletten Ausfall einzelner Motoren mitten im Betrieb.</text:p>
      <text:p text:style-name="Standard"/>
      <text:p text:style-name="P14">Lösung – Verlöten der Verbindungen: Die Kabel wurden direkt an die Motoranschl<text:span text:style-name="T6">ü</text:span>sse gel<text:span text:style-name="T4">ö</text:span>tet. Das Verlöten ist die technisch sauberste und zuverlässigste Lösung für diese Art von Verbindung, da eine L<text:span text:style-name="T4">ö</text:span>tstelle mechanisch stabil ist und keinen <text:span text:style-name="T6">Ü</text:span>bergangswiderstand hat, der sich im Laufe der Zeit durch Oxidation verschlechtern kann. Beim L<text:span text:style-name="T4">ö</text:span>ten ist darauf zu achten, dass die Polung der Motorkabel korrekt ist (rotes Kabel an den positiven Ausgang OUT+, schwarzes an OUT-). Da die genaue Polung die Drehrichtung bestimmt, kann eine falsche Belegung im Code durch Tauschen der HIGH/LOW-Signale korrigiert werden.</text:p>
      <text:p text:style-name="Standard"/>
      <text:p text:style-name="P14">Nach dem Verlöten wurden die L<text:span text:style-name="T4">ö</text:span>tstellen mit Schrumpfschlauch isoliert, um Kurzschl<text:span text:style-name="T6">ü</text:span>sse zu verhindern und die mechanische Stabilit<text:span text:style-name="T4">ä</text:span>t der Verbindung weiter zu erhöhen.</text:p>
      <text:p text:style-name="Standard"/>
      <text:h text:style-name="P23" text:outline-level="3"><text:bookmark-start text:name="__RefHeading___Toc5711_2530169349"/><text:soft-page-break/>5.11.3 Problem: Nicht befestigte Kamera<text:bookmark-end text:name="__RefHeading___Toc5711_2530169349"/></text:h>
      <text:p text:style-name="P14">Die OV2640-Kamera auf der Vorderseite des ESP32-CAM-Moduls ist am AI-Thinker-Modul über einen flexiblen Flachbandkabel-Steckverbinder (FPC, Flexible Printed Circuit) mit der Hauptplatine verbunden. Dieser Steckverbinder ist durch einfaches Einstecken gesichert und kann sich bei Ersch<text:span text:style-name="T6">ü</text:span>tterungen lockern. Im vorliegenden Projekt ist die Kamera vorne am Fahrzeug angebracht, jedoch nicht zusätzlich mechanisch fixiert.</text:p>
      <text:p text:style-name="Standard"/>
      <text:p text:style-name="P14">Auswirkungen: Eine nicht fest befestigte Kamera kann sich während der Fahrt verdrehen, was das Kamerabild in wechselnde Richtungen kippt. Ausserdem kann bei st<text:span text:style-name="T4">ä</text:span>rkeren Ersch<text:span text:style-name="T6">ü</text:span>tterungen der FPC-Steckverbinder kurzzeitig die Verbindung unterbrechen, was zu Kameraausfällen f<text:span text:style-name="T6">ü</text:span>hrt.</text:p>
      <text:p text:style-name="Standard"/>
      <text:p text:style-name="P14">Empfohlene Lösung: Das Kameramodul sollte mit einem kleinen Kunststoffrahmen oder einem 3D-gedruckten Halter fest am Fahrzeug befestigt werden. Alternativ kann ein Tropfen Heisskleber vorsichtig an den Seiten des Kamerageh<text:span text:style-name="T4">ä</text:span>uses aufgebracht werden (nicht auf die Linse!), um es an seinem Platz zu halten. Der FPC-Steckverbinder selbst kann mit einem kleinen St<text:span text:style-name="T6">ü</text:span>ck Klebeband zusätzlich gesichert werden. Für sp<text:span text:style-name="T4">ä</text:span>tere Versionen ware ein schwenkbarer Kamerahalter (Servo-gesteuert) eine interessante Erweiterung.</text:p>
      <text:p text:style-name="Standard"/>
      <text:h text:style-name="P16" text:outline-level="2"><text:bookmark-start text:name="__RefHeading___Toc5713_2530169349"/>5.12 Zusammenspiel aller Hardwarekomponenten<text:bookmark-end text:name="__RefHeading___Toc5713_2530169349"/></text:h>
      <text:p text:style-name="P14">Zum Abschluss des Hardware-Kapitels ist es hilfreich, das Zusammenspiel aller Komponenten als Gesamtsystem zu verstehen:</text:p>
      <text:p text:style-name="Standard"/>
      <text:p text:style-name="P14">Die Energiekette beginnt bei den 18650-Akkus, die den L298N mit ca. 7,4V versorgen. Der L298N stellt aus dieser Spannung intern 5V bereit, die auch den ESP32-CAM speisen. Der ESP32-CAM verbindet sich beim Start automatisch mit dem WLAN-Hotspot und startet seinen HTTP-Webserver. Sobald ein Nutzer im Browser die IP-Adresse des ESP32 aufruft, lädt dieser die HTML/JS-Steuerseite. Bet einem Tastendruck auf der Webseite sendet der Browser einen HTTP-GET-Request an den ESP32 (z.B. /forward). Der ESP32 empf<text:span text:style-name="T4">ä</text:span>ngt diesen Request, ruft die entsprechende Motorfunktion auf und setzt die GPIO-Pins 2, 13, 14 und 15 auf die entsprechenden HIGH/LOW-Werte. Diese 3,3V-Logikpegel gehen an die IN1-IN4-Eingänge des L298N. Der L298N schaltet daraufhin seine internen H-Bridge-Transistoren und leitet den Motorstrom in die entsprechende Richtung, woraufhin die Motoren drehen und das Fahrzeug sich bewegt. Gleichzeitig nimmt der ESP32 alle ~150ms ein neues JPEG-Bild von der OV2640-Kamera auf und sendet es als HTTP-Antwort an den Browser, der es im Kamerabild-Bereich der Webseite anzeigt.</text:p>
      <text:p text:style-name="Standard"/>
      <text:p text:style-name="P14">Dieses Zusammenspiel aus WLAN-Kommunikation, HTTP-Server, Kameraaufnahme und Motorsteuerung auf einem einzigen Mikrocontroller macht das Projekt technisch anspruchsvoll und zeigt die beeindruckenden Möglichkeiten moderner Embedded-Plattformen wie dem ESP32-CAM.</text:p>
      <text:p text:style-name="Standard"/>
      <text:h text:style-name="P15" text:outline-level="1"><text:bookmark-start text:name="__RefHeading___Toc5715_2530169349"/><text:soft-page-break/>6. Software<text:bookmark-end text:name="__RefHeading___Toc5715_2530169349"/></text:h>
      <text:h text:style-name="P16" text:outline-level="2"><text:bookmark-start text:name="__RefHeading___Toc5717_2530169349"/>6.1 Software-Zweck &amp; Gesamtarchitektur<text:bookmark-end text:name="__RefHeading___Toc5717_2530169349"/></text:h>
      <text:h text:style-name="P23" text:outline-level="3"><text:bookmark-start text:name="__RefHeading___Toc5719_2530169349"/>6.1.1 Primärer Zweck des Codes<text:bookmark-end text:name="__RefHeading___Toc5719_2530169349"/></text:h>
      <text:p text:style-name="P14">Der C++-Firmware-Code für den ESP32-CAM übernimmt folgende zentralen Aufgaben:</text:p>
      <text:list text:continue-numbering="true" text:style-name="WWNum2">
        <text:list-item>
          <text:p text:style-name="P18">Hardware-Initialisierung (Motoren, Kamera, WLAN)</text:p>
        </text:list-item>
        <text:list-item>
          <text:p text:style-name="P18">Webserver-Betrieb (HTTP-Port 80 mit neun Endpunkten)</text:p>
        </text:list-item>
        <text:list-item>
          <text:p text:style-name="P18">Echtzeit-Kamera-Stream (MJPEG)</text:p>
        </text:list-item>
        <text:list-item>
          <text:p text:style-name="P18">4WD-Motorsteuerung (neun Befehle inkl. Diagonalrichtungen)</text:p>
        </text:list-item>
        <text:list-item>
          <text:p text:style-name="P18">Non-blocking Event-Loop (parallel: Stream + Steuerung)</text:p>
        </text:list-item>
      </text:list>
      <text:p text:style-name="Standard"/>
      <text:h text:style-name="P23" text:outline-level="3"><text:bookmark-start text:name="__RefHeading___Toc5721_2530169349"/>6.1.2 Architektur-Überblick<text:bookmark-end text:name="__RefHeading___Toc5721_2530169349"/></text:h>
      <text:p text:style-name="P14">Die Systemarchitektur des VisionBot folgt einem einfachen Client-Server-Modell. Der ESP32-CAM agiert gleichzeitig als WLAN-Client (verbindet sich mit einem Hotspot) und als HTTP-Server für angeschlossene Browser.</text:p>
      <text:p text:style-name="Standard"/>
      <text:p text:style-name="P28">Browser ──HTTP GET──► ESP32-CAM Webserver (Port 80)</text:p>
      <text:p text:style-name="P28"><text:s text:c="28"/><text:tab/><text:tab/>│</text:p>
      <text:p text:style-name="P28"><text:s text:c="28"/><text:tab/><text:tab/>├──► L298N H-Bridge ──► 4x DC-Motor</text:p>
      <text:p text:style-name="P28"><text:s text:c="28"/><text:tab/><text:tab/>│</text:p>
      <text:p text:style-name="P28"><text:s text:c="28"/><text:tab/><text:tab/>└──►OV2640 Kamera ──MJPEG──► &lt;img&gt; im Browser</text:p>
      <text:p text:style-name="Standard"/>
      <text:p text:style-name="P14">Alle Funktionen laufen auf demselben Microcontroller-Kern und werden durch eine event-getriebene Loop-Architektur koordiniert. Der Webserver verwaltet eingehende HTTP-Anfragen asynchron, sodass Kamerabild und Steuerkommandos gleichzeitig verarbeitet werden können.</text:p>
      <text:p text:style-name="Standard"/>
      <text:h text:style-name="P16" text:outline-level="2"><text:bookmark-start text:name="__RefHeading___Toc5723_2530169349"/>6.2 Entwicklungsumgebung &amp; Voraussetzungen<text:bookmark-end text:name="__RefHeading___Toc5723_2530169349"/></text:h>
      <text:p text:style-name="P14">Die Firmware wurde mit der Arduino IDE 2.3.<text:span text:style-name="T12">8</text:span> entwickelt. Folgende Konfigurationsparameter sind für den Upload auf den ESP32-CAM notwendig:</text:p>
      <text:p text:style-name="Standard"/>
      <table:table table:name="Tabelle9" table:style-name="Tabelle9">
        <table:table-column table:style-name="Tabelle9.A" table:number-columns-repeated="2"/>
        <table:table-header-rows>
          <table:table-row table:style-name="Tabelle9.1">
            <table:table-cell table:style-name="Tabelle9.A1" office:value-type="string">
              <text:p text:style-name="P19">Parameter</text:p>
            </table:table-cell>
            <table:table-cell table:style-name="Tabelle9.A1" office:value-type="string">
              <text:p text:style-name="P19">Einstellung</text:p>
            </table:table-cell>
          </table:table-row>
        </table:table-header-rows>
        <table:table-row table:style-name="Tabelle9.1">
          <table:table-cell table:style-name="Tabelle9.A2" office:value-type="string">
            <text:p text:style-name="P20">Board</text:p>
          </table:table-cell>
          <table:table-cell table:style-name="Tabelle9.A2" office:value-type="string">
            <text:p text:style-name="P20">AI Thinker ESP32-CAM</text:p>
          </table:table-cell>
        </table:table-row>
        <table:table-row table:style-name="Tabelle9.1">
          <table:table-cell table:style-name="Tabelle9.A2" office:value-type="string">
            <text:p text:style-name="P20">Partition Scheme</text:p>
          </table:table-cell>
          <table:table-cell table:style-name="Tabelle9.A2" office:value-type="string">
            <text:p text:style-name="P20">Huge APP (3MB No OTA/1MB SPIFFS) - laut Hersteller-Guide</text:p>
          </table:table-cell>
        </table:table-row>
        <table:table-row table:style-name="Tabelle9.1">
          <table:table-cell table:style-name="Tabelle9.A2" office:value-type="string">
            <text:p text:style-name="P20">CPU-Frequenz</text:p>
          </table:table-cell>
          <table:table-cell table:style-name="Tabelle9.A2" office:value-type="string">
            <text:p text:style-name="P20">240 MHz WiFi/BT</text:p>
          </table:table-cell>
        </table:table-row>
        <table:table-row table:style-name="Tabelle9.1">
          <table:table-cell table:style-name="Tabelle9.A2" office:value-type="string">
            <text:p text:style-name="P20">Flash Mode</text:p>
          </table:table-cell>
          <table:table-cell table:style-name="Tabelle9.A2" office:value-type="string">
            <text:p text:style-name="P20">QIO 80 MHz</text:p>
          </table:table-cell>
        </table:table-row>
        <table:table-row table:style-name="Tabelle9.1">
          <table:table-cell table:style-name="Tabelle9.A2" office:value-type="string">
            <text:p text:style-name="P20">PSRAM</text:p>
          </table:table-cell>
          <table:table-cell table:style-name="Tabelle9.A2" office:value-type="string">
            <text:p text:style-name="P20">Enabled</text:p>
          </table:table-cell>
        </table:table-row>
        <table:table-row table:style-name="Tabelle9.1">
          <table:table-cell table:style-name="Tabelle9.A2" office:value-type="string">
            <text:p text:style-name="P20">Upload-Geschwindigkeit</text:p>
          </table:table-cell>
          <table:table-cell table:style-name="Tabelle9.A2" office:value-type="string">
            <text:p text:style-name="P20">115200 Baud</text:p>
          </table:table-cell>
        </table:table-row>
      </table:table>
      <text:p text:style-name="Standard"><text:soft-page-break/></text:p>
      <text:p text:style-name="P14">Verwendete Bibliotheken:</text:p>
      <text:list text:continue-numbering="true" text:style-name="WWNum2">
        <text:list-item>
          <text:p text:style-name="P18">esp_camera.h – Steuerung des OV2640-Kameramoduls</text:p>
        </text:list-item>
        <text:list-item>
          <text:p text:style-name="P18">WiFi.h – WLAN-Client-Verbindung zum Hotspot</text:p>
        </text:list-item>
        <text:list-item>
          <text:p text:style-name="P18">WebServer.h – HTTP-Server auf Port 80 mit Routing</text:p>
        </text:list-item>
      </text:list>
      <text:p text:style-name="Standard"/>
      <text:p text:style-name="P14">Alle drei Bibliotheken sind Bestandteil des offiziellen ESP32-Arduino-Frameworks und müssen nicht separat installiert werden. Lediglich das ESP32-Board-Paket muss im Arduino IDE Boards Manager hinzugefügt werden.</text:p>
      <text:p text:style-name="Standard"/>
      <text:h text:style-name="P16" text:outline-level="2"><text:bookmark-start text:name="__RefHeading___Toc5725_2530169349"/>6.3 Detaillierte Pin-Analyse &amp; Hardware-Mapping<text:bookmark-end text:name="__RefHeading___Toc5725_2530169349"/></text:h>
      <text:h text:style-name="P23" text:outline-level="3"><text:bookmark-start text:name="__RefHeading___Toc5727_2530169349"/>6.3.1 Motor-Pin-Definitionen<text:bookmark-end text:name="__RefHeading___Toc5727_2530169349"/></text:h>
      <text:p text:style-name="P14">Die vier Motor-Steuerpins sind im Code wie folgt definiert:</text:p>
      <text:p text:style-name="Standard"/>
      <text:p text:style-name="P29">#define IN1 2 <text:s text:c="3"/>// rechte Motorengruppe: Vorwärts</text:p>
      <text:p text:style-name="P29">#define IN2 14 <text:s text:c="2"/>// rechte Motorengruppe: Rückwärts</text:p>
      <text:p text:style-name="P29">#define IN3 15 <text:s text:c="2"/>// linke Motorengruppe: Vorwärts</text:p>
      <text:p text:style-name="P29">#define IN4 13 <text:s text:c="2"/>// linke Motorengruppe: Rückwärts</text:p>
      <text:p text:style-name="Standard"/>
      <text:p text:style-name="P14">Die Auswahl dieser Pins ist auf die eingeschränkte Pin-Verfügbarkeit des ESP32-CAM zurückzuführen. Da viele GPIO-Pins fest für die Kamera-Schnittstelle reserviert sind (Y2–Y9, VSYNC, HREF, PCLK, XCLK, SIOD, SIOC, PWDN), verbleiben nur wenige Pins für zusätzliche Peripherie. Die gewählten Pins 2, 13, 14 und 15 sind als digitale Ausgänge verwendbar und stehen nicht in Konflikt mit dem Kamerabetrieb.</text:p>
      <text:h text:style-name="P23" text:outline-level="3"><text:bookmark-start text:name="__RefHeading___Toc5729_2530169349"/>6.3.2 Kamera-Pin-Definitionen (AI-Thinker)<text:bookmark-end text:name="__RefHeading___Toc5729_2530169349"/></text:h>
      <text:p text:style-name="P14">Die Kamera-Pins sind fest durch das AI-Thinker-Boardlayout vorgegeben und müssen exakt so konfiguriert werden:</text:p>
      <text:p text:style-name="Standard"/>
      <text:p text:style-name="P29">#define PWDN_GPIO_NUM <text:s text:c="4"/>32 <text:s text:c="2"/>// Power Down (LOW = aktiv)</text:p>
      <text:p text:style-name="P29">#define RESET_GPIO_NUM <text:s text:c="3"/>-1 <text:s text:c="2"/>// Hardware-Reset (nicht genutzt)</text:p>
      <text:p text:style-name="P29">#define XCLK_GPIO_NUM <text:s text:c="5"/>0 <text:s text:c="2"/>// 20 MHz Clock vom ESP32</text:p>
      <text:p text:style-name="P29">#define SIOD_GPIO_NUM <text:s text:c="4"/>26 <text:s text:c="2"/>// I2C Data (Sensor-Konfiguration)</text:p>
      <text:p text:style-name="P29">#define SIOC_GPIO_NUM <text:s text:c="4"/>27 <text:s text:c="2"/>// I2C Clock (Sensor-Konfiguration)</text:p>
      <text:p text:style-name="P29">#define Y9_GPIO_NUM <text:s text:c="6"/>35 <text:s text:c="2"/>// MSB des Parallel-Datenbusses</text:p>
      <text:p text:style-name="P29">#define Y8_GPIO_NUM <text:s text:c="6"/>34</text:p>
      <text:p text:style-name="P29">#define Y7_GPIO_NUM <text:s text:c="6"/>39</text:p>
      <text:p text:style-name="P29">#define Y6_GPIO_NUM <text:s text:c="6"/>36</text:p>
      <text:p text:style-name="P29">#define Y5_GPIO_NUM <text:s text:c="6"/>21</text:p>
      <text:p text:style-name="P29">#define Y4_GPIO_NUM <text:s text:c="6"/>19</text:p>
      <text:p text:style-name="P29">#define Y3_GPIO_NUM <text:s text:c="6"/>18</text:p>
      <text:p text:style-name="P29">#define Y2_GPIO_NUM <text:s text:c="7"/>5 <text:s text:c="2"/>// LSB des Parallel-Datenbusses</text:p>
      <text:p text:style-name="P29">#define VSYNC_GPIO_NUM <text:s text:c="3"/>25 <text:s text:c="2"/>// Vertical Sync</text:p>
      <text:p text:style-name="P29">#define HREF_GPIO_NUM <text:s text:c="4"/>23 <text:s text:c="2"/>// Horizontal Reference</text:p>
      <text:p text:style-name="P29">#define PCLK_GPIO_NUM <text:s text:c="4"/>22 <text:s text:c="2"/>// Pixel Clock</text:p>
      <text:p text:style-name="P14"><text:soft-page-break/>Die Y2–Y9-Pins bilden den 8-Bit-Paralleldatenbus der Kamera. Über diesen Bus werden die Pixel-Daten vom OV2640-Bildsensor byteweise in den ESP32 übertragen. Die Synchronisierungs-Pins VSYNC, HREF und PCLK steuern den zeitlichen Ablauf der Bildübertragung.</text:p>
      <text:p text:style-name="Standard"/>
      <text:h text:style-name="P16" text:outline-level="2"><text:bookmark-start text:name="__RefHeading___Toc5731_2530169349"/>6.4 Setup(): Fünf Initialisierungs-Phasen<text:bookmark-end text:name="__RefHeading___Toc5731_2530169349"/></text:h>
      <text:p text:style-name="P14">Die setup()-Funktion wird einmalig beim Start des ESP32 ausgeführt und durchläuft fünf klar getrennte Phasen:</text:p>
      <text:p text:style-name="P30">void setup();{}</text:p>
      <text:p text:style-name="Standard"/>
      <text:h text:style-name="P23" text:outline-level="3"><text:bookmark-start text:name="__RefHeading___Toc5733_2530169349"/>6.4.1 Phase 1: Diagnose und Sicherheitstest<text:bookmark-end text:name="__RefHeading___Toc5733_2530169349"/></text:h>
      <text:p text:style-name="P14">Der Serial-Monitor wird mit 115200 Baud gestartet, um Debugging-Ausgaben zu ermöglichen. Alle vier Motor-Pins werden als digitale Ausgänge konfiguriert (pinMode OUTPUT) und zunächst auf LOW gesetzt (Motorstopp).</text:p>
      <text:p text:style-name="Standard">Serial.begin(115200);</text:p>
      <text:p text:style-name="Standard">pinMode(Pin, OUTPUT);</text:p>
      <text:p text:style-name="Standard">stopMotors();</text:p>
      <text:p text:style-name="Standard"/>
      <text:h text:style-name="P23" text:outline-level="3"><text:bookmark-start text:name="__RefHeading___Toc5735_2530169349"/>6.4.2 Phase 2: Kamera-Systeminitialisierung<text:bookmark-end text:name="__RefHeading___Toc5735_2530169349"/></text:h>
      <text:p text:style-name="P14">Die Kamera wird mit folgenden Kernparametern initialisiert:</text:p>
      <text:list text:continue-numbering="true" text:style-name="WWNum2">
        <text:list-item>
          <text:p text:style-name="P18">Auflösung: QQVGA (160×120 Pixel) – optimiert für WLAN-Durchsatz und geringe Prozessorlast</text:p>
        </text:list-item>
        <text:list-item>
          <text:p text:style-name="P18">Format: JPEG mit Qualitätsstufe 20–25 (niedrige Zahl = höhere Qualität)</text:p>
        </text:list-item>
        <text:list-item>
          <text:p text:style-name="P18">PSRAM-Erkennung: Bei vorhandenem 4-MB-PSRAM werden zwei Bildpuffer aktiviert (Double-Buffering), sonst nur einer</text:p>
        </text:list-item>
        <text:list-item>
          <text:p text:style-name="P18">XCLK-Takt: 20 MHz über internen LEDC-PWM-Kanal 0</text:p>
        </text:list-item>
      </text:list>
      <text:p text:style-name="Standard"/>
      <text:p text:style-name="P14">Double-Buffering verhindert, dass ein noch nicht vollständig übertragener Frame überschrieben wird. Dadurch wird das Kamerabild flüssiger und Artefakte werden reduziert. Bei Initialisierungsfehlern wird der Programmablauf mit einer Fehlermeldung im Serial-Monitor abgebrochen.</text:p>
      <text:p text:style-name="Standard">if (psramFound()) {</text:p>
      <text:p text:style-name="Standard">    config.frame_size = FRAMESIZE_QQVGA;</text:p>
      <text:p text:style-name="Standard">    config.jpeg_quality = 20;</text:p>
      <text:p text:style-name="Standard">    config.fb_count = 2;</text:p>
      <text:p text:style-name="Standard">  } else {</text:p>
      <text:p text:style-name="Standard">    config.frame_size = FRAMESIZE_QQVGA;</text:p>
      <text:p text:style-name="Standard">    config.jpeg_quality = 25;</text:p>
      <text:p text:style-name="Standard">    config.fb_count = 1; <text:span text:style-name="T13">}</text:span></text:p>
      <text:p text:style-name="Standard"/>
      <text:h text:style-name="P23" text:outline-level="3"/>
      <text:h text:style-name="P25" text:outline-level="3"><text:bookmark-start text:name="__RefHeading___Toc5737_2530169349"/>6.4.3 Phase 3: Kamera-Kalibrierung<text:bookmark-end text:name="__RefHeading___Toc5737_2530169349"/></text:h>
      <text:p text:style-name="P14">Nach erfolgreicher Initialisierung wird das Kamerabild softwareseitig kalibriert:</text:p>
      <text:list text:continue-numbering="true" text:style-name="WWNum2">
        <text:list-item>
          <text:p text:style-name="P18">Vertikale Spiegelung (vflip = 1): Die Kamera ist physisch kopfüber montiert, daher wird das Bild um 180° gedreht.</text:p>
        </text:list-item>
        <text:list-item>
          <text:p text:style-name="P18">Horizontale Spiegelung (hmirror = 1): Korrigiert die seitenverkehrte Darstellung für eine natürliche Fahrzeugperspektive.</text:p>
        </text:list-item>
      </text:list>
      <text:p text:style-name="Standard"/>
      <text:p text:style-name="P14">Diese Anpassungen werden über das sensor_t-Objekt vorgenommen, das direkten Zugriff auf die Register des OV2640-Bildsensors bietet.</text:p>
      <text:p text:style-name="Standard">sensor_t* s = esp_camera_sensor_get();</text:p>
      <text:p text:style-name="Standard"><text:span text:style-name="T13">s</text:span>-&gt;set_vflip(s, 1);</text:p>
      <text:p text:style-name="Standard">s-&gt;set_hmirror(s, 1);</text:p>
      <text:p text:style-name="Standard"/>
      <text:h text:style-name="P23" text:outline-level="3"><text:bookmark-start text:name="__RefHeading___Toc5739_2530169349"/>6.4.4 Phase 4: WLAN-Client und Webserver<text:bookmark-end text:name="__RefHeading___Toc5739_2530169349"/></text:h>
      <text:p text:style-name="P14">Das Fahrzeug verbindet sich als WLAN-Client mit dem konfigurierten Hotspot. Die Verbindung erfolgt blockierend (while-Schleife), bis eine IP-Adresse per DHCP zugewiesen wurde (typisch: ca. 5–10 Sekunden). Die zugewiesene IP wird im Serial-Monitor ausgegeben und muss im Browser eingetragen werden, um auf die Weboberfläche zuzugreifen.</text:p>
      <text:p text:style-name="P31">Wifi.begin(ssid, password); while(Wifi.status() != WL_CONNECTED) { delay(500) }</text:p>
      <text:p text:style-name="P31">Serial.println(Wifi.localIP());</text:p>
      <text:p text:style-name="Standard"/>
      <text:p text:style-name="P14">Anschließend werden alle HTTP-Routen registriert:</text:p>
      <text:list text:continue-numbering="true" text:style-name="WWNum2">
        <text:list-item>
          <text:p text:style-name="P18">/ – Hauptseite: HTML-Seite mit eingebettetem Kamerastream und Steuerbuttons</text:p>
        </text:list-item>
        <text:list-item>
          <text:p text:style-name="P18">/stream – Kontinuierlicher JPEG-Einzel-Frame-Stream</text:p>
        </text:list-item>
        <text:list-item>
          <text:p text:style-name="P18">/forward, /back, /left, /right – Grundfahrtrichtungen</text:p>
        </text:list-item>
        <text:list-item>
          <text:p text:style-name="P18">/forward-left, /forward-right, /back-left, /back-right – Diagonalrichtungen</text:p>
        </text:list-item>
        <text:list-item>
          <text:p text:style-name="P18">/stop – Sofortiger Motorstopp</text:p>
        </text:list-item>
      </text:list>
      <text:p text:style-name="Standard">server.on("/", handleRoot);</text:p>
      <text:p text:style-name="Standard">server.on("/stream", HTTP_GET, handleStream);</text:p>
      <text:p text:style-name="Standard">server.on("/<text:span text:style-name="T13">Richtung</text:span>", []() { <text:span text:style-name="T13">Richtung</text:span>(); server.send(200, "text/plain", "OK"); });</text:p>
      <text:h text:style-name="P23" text:outline-level="3"><text:bookmark-start text:name="__RefHeading___Toc5741_2530169349"/>6.4.5 Phase 5: Server-Start<text:bookmark-end text:name="__RefHeading___Toc5741_2530169349"/></text:h>
      <text:p text:style-name="P14">Mit server.begin() wird der HTTP-Server auf Port 80 gestartet. Das System ist nun vollständig betriebsbereit und wartet auf eingehende Verbindungen. Ab diesem Zeitpunkt kann jedes Gerät im gleichen WLAN-Netz die Weboberfläche aufrufen.</text:p>
      <text:p text:style-name="Standard">server.begin();</text:p>
      <text:p text:style-name="Standard"/>
      <text:h text:style-name="P16" text:outline-level="2"><text:bookmark-start text:name="__RefHeading___Toc5743_2530169349"/>6.5 Loop(): Event-Architektur<text:bookmark-end text:name="__RefHeading___Toc5743_2530169349"/></text:h>
      <text:p text:style-name="P14">Die loop()-Funktion enthält lediglich einen einzigen Aufruf: server.handleClient(). Diese Funktion prüft kontinuierlich, ob neue HTTP-Anfragen eingegangen sind, und ruft bei Bedarf den entsprechenden Handler auf. Da kein delay() verwendet wird, kann der Webserver schnell auf Anfragen reagieren – typische Reaktionszeit: unter 100 ms.</text:p>
      <text:p text:style-name="P27"><text:soft-page-break/><text:span text:style-name="T9">Diese Architektur ermöglicht das parallele Verarbeiten von Kamerastream-Anfragen und Steuerkommandos ohne Blockaden. Der ESP32 wechselt dabei intern zwischen den verschiedenen Aufgaben, ohne dass ein echtes Betriebssystem oder RTOS notwendig ist.</text:span></text:p>
      <text:p text:style-name="P32">Void loop() {</text:p>
      <text:p text:style-name="P32">server.handleClient(); }</text:p>
      <text:h text:style-name="P16" text:outline-level="2"><text:bookmark-start text:name="__RefHeading___Toc5745_2530169349"/>6.6 Webserver-Endpunkte: Funktionsweise<text:bookmark-end text:name="__RefHeading___Toc5745_2530169349"/></text:h>
      <text:h text:style-name="P23" text:outline-level="3"><text:bookmark-start text:name="__RefHeading___Toc5747_2530169349"/>6.6.1 Hauptinterface ("/")<text:bookmark-end text:name="__RefHeading___Toc5747_2530169349"/></text:h>
      <text:p text:style-name="P14">Beim Aufruf der Root-URL liefert der ESP32 eine vollständige HTML-Seite. Diese enthält:</text:p>
      <text:list text:continue-numbering="true" text:style-name="WWNum2">
        <text:list-item>
          <text:p text:style-name="P18">Eine CSS-gestaltete Bedienoberfläche im responsiven Design (funktioniert auf Smartphone und Desktop)</text:p>
        </text:list-item>
        <text:list-item>
          <text:p text:style-name="P18">Ein 3×3-Button-Raster für alle neun Fahrtrichtungen (inkl. Diagonalen und Stopp)</text:p>
        </text:list-item>
        <text:list-item>
          <text:p text:style-name="P18">WASD-Tastatursteuerung: W/A/S/D für Grundrichtungen, Kombinationen (WA, WD, SA, SD) für Diagonalen</text:p>
        </text:list-item>
        <text:list-item>
          <text:p text:style-name="P18">JavaScript fetch()-Aufrufe: Steuerbefehle werden ohne Seitenneuladen als HTTP GET an den ESP32 gesendet</text:p>
        </text:list-item>
        <text:list-item>
          <text:p text:style-name="P18">Automatischer Stream-Refresh: setInterval() lädt den Kamerastream alle 150 ms neu</text:p>
        </text:list-item>
        <text:list-item>
          <text:p text:style-name="P18">Touchscreen-Unterstützung: touchstart/touchend-Events für mobile Geräte</text:p>
        </text:list-item>
        <text:list-item>
          <text:p text:style-name="P18">Safety-Stop: Beim Loslassen eines Buttons oder beim Verlassen des Browserfensters wird automatisch der Stopp-Befehl gesendet</text:p>
        </text:list-item>
      </text:list>
      <text:p text:style-name="Standard">void handleRoot() {</text:p>
      <text:p text:style-name="Standard">  String html = R"rawliteral(<text:span text:style-name="T14">HTML-Code)rawliteral”;</text:span></text:p>
      <text:p text:style-name="P32"><text:s text:c="2"/>server.send(200, “text/html”, html); }</text:p>
      <text:p text:style-name="Standard"/>
      <text:h text:style-name="P23" text:outline-level="3"><text:bookmark-start text:name="__RefHeading___Toc5749_2530169349"/>6.6.2 Kamera-Stream ("/stream")<text:bookmark-end text:name="__RefHeading___Toc5749_2530169349"/></text:h>
      <text:p text:style-name="P14">Der Stream-Endpunkt liefert einzelne JPEG-Frames als HTTP-Antwort. Der Browser ruft diesen Endpunkt per setInterval() periodisch auf und aktualisiert das &lt;img&gt;-Element mit dem jeweils aktuellen Frame. Ablauf pro Frame:</text:p>
      <text:list text:continue-numbering="true" text:style-name="WWNum2">
        <text:list-item>
          <text:p text:style-name="P18">Neues Bild vom OV2640 aufnehmen (ca. 5–10 KB als JPEG bei QQVGA)</text:p>
        </text:list-item>
        <text:list-item>
          <text:p text:style-name="P18">Frame als image/jpeg HTTP-Antwort mit Status 200 senden</text:p>
        </text:list-item>
        <text:list-item>
          <text:p text:style-name="P18">Frame-Buffer wieder freigeben (esp_camera_fb_return)</text:p>
        </text:list-item>
      </text:list>
      <text:p text:style-name="Standard"/>
      <text:p text:style-name="P14">Diese Methode (Poll-basiertes JPEG statt echtem MJPEG-Multipart-Stream) wurde gewählt, weil sie besser mit der parallelen Motorsteuerung harmoniert und weniger Ressourcen auf dem ESP32 beansprucht.</text:p>
      <text:p text:style-name="P33">void handleStream() {</text:p>
      <text:p text:style-name="P33">  camera_fb_t* fb = esp_camera_fb_get();</text:p>
      <text:p text:style-name="P33">  if (!fb) {</text:p>
      <text:p text:style-name="P33">    server.send(500, "text/plain", "Camera failed");</text:p>
      <text:p text:style-name="P33">    return; <text:span text:style-name="T14">}</text:span></text:p>
      <text:p text:style-name="P33">  server.send_P(200, "image/jpeg", (const char*)fb-&gt;buf, fb-&gt;len);</text:p>
      <text:p text:style-name="P33">  esp_camera_fb_return(fb); <text:span text:style-name="T14">}</text:span></text:p>
      <text:p text:style-name="Standard"/>
      <text:h text:style-name="P16" text:outline-level="2"><text:bookmark-start text:name="__RefHeading___Toc5751_2530169349"/><text:soft-page-break/>6.7 Motor-Steuerungslogik<text:bookmark-end text:name="__RefHeading___Toc5751_2530169349"/></text:h>
      <text:p text:style-name="P14">Jede Fahrtfunktion setzt die vier GPIO-Pins des L298N gemäß der H-Bridge-Logik. Die Zuordnung:</text:p>
      <text:p text:style-name="Standard"/>
      <table:table table:name="Tabelle10" table:style-name="Tabelle10">
        <table:table-column table:style-name="Tabelle10.A"/>
        <table:table-column table:style-name="Tabelle10.B"/>
        <table:table-column table:style-name="Tabelle10.C"/>
        <table:table-column table:style-name="Tabelle10.D"/>
        <table:table-column table:style-name="Tabelle10.E"/>
        <table:table-header-rows>
          <table:table-row table:style-name="Tabelle10.1">
            <table:table-cell table:style-name="Tabelle10.A1" office:value-type="string">
              <text:p text:style-name="P19">Befehl</text:p>
            </table:table-cell>
            <table:table-cell table:style-name="Tabelle10.A1" office:value-type="string">
              <text:p text:style-name="P19">IN1 (GPIO 2)</text:p>
            </table:table-cell>
            <table:table-cell table:style-name="Tabelle10.A1" office:value-type="string">
              <text:p text:style-name="P19">IN2 (GPIO 14)</text:p>
            </table:table-cell>
            <table:table-cell table:style-name="Tabelle10.A1" office:value-type="string">
              <text:p text:style-name="P19">IN3 (GPIO 15)</text:p>
            </table:table-cell>
            <table:table-cell table:style-name="Tabelle10.A1" office:value-type="string">
              <text:p text:style-name="P19">IN4 (GPIO 13)</text:p>
            </table:table-cell>
          </table:table-row>
        </table:table-header-rows>
        <table:table-row table:style-name="Tabelle10.1">
          <table:table-cell table:style-name="Tabelle10.A2" office:value-type="string">
            <text:p text:style-name="P20">Vorwärts</text:p>
          </table:table-cell>
          <table:table-cell table:style-name="Tabelle10.A2" office:value-type="string">
            <text:p text:style-name="P20">LOW</text:p>
          </table:table-cell>
          <table:table-cell table:style-name="Tabelle10.A2" office:value-type="string">
            <text:p text:style-name="P20">HIGH</text:p>
          </table:table-cell>
          <table:table-cell table:style-name="Tabelle10.A2" office:value-type="string">
            <text:p text:style-name="P20">LOW</text:p>
          </table:table-cell>
          <table:table-cell table:style-name="Tabelle10.A2" office:value-type="string">
            <text:p text:style-name="P20">HIGH</text:p>
          </table:table-cell>
        </table:table-row>
        <table:table-row table:style-name="Tabelle10.1">
          <table:table-cell table:style-name="Tabelle10.A2" office:value-type="string">
            <text:p text:style-name="P20">Rückwärts</text:p>
          </table:table-cell>
          <table:table-cell table:style-name="Tabelle10.A2" office:value-type="string">
            <text:p text:style-name="P20">HIGH</text:p>
          </table:table-cell>
          <table:table-cell table:style-name="Tabelle10.A2" office:value-type="string">
            <text:p text:style-name="P20">LOW</text:p>
          </table:table-cell>
          <table:table-cell table:style-name="Tabelle10.A2" office:value-type="string">
            <text:p text:style-name="P20">HIGH</text:p>
          </table:table-cell>
          <table:table-cell table:style-name="Tabelle10.A2" office:value-type="string">
            <text:p text:style-name="P20">LOW</text:p>
          </table:table-cell>
        </table:table-row>
        <table:table-row table:style-name="Tabelle10.1">
          <table:table-cell table:style-name="Tabelle10.A2" office:value-type="string">
            <text:p text:style-name="P20">Links (Tank)</text:p>
          </table:table-cell>
          <table:table-cell table:style-name="Tabelle10.A2" office:value-type="string">
            <text:p text:style-name="P20">LOW</text:p>
          </table:table-cell>
          <table:table-cell table:style-name="Tabelle10.A2" office:value-type="string">
            <text:p text:style-name="P20">HIGH</text:p>
          </table:table-cell>
          <table:table-cell table:style-name="Tabelle10.A2" office:value-type="string">
            <text:p text:style-name="P20">HIGH</text:p>
          </table:table-cell>
          <table:table-cell table:style-name="Tabelle10.A2" office:value-type="string">
            <text:p text:style-name="P20">LOW</text:p>
          </table:table-cell>
        </table:table-row>
        <table:table-row table:style-name="Tabelle10.1">
          <table:table-cell table:style-name="Tabelle10.A2" office:value-type="string">
            <text:p text:style-name="P20">Rechts (Tank)</text:p>
          </table:table-cell>
          <table:table-cell table:style-name="Tabelle10.A2" office:value-type="string">
            <text:p text:style-name="P20">HIGH</text:p>
          </table:table-cell>
          <table:table-cell table:style-name="Tabelle10.A2" office:value-type="string">
            <text:p text:style-name="P20">LOW</text:p>
          </table:table-cell>
          <table:table-cell table:style-name="Tabelle10.A2" office:value-type="string">
            <text:p text:style-name="P20">LOW</text:p>
          </table:table-cell>
          <table:table-cell table:style-name="Tabelle10.A2" office:value-type="string">
            <text:p text:style-name="P20">HIGH</text:p>
          </table:table-cell>
        </table:table-row>
        <table:table-row table:style-name="Tabelle10.1">
          <table:table-cell table:style-name="Tabelle10.A2" office:value-type="string">
            <text:p text:style-name="P20">Vorwärts-Links</text:p>
          </table:table-cell>
          <table:table-cell table:style-name="Tabelle10.A2" office:value-type="string">
            <text:p text:style-name="P20">LOW</text:p>
          </table:table-cell>
          <table:table-cell table:style-name="Tabelle10.A2" office:value-type="string">
            <text:p text:style-name="P20">HIGH</text:p>
          </table:table-cell>
          <table:table-cell table:style-name="Tabelle10.A2" office:value-type="string">
            <text:p text:style-name="P20">LOW</text:p>
          </table:table-cell>
          <table:table-cell table:style-name="Tabelle10.A2" office:value-type="string">
            <text:p text:style-name="P20">LOW</text:p>
          </table:table-cell>
        </table:table-row>
        <table:table-row table:style-name="Tabelle10.1">
          <table:table-cell table:style-name="Tabelle10.A2" office:value-type="string">
            <text:p text:style-name="P20">Vorwärts-Rechts</text:p>
          </table:table-cell>
          <table:table-cell table:style-name="Tabelle10.A2" office:value-type="string">
            <text:p text:style-name="P20">LOW</text:p>
          </table:table-cell>
          <table:table-cell table:style-name="Tabelle10.A2" office:value-type="string">
            <text:p text:style-name="P20">LOW</text:p>
          </table:table-cell>
          <table:table-cell table:style-name="Tabelle10.A2" office:value-type="string">
            <text:p text:style-name="P20">LOW</text:p>
          </table:table-cell>
          <table:table-cell table:style-name="Tabelle10.A2" office:value-type="string">
            <text:p text:style-name="P20">HIGH</text:p>
          </table:table-cell>
        </table:table-row>
        <table:table-row table:style-name="Tabelle10.1">
          <table:table-cell table:style-name="Tabelle10.A2" office:value-type="string">
            <text:p text:style-name="P20">Rückwärts-Links</text:p>
          </table:table-cell>
          <table:table-cell table:style-name="Tabelle10.A2" office:value-type="string">
            <text:p text:style-name="P20">HIGH</text:p>
          </table:table-cell>
          <table:table-cell table:style-name="Tabelle10.A2" office:value-type="string">
            <text:p text:style-name="P20">LOW</text:p>
          </table:table-cell>
          <table:table-cell table:style-name="Tabelle10.A2" office:value-type="string">
            <text:p text:style-name="P20">LOW</text:p>
          </table:table-cell>
          <table:table-cell table:style-name="Tabelle10.A2" office:value-type="string">
            <text:p text:style-name="P20">LOW</text:p>
          </table:table-cell>
        </table:table-row>
        <table:table-row table:style-name="Tabelle10.1">
          <table:table-cell table:style-name="Tabelle10.A2" office:value-type="string">
            <text:p text:style-name="P20">Rückwärts-Rechts</text:p>
          </table:table-cell>
          <table:table-cell table:style-name="Tabelle10.A2" office:value-type="string">
            <text:p text:style-name="P20">LOW</text:p>
          </table:table-cell>
          <table:table-cell table:style-name="Tabelle10.A2" office:value-type="string">
            <text:p text:style-name="P20">LOW</text:p>
          </table:table-cell>
          <table:table-cell table:style-name="Tabelle10.A2" office:value-type="string">
            <text:p text:style-name="P20">HIGH</text:p>
          </table:table-cell>
          <table:table-cell table:style-name="Tabelle10.A2" office:value-type="string">
            <text:p text:style-name="P20">LOW</text:p>
          </table:table-cell>
        </table:table-row>
        <table:table-row table:style-name="Tabelle10.1">
          <table:table-cell table:style-name="Tabelle10.A2" office:value-type="string">
            <text:p text:style-name="P20">Stopp</text:p>
          </table:table-cell>
          <table:table-cell table:style-name="Tabelle10.A2" office:value-type="string">
            <text:p text:style-name="P20">LOW</text:p>
          </table:table-cell>
          <table:table-cell table:style-name="Tabelle10.A2" office:value-type="string">
            <text:p text:style-name="P20">LOW</text:p>
          </table:table-cell>
          <table:table-cell table:style-name="Tabelle10.A2" office:value-type="string">
            <text:p text:style-name="P20">LOW</text:p>
          </table:table-cell>
          <table:table-cell table:style-name="Tabelle10.A2" office:value-type="string">
            <text:p text:style-name="P20">LOW</text:p>
          </table:table-cell>
        </table:table-row>
      </table:table>
      <text:p text:style-name="Standard"/>
      <text:p text:style-name="P14">Bei der Tank-Lenkung (Links/Rechts) drehen die beiden Motorseiten in entgegengesetzte Richtungen, wodurch das Fahrzeug auf der Stelle dreht. Bei den Diagonalbewegungen wird jeweils nur eine Motorseite aktiv angesteuert, die andere läuft frei – dies erzeugt eine weichere Kurve statt einer scharfen Tank-Drehung.</text:p>
      <text:p text:style-name="P30">Void Richtung(){</text:p>
      <text:p text:style-name="P30">digitalWrite(pin</text:p>
      <text:h text:style-name="P16" text:outline-level="2"><text:bookmark-start text:name="__RefHeading___Toc5753_2530169349"/>6.8 Weboberfläche<text:bookmark-end text:name="__RefHeading___Toc5753_2530169349"/></text:h>
      <text:p text:style-name="P14">Die Weboberfläche wurde vollständig in HTML, CSS und JavaScript implementiert und wird vom ESP32-CAM direkt ausgeliefert. Es sind keine externen Server oder Frameworks notwendig.</text:p>
      <text:p text:style-name="Standard"/>
      <text:h text:style-name="P23" text:outline-level="3"><text:bookmark-start text:name="__RefHeading___Toc5755_2530169349"/>6.8.1 Design und Layout<text:bookmark-end text:name="__RefHeading___Toc5755_2530169349"/></text:h>
      <text:p text:style-name="P14">Die Oberfläche ist responsiv gestaltet und funktioniert sowohl auf Desktop-Browsern als auch auf mobilen Geräten. Das Layout besteht aus zwei Hauptbereichen: dem Kamerabild oben und dem Button-Raster darunter.</text:p>
      <text:p text:style-name="Standard"/>
      <text:p text:style-name="P14">Das Farbschema verwendet ein warmes Beige als Hintergrund mit dunkelgrünen Akzenten für die Fahrt-Buttons und einem roten Stop-Button für die Notabschaltung. Alle Buttons sind mindestens 70px hoch, um eine gute Bedienbarkeit auf Touchscreens zu gewährleisten.</text:p>
      <text:p text:style-name="Standard"/>
      <text:h text:style-name="P23" text:outline-level="3"/>
      <text:h text:style-name="P25" text:outline-level="3"><text:bookmark-start text:name="__RefHeading___Toc5757_2530169349"/>6.8.2 Steuerungsimplementierung<text:bookmark-end text:name="__RefHeading___Toc5757_2530169349"/></text:h>
      <text:p text:style-name="P14">Die Steuerung wurde so implementiert, dass Befehle nur gesendet werden, wenn sie sich vom aktuellen Befehl unterscheiden (Deduplizierung). Dies verhindert, dass der ESP32 mit identischen Anfragen überflutet wird:</text:p>
      <text:p text:style-name="Standard"/>
      <text:p text:style-name="P29">function sendCommand(command) {</text:p>
      <text:p text:style-name="P29"><text:s text:c="2"/>if (command === activeCommand) return; <text:s/>// Duplikat ignorieren</text:p>
      <text:p text:style-name="P29"><text:s text:c="2"/>activeCommand = command;</text:p>
      <text:p text:style-name="P29"><text:s text:c="2"/>fetch('/' + command).catch(() =&gt; {}); <text:span text:style-name="T15">}</text:span></text:p>
      <text:p text:style-name="Standard"/>
      <text:p text:style-name="P14">Für die Tastatursteuerung werden gedrückte Tasten in einem Set verwaltet. Bei jeder Tastenänderung (keydown/keyup) wird aus den aktuell gedrückten Tasten der entsprechende Befehl berechnet – inklusive Diagonalrichtungen bei gleichzeitig gedrückten Tasten.</text:p>
      <text:p text:style-name="Standard"/>
      <text:h text:style-name="P16" text:outline-level="2"><text:bookmark-start text:name="__RefHeading___Toc5759_2530169349"/>6.9 Testphase und Vorgehensweise<text:bookmark-end text:name="__RefHeading___Toc5759_2530169349"/></text:h>
      <text:p text:style-name="P14">Die Testphase des Projekts wurde bewusst in mehrere einzelne Schritte aufgeteilt. Dieser Aufbau war wichtig, damit Fehler schneller gefunden werden konnten und nicht mehrere Funktionen gleichzeitig geprüft werden mussten. Gerade bei einem Projekt, das sowohl Motorsteuerung als auch Kameraübertragung und Webserver enthält, ist es sinnvoll, zuerst einzelne Teile zu testen und erst danach alles zusammenzuführen.</text:p>
      <text:p text:style-name="Standard"/>
      <text:h text:style-name="P23" text:outline-level="3"><text:bookmark-start text:name="__RefHeading___Toc5761_2530169349"/>6.9.1 Erster Test: Motoren allein<text:bookmark-end text:name="__RefHeading___Toc5761_2530169349"/></text:h>
      <text:p text:style-name="P14">Am Anfang wurden zunächst nur die Motoren getestet. Dabei war das Ziel herauszufinden, ob die Verkabelung korrekt ist und ob der ESP32 die Motortreiber richtig ansteuern kann. In diesem Schritt wurde noch keine Kamera verwendet und auch kein Webserver gestartet. Der Fokus lag nur darauf, ob die Motoren vorwärts, rückwärts und beim Stop-Befehl richtig reagieren.</text:p>
      <text:p text:style-name="Standard"/>
      <text:h text:style-name="P23" text:outline-level="3"><text:bookmark-start text:name="__RefHeading___Toc5763_2530169349"/>6.9.2 Zweiter Test: Kamera-Funktion<text:bookmark-end text:name="__RefHeading___Toc5763_2530169349"/></text:h>
      <text:p text:style-name="P14">Nachdem die Motoren erfolgreich getestet worden waren, wurde in einem weiteren Schritt die Kamera separat geprüft. Dafür wurde ein eigener Code verwendet, der sich nur auf die Initialisierung und die Bildausgabe der Kamera konzentrierte. In dieser Phase ging es darum zu sehen, ob der ESP32-CAM das Kameramodul korrekt erkennt und ob ein stabiles Bild ausgegeben wird. Außerdem wurde geprüft, welche Auflösung sich am besten eignet und ob das Kamerabild korrekt gedreht oder gespiegelt werden muss.</text:p>
      <text:p text:style-name="Standard"/>
      <text:h text:style-name="P23" text:outline-level="3"><text:bookmark-start text:name="__RefHeading___Toc5765_2530169349"/>6.9.3 Dritter Test: Zusammengeführter Gesamtcode<text:bookmark-end text:name="__RefHeading___Toc5765_2530169349"/></text:h>
      <text:p text:style-name="P14">Erst nachdem Motoren und Kamera einzeln funktioniert hatten, wurden beide Teile in einem gemeinsamen Code verbunden. In diesem Schritt wurde geprüft, ob gleichzeitig ein Kamerabild übertragen und das Fahrzeug gesteuert werden kann. Das war der wichtigste Test, weil hier sichtbar wurde, ob der ESP32 die verschiedenen Aufgaben parallel bewältigen kann.</text:p>
      <text:h text:style-name="P26" text:outline-level="3"><text:bookmark-start text:name="__RefHeading___Toc5767_2530169349"/><text:soft-page-break/><text:span text:style-name="T7">6.9.4 Probleme während der Testphase</text:span><text:bookmark-end text:name="__RefHeading___Toc5767_2530169349"/></text:h>
      <text:p text:style-name="P14">Während des Tests traten verschiedene Schwierigkeiten auf:</text:p>
      <text:list text:continue-numbering="true" text:style-name="WWNum2">
        <text:list-item>
          <text:p text:style-name="P18">Motorrichtung: Einige Motoren drehten in die entgegengesetzte Richtung, obwohl sie korrekt programmiert waren – Ursache war eine fehlerhafte Verdrahtung der Ausgangssignale.</text:p>
        </text:list-item>
        <text:list-item>
          <text:p text:style-name="P18">Kameraausrichtung: Beim ersten Test war das Bild vertikal und horizontal gespiegelt, da die Kamera kopfüber montiert wurde.</text:p>
        </text:list-item>
        <text:list-item>
          <text:p text:style-name="P18">Systemüberlastung: Bei zu hoher Kameraauflösung kam es zu Verzögerungen im Kamerastream und in der Motorsteuerung.</text:p>
        </text:list-item>
        <text:list-item>
          <text:p text:style-name="P18">Steuerungs-Blockade: Beim ersten Zusammenführen des Codes funktionierten zwar Kamerastream und Webseite, aber die Steuerungsbuttons sendeten keine Befehle.</text:p>
        </text:list-item>
      </text:list>
      <text:p text:style-name="Standard"/>
      <text:h text:style-name="P23" text:outline-level="3"><text:bookmark-start text:name="__RefHeading___Toc5769_2530169349"/>6.9.5 Lösung der Probleme<text:bookmark-end text:name="__RefHeading___Toc5769_2530169349"/></text:h>
      <text:p text:style-name="P34"><text:bookmark-start text:name="__RefHeading___Toc5771_2530169349"/>Lösung: Motorsteuerung<text:bookmark-end text:name="__RefHeading___Toc5771_2530169349"/></text:p>
      <text:p text:style-name="P14">Die Steuersignale (HIGH/LOW) wurden für jede Fahrfunktion einzeln überprüft und angepasst, bis alle Motoren in der gewünschten Richtung liefen. Die Korrektur musste für jede der acht Fahrtrichtungen individuell durchgeführt werden.</text:p>
      <text:p text:style-name="Standard"/>
      <text:p text:style-name="P34"><text:bookmark-start text:name="__RefHeading___Toc5773_2530169349"/>Lösung: Kameraausrichtung<text:bookmark-end text:name="__RefHeading___Toc5773_2530169349"/></text:p>
      <text:p text:style-name="P14">Durch Aktivieren von vflip und hmirror im OV2640-Sensor-Register wurde das Kamerabild korrekt ausgerichtet. Diese Einstellungen werden einmalig während der Setup-Phase gesetzt.</text:p>
      <text:p text:style-name="P34"><text:bookmark-start text:name="__RefHeading___Toc5775_2530169349"/><text:line-break/><text:line-break/>Lösung: Systemüberlastung<text:bookmark-end text:name="__RefHeading___Toc5775_2530169349"/></text:p>
      <text:p text:style-name="P14">Die Kameraauflösung wurde von QVGA (320×240) auf QQVGA (160×120) reduziert. Dadurch sank die zu übertragende Datenmenge erheblich, was das System deutlich entlastete und die Latenz beider Funktionen verbesserte.</text:p>
      <text:p text:style-name="Standard"/>
      <text:p text:style-name="P34"><text:bookmark-start text:name="__RefHeading___Toc5777_2530169349"/>Lösung: Steuerungs-Blockade<text:bookmark-end text:name="__RefHeading___Toc5777_2530169349"/></text:p>
      <text:p text:style-name="P14">Das Problem lag in der Ressourcenkonkurrenz zwischen Kamerastream und Webserver. Durch die Auflösungsreduzierung und den Wechsel zu einem poll-basierten Stream (statt dauerhaftem MJPEG-Multipart-Stream) wurde der Webserver entlastet. Die JavaScript-Implementierung mit fetch()-Aufrufen sorgt dafür, dass Steuerbefehle ohne Seitenneuladen gesendet werden.</text:p>
      <text:p text:style-name="Standard"/>
      <text:h text:style-name="P23" text:outline-level="3"><text:bookmark-start text:name="__RefHeading___Toc5779_2530169349"/>6.9.6 Warum diese Testmethode sinnvoll war<text:bookmark-end text:name="__RefHeading___Toc5779_2530169349"/></text:h>
      <text:p text:style-name="P14">Die Aufteilung in mehrere Testschritte hatte den Vorteil, dass Fehler nicht versteckt wurden. Wenn ein kompletter Code direkt auf einmal getestet wird, ist oft unklar, welcher Teil die Ursache für ein Problem ist. Durch die Trennung in Motorentest, Kameratest und Gesamttest ließ sich genau feststellen, ob die Störung von der Hardware oder von der Software kam. Außerdem konnten dadurch Änderungen gezielter vorgenommen werden, ohne andere Funktionen unnötig zu beeinflussen.</text:p>
      <text:h text:style-name="P35" text:outline-level="1"><text:bookmark-start text:name="__RefHeading___Toc5781_2530169349"/><text:soft-page-break/><text:span text:style-name="T16">7. Ergebnisse und Bewertung</text:span><text:bookmark-end text:name="__RefHeading___Toc5781_2530169349"/></text:h>
      <text:p text:style-name="P14">In diesem Kapitel werden die erzielten Projektergebnisse zusammengefasst und gegen die ursprünglichen Anforderungen abgeglichen.</text:p>
      <text:p text:style-name="Standard"/>
      <text:h text:style-name="P16" text:outline-level="2"><text:bookmark-start text:name="__RefHeading___Toc5783_2530169349"/>7.1 Erfüllung der Anforderungen<text:bookmark-end text:name="__RefHeading___Toc5783_2530169349"/></text:h>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P19">Anforderung</text:p>
            </table:table-cell>
            <table:table-cell table:style-name="Tabelle11.A1" office:value-type="string">
              <text:p text:style-name="P19">Status</text:p>
            </table:table-cell>
            <table:table-cell table:style-name="Tabelle11.A1" office:value-type="string">
              <text:p text:style-name="P19">Anmerkung</text:p>
            </table:table-cell>
          </table:table-row>
        </table:table-header-rows>
        <table:table-row table:style-name="Tabelle11.1">
          <table:table-cell table:style-name="Tabelle11.A2" office:value-type="string">
            <text:p text:style-name="P20">Fernsteuerung per Browser</text:p>
          </table:table-cell>
          <table:table-cell table:style-name="Tabelle11.A2" office:value-type="string">
            <text:p text:style-name="P20">Erfüllt</text:p>
          </table:table-cell>
          <table:table-cell table:style-name="Tabelle11.A2" office:value-type="string">
            <text:p text:style-name="P20">9 Richtungen, WASD + Buttons</text:p>
          </table:table-cell>
        </table:table-row>
        <table:table-row table:style-name="Tabelle11.1">
          <table:table-cell table:style-name="Tabelle11.A2" office:value-type="string">
            <text:p text:style-name="P20">Live-Kamerastream</text:p>
          </table:table-cell>
          <table:table-cell table:style-name="Tabelle11.A2" office:value-type="string">
            <text:p text:style-name="P20">Erfüllt</text:p>
          </table:table-cell>
          <table:table-cell table:style-name="Tabelle11.A2" office:value-type="string">
            <text:p text:style-name="P20">Poll-basiertes JPEG, ~7 FPS</text:p>
          </table:table-cell>
        </table:table-row>
        <table:table-row table:style-name="Tabelle11.1">
          <table:table-cell table:style-name="Tabelle11.A2" office:value-type="string">
            <text:p text:style-name="P20">4WD-Antrieb mit Tank-Lenkung</text:p>
          </table:table-cell>
          <table:table-cell table:style-name="Tabelle11.A2" office:value-type="string">
            <text:p text:style-name="P20">Erfüllt</text:p>
          </table:table-cell>
          <table:table-cell table:style-name="Tabelle11.A2" office:value-type="string">
            <text:p text:style-name="P20">H-Bridge-Steuerung korrekt</text:p>
          </table:table-cell>
        </table:table-row>
        <table:table-row table:style-name="Tabelle11.1">
          <table:table-cell table:style-name="Tabelle11.A2" office:value-type="string">
            <text:p text:style-name="P20">Diagonale Fahrtrichtungen</text:p>
          </table:table-cell>
          <table:table-cell table:style-name="Tabelle11.A2" office:value-type="string">
            <text:p text:style-name="P20">Erfüllt</text:p>
          </table:table-cell>
          <table:table-cell table:style-name="Tabelle11.A2" office:value-type="string">
            <text:p text:style-name="P20">Alle 4 Diagonalen implementiert</text:p>
          </table:table-cell>
        </table:table-row>
        <table:table-row table:style-name="Tabelle11.1">
          <table:table-cell table:style-name="Tabelle11.A2" office:value-type="string">
            <text:p text:style-name="P20">Automatischer WLAN-Aufbau</text:p>
          </table:table-cell>
          <table:table-cell table:style-name="Tabelle11.A2" office:value-type="string">
            <text:p text:style-name="P20">Erfüllt</text:p>
          </table:table-cell>
          <table:table-cell table:style-name="Tabelle11.A2" office:value-type="string">
            <text:p text:style-name="P20">DHCP, IP im Serial-Monitor</text:p>
          </table:table-cell>
        </table:table-row>
        <table:table-row table:style-name="Tabelle11.1">
          <table:table-cell table:style-name="Tabelle11.A2" office:value-type="string">
            <text:p text:style-name="P20">Mobile Bedienbarkeit</text:p>
          </table:table-cell>
          <table:table-cell table:style-name="Tabelle11.A2" office:value-type="string">
            <text:p text:style-name="P20">Erfüllt</text:p>
          </table:table-cell>
          <table:table-cell table:style-name="Tabelle11.A2" office:value-type="string">
            <text:p text:style-name="P20">Touchscreen-Events implementiert</text:p>
          </table:table-cell>
        </table:table-row>
        <table:table-row table:style-name="Tabelle11.1">
          <table:table-cell table:style-name="Tabelle11.A2" office:value-type="string">
            <text:p text:style-name="P20">PWM-Geschwindigkeitsregelung</text:p>
          </table:table-cell>
          <table:table-cell table:style-name="Tabelle11.A2" office:value-type="string">
            <text:p text:style-name="P20">Ausstehend</text:p>
          </table:table-cell>
          <table:table-cell table:style-name="Tabelle11.A2" office:value-type="string">
            <text:p text:style-name="P20">Für spätere Version geplant</text:p>
          </table:table-cell>
        </table:table-row>
      </table:table>
      <text:p text:style-name="Standard"/>
      <text:h text:style-name="P16" text:outline-level="2"><text:bookmark-start text:name="__RefHeading___Toc5785_2530169349"/>7.2 Technische Erkenntnisse<text:bookmark-end text:name="__RefHeading___Toc5785_2530169349"/></text:h>
      <text:p text:style-name="P14">Das Projekt hat gezeigt, dass der ESP32-CAM trotz seiner begrenzten Ressourcen in der Lage ist, mehrere Aufgaben gleichzeitig zu bewältigen – sofern die Software entsprechend optimiert ist. Wichtige Erkenntnisse:</text:p>
      <text:p text:style-name="Standard"/>
      <text:list text:continue-numbering="true" text:style-name="WWNum2">
        <text:list-item>
          <text:p text:style-name="P18">Ressourcenmanagement ist entscheidend: Zu hohe Kameraauflösung beeinträchtigt die gesamte Systemperformance. Die Wahl der richtigen Bildgröße ist ein wichtiger Optimierungsparameter.</text:p>
        </text:list-item>
        <text:list-item>
          <text:p text:style-name="P18">Non-blocking Code ist unverzichtbar: delay()-Aufrufe würden den Webserver blockieren und die Steuerung unbrauchbar machen.</text:p>
        </text:list-item>
        <text:list-item>
          <text:p text:style-name="P18">Inkrementelles Testen spart Zeit: Die schrittweise Teststrategie ermöglichte es, Fehlerquellen schnell zu isolieren und zu beheben.</text:p>
        </text:list-item>
        <text:list-item>
          <text:p text:style-name="P18">JavaScript verbessert die Benutzererfahrung: fetch()-basierte Kommunikation ohne Seitenneuladen ist für Echtzeit-Steuerung essenziell.</text:p>
        </text:list-item>
      </text:list>
      <text:p text:style-name="Standard"/>
      <text:h text:style-name="P16" text:outline-level="2"><text:bookmark-start text:name="__RefHeading___Toc5787_2530169349"/>7.3 Grenzen des Systems<text:bookmark-end text:name="__RefHeading___Toc5787_2530169349"/></text:h>
      <text:p text:style-name="P14">Das aktuelle System hat einige bekannte Einschränkungen, die bei der Weiterentwicklung berücksichtigt werden sollten:</text:p>
      <text:list text:continue-numbering="true" text:style-name="WWNum2">
        <text:list-item>
          <text:p text:style-name="P18">WLAN-Reichweite: Die Verbindungsqualität hängt stark vom Hotspot und der Umgebung ab. Die externe WLAN-Antenne verbessert die Reichweite, kann aber bei langen Distanzen oder Hindernissen nicht alle Verbindungsprobleme lösen.</text:p>
        </text:list-item>
        <text:list-item>
          <text:p text:style-name="P18">Keine Geschwindigkeitsregelung: Alle Motoren laufen mit voller Leistung. PWM-basierte Steuerung wäre für sanftere Manöver wünschenswert.</text:p>
        </text:list-item>
        <text:list-item>
          <text:p text:style-name="P18"><text:soft-page-break/>Kameralatenz: Bei schlechter WLAN-Verbindung kann die Bildverzögerung zunehmen. Eine adaptive Auflösungssteuerung könnte hier helfen.</text:p>
        </text:list-item>
        <text:list-item>
          <text:p text:style-name="P18">Passwort im Code: Die WLAN-Zugangsdaten sind im Quellcode hardcoded. Für einen produktiven Einsatz sollte ein Konfigurationsportal (WiFiManager) implementiert werden.</text:p>
        </text:list-item>
      </text:list>
      <text:p text:style-name="Standard"/>
      <text:h text:style-name="P15" text:outline-level="1"><text:bookmark-start text:name="__RefHeading___Toc5789_2530169349"/>8. Fazit und Ausblick<text:bookmark-end text:name="__RefHeading___Toc5789_2530169349"/></text:h>
      <text:h text:style-name="P16" text:outline-level="2"><text:bookmark-start text:name="__RefHeading___Toc5791_2530169349"/>8.1 Fazit<text:bookmark-end text:name="__RefHeading___Toc5791_2530169349"/></text:h>
      <text:p text:style-name="P14">Das Projekt VisionBot wurde erfolgreich abgeschlossen. Alle wesentlichen Projektziele wurden erreicht: Das Fahrzeug lässt sich zuverlässig über einen Webbrowser fernsteuern, überträgt in Echtzeit ein Kamerabild und reagiert schnell auf Steuerkommandos – ohne dass eine App oder eine direkte Kabelverbindung notwendig ist.</text:p>
      <text:p text:style-name="Standard"/>
      <text:p text:style-name="P14">Besonders wertvoll war die Erfahrung mit den Herausforderungen eines eingebetteten Echtzeitsystems: Die begrenzte Prozessorleistung und der knappe Arbeitsspeicher des ESP32-CAM erforderten eine sorgfältige Abstimmung aller Komponenten. Die schrittweise Teststrategie und die gezielte Fehlerbehebung haben gezeigt, wie wichtig systematisches Vorgehen in der Embedded-Entwicklung ist.</text:p>
      <text:p text:style-name="Standard"/>
      <text:p text:style-name="P14">Das Projekt verbindet auf anschauliche Weise mehrere Bereiche der Informationstechnik: Mikrocontroller-Programmierung, Netzwerkkommunikation, Webentwicklung und Elektronik. Es eignet sich damit hervorragend als Lernprojekt für angehende Techniker und Informatiker.</text:p>
      <text:p text:style-name="Standard"/>
      <text:h text:style-name="P16" text:outline-level="2"><text:bookmark-start text:name="__RefHeading___Toc5793_2530169349"/>8.2 Ausblick – Mögliche Erweiterungen<text:bookmark-end text:name="__RefHeading___Toc5793_2530169349"/></text:h>
      <text:p text:style-name="P14">Für zukünftige Versionen des VisionBots sind folgende Erweiterungen denkbar:</text:p>
      <text:p text:style-name="Standard"/>
      <text:list xml:id="list93860776654309" text:continue-numbering="true" text:style-name="WWNum2">
        <text:list-item>
          <text:p text:style-name="P18">PWM-Geschwindigkeitsregelung: Durch Pulsweitenmodulation könnte die Motorgeschwindigkeit stufenlos geregelt werden. Dies würde sanftere Beschleunigungen und präzisere Manöver ermöglichen.</text:p>
        </text:list-item>
        <text:list-item>
          <text:p text:style-name="P18">WiFiManager-Integration: Statt hardcodierter WLAN-Zugangsdaten könnte ein Konfigurationsportal implementiert werden, über das Hotspot-Name und Passwort bequem per Browser eingestellt werden.</text:p>
        </text:list-item>
        <text:list-item>
          <text:p text:style-name="P18">Verbesserte Weboberfläche: Eine Statusanzeige für WLAN-Qualität, Akkustand und Temperatur würde dem Fahrer wichtige Betriebsinformationen liefern.</text:p>
        </text:list-item>
        <text:list-item>
          <text:p text:style-name="P18">Höhere Kameraauflösung: Mit einer optimierten Stream-Architektur (z.B. echtes MJPEG mit separatem Task) könnte eine höhere Auflösung bei gleichbleibender Steuerungsperformance erreicht werden.</text:p>
        </text:list-item>
        <text:list-item>
          <text:p text:style-name="P18">Hinderniserkennung: Ein Ultraschallsensor (z.B. HC-SR04) könnte Hindernisse erkennen und die Motoren automatisch stoppen, bevor es zu einer Kollision kommt.</text:p>
        </text:list-item>
        <text:list-item>
          <text:p text:style-name="P18">OTA-Updates: Over-the-Air-Firmware-Updates würden das Einspielen neuer Software ohne physischen Zugriff auf den ESP32 ermöglichen.</text:p>
        </text:list-item>
      </text:list>
      <text:h text:style-name="P36" text:outline-level="1"><text:bookmark-start text:name="__RefHeading___Toc5795_2530169349"/><text:soft-page-break/><text:span text:style-name="T17">9. Nutzung der KI </text:span><text:span text:style-name="T18">(ChatGpt GPT-5.3 und Claude Sonnet 4.6)</text:span><text:bookmark-end text:name="__RefHeading___Toc5795_2530169349"/></text:h>
      <text:p text:style-name="P37">Zum Estellen dieses Dokumentes wurde die Hilfe von KI (Künstliche Intelligenz) angewandt. Dabei wurde <text:span text:style-name="T19">die KI ChatGpt (GPT – 5.3) </text:span>verwendet um Verständnisfragen zu klären, Fehler zu beheben <text:span text:style-name="T19">und den Code für </text:span>die HTML-Seite <text:span text:style-name="T19">so umzuschreiben, sodass</text:span> <text:span text:style-name="T19">es </text:span>übersichtlich<text:span text:style-name="T19">er</text:span> <text:span text:style-name="T19">und ordentlicher aussieht. Für das erstellen von allen Texten wurde die Hilfe von Claude Sonnet 4.6 benutzt. Hierfür wurde der KI immer ein Text für den jeweiligen Abschnitt gegeben, welches dann von der KI </text:span><text:span text:style-name="T8">inklusive</text:span><text:span text:style-name="T19"> der korrekten Rechtschreibung und Gram</text:span><text:span text:style-name="T20">ma</text:span><text:span text:style-name="T19">tik verbessert wurde. </text:span><text:span text:style-name="T21">Der vorgegebene Text wurde hierbei komplett selbst geschrieben.</text:span></text:p>
      <text:p text:style-name="P37"/>
      <text:p text:style-name="P37">Der eigenständig erbrachte Anteil dieser Arbeit umfasst insbesondere die Planung und Umsetzung des Projekts. Dazu gehören der Aufbau der Hardware, die Verkabelung der einzelnen Komponenten sowie das Testen und Beheben von Fehlern während der Entwicklung. Außerdem wurde der Programmcode eigenständig angepasst, erweitert und an die Anforderungen des Projekts angepasst, insbesondere im Bereich der Motorsteuerung und der Integration des Webservers mit der Kamera. Die grundlegende Funktionsweise des Systems wurde selbst erarbeitet und verstanden, während die verwendete KI lediglich unterstützend bei Verständnisfragen, Strukturierung und sprachlicher Verbesserung eingesetzt wurde. </text:p>
      <text:h text:style-name="P38" text:outline-level="2"><text:bookmark-start text:name="__RefHeading___Toc5797_2530169349"/>9.1 Prompts und Ergebnisse ( ChatGpt GPT-5.3)<text:bookmark-end text:name="__RefHeading___Toc5797_2530169349"/></text:h>
      <text:p text:style-name="P34">Die Auflösung ist verkehrt rum also um 180 grad verdreht kann man das irgendwie umdrehen im code?</text:p>
      <text:p text:style-name="Standard">- Antwort Der KI:</text:p>
      <text:p text:style-name="Standard">Du musst nach der <text:span text:style-name="Source_20_Text"><text:span text:style-name="T22">esp_camera_init()</text:span></text:span> Funktion ein paar Zeilen hinzufügen. </text:p>
      <text:p text:style-name="Standard">sensor_t * s = esp_camera_sensor_get();</text:p>
      <text:p text:style-name="Standard">s-&gt;set_vflip(s, 1); <text:s text:c="2"/>// Bild vertikal spiegeln</text:p>
      <text:p text:style-name="Standard">s-&gt;set_hmirror(s, 1); // Bild horizontal spiegeln</text:p>
      <text:p text:style-name="P39"><text:a xlink:type="simple" xlink:href="https://chatgpt.com/" text:style-name="Internet_20_link" text:visited-style-name="Visited_20_Internet_20_Link">https://chatgpt.com</text:a></text:p>
      <text:p text:style-name="Standard"/>
      <text:p text:style-name="P40">wie kann ich in meinem code das Livebild vergrößern oder verkleinern und wenn möglich kann ich die qualität ändern?</text:p>
      <text:p text:style-name="P40"/>
      <text:p text:style-name="P41">- <text:span text:style-name="T23">Antwort der KI:</text:span></text:p>
      <text:p text:style-name="P42">Du kannst das Livebild auf zwei Arten anpassen:</text:p>
      <text:p text:style-name="P43">Die <text:span text:style-name="Strong_20_Emphasis">Größe im Browser</text:span> änderst du im HTML-Code, indem du dem Bild eine Breite gibst (z. B. <text:span text:style-name="Source_20_Text">width: 400px</text:span>). Das verändert nur die Anzeige, nicht die echte Qualität.</text:p>
      <text:p text:style-name="P43">Die <text:span text:style-name="Strong_20_Emphasis">echte Bildqualität</text:span> stellst du im Code ein:</text:p>
      <text:list text:style-name="L1">
        <text:list-item>
          <text:p text:style-name="P44">Mit <text:span text:style-name="Source_20_Text">frame_size</text:span> änderst du die Auflösung (z. B. QVGA = klein, VGA = größer, aber langsamer)</text:p>
        </text:list-item>
        <text:list-item>
          <text:p text:style-name="P44">Mit <text:span text:style-name="Source_20_Text">jpeg_quality</text:span> stellst du die Qualität ein (kleinere Zahl = bessere Qualität, aber mehr Belastung)</text:p>
        </text:list-item>
      </text:list>
      <text:p text:style-name="P43">Zu hohe Werte können den ESP32 überlasten, deshalb ist ein Mittelwert am sinnvollsten.</text:p>
      <text:p text:style-name="P45"><text:a xlink:type="simple" xlink:href="https://chatgpt.com/" text:style-name="Internet_20_link" text:visited-style-name="Visited_20_Internet_20_Link">https://chatgpt.com</text:a></text:p>
      <text:p text:style-name="P45"/>
      <text:p text:style-name="P45">Zum Erstellen des Gannt-Diagramms in 3.4 wurde auch hier Chatgpt GPT 5.3 verwendet.</text:p>
      <text:p text:style-name="P45">(Anhang <text:span text:style-name="T24">der</text:span> odt Datei mit einer Tabelle der Arbeitspakete und Zeitdauer)</text:p>
      <text:p text:style-name="P46">könntest du mir zu folgender Tabelle einen Gannt-Diagramm erstellen?</text:p>
      <text:p text:style-name="P45">-Die KI antwortete mit dem fertigen und im Abschnitt 3.4 abgebildetem Gannt-Diagramm</text:p>
      <text:h text:style-name="P35" text:outline-level="1"><text:bookmark-start text:name="__RefHeading___Toc5799_2530169349"/><text:soft-page-break/><text:span text:style-name="T25">10</text:span><text:span text:style-name="T16">. Quellenverzeichnis</text:span><text:bookmark-end text:name="__RefHeading___Toc5799_2530169349"/></text:h>
      <text:p text:style-name="P47">Im Folgenden sind die Quellen aufgeführt, die bei der Entwicklung des Projekts genutzt wurden:</text:p>
      <text:p text:style-name="P48">Die Anhänge sind auch auf GitHub verfügbar unter der repository: <text:a xlink:type="simple" xlink:href="https://github.com/eren61ts/VisionBot.git" text:style-name="Internet_20_link" text:visited-style-name="Visited_20_Internet_20_Link">https://github.com/eren61ts/VisionBot.git</text:a></text:p>
      <text:p text:style-name="Standard"/>
      <text:p text:style-name="P27"><text:span text:style-name="T9">Offizielle Hersteller-Dokumentation (ZYC0024-EN-With</text:span><text:span text:style-name="T26">_</text:span><text:span text:style-name="T9">antenna, </text:span><text:span text:style-name="T27">im Anhang angehängt</text:span><text:span text:style-name="T9">):</text:span></text:p>
      <text:list text:continue-list="list93860776654309" text:style-name="WWNum2">
        <text:list-item>
          <text:p text:style-name="P18">2-ESP32 camera Car -EN.pdf – Offizielle Anleitung des Herstellers zum ESP32 Camera Car Kit ZYC0024</text:p>
        </text:list-item>
        <text:list-item>
          <text:p text:style-name="P18">1-DIY surveillance camera with ESP32 camera-EN.pdf – Anleitung für DIY-Kamera-Variante</text:p>
        </text:list-item>
        <text:list-item>
          <text:p text:style-name="P18">3_datasheet/About this kit-EN.pdf – Allgemeine Kitbeschreibung und Komponentenübersicht</text:p>
        </text:list-item>
        <text:list-item>
          <text:p text:style-name="P18">3_datasheet/ESP 32 CAM.pdf – ESP32-CAM Datenblatt des Herstellers</text:p>
        </text:list-item>
        <text:list-item>
          <text:p text:style-name="P18">3_datasheet/ESP32-wrover_datasheet_en.pdf – ESP32-WROVER technische Referenz von Espressif</text:p>
        </text:list-item>
        <text:list-item>
          <text:p text:style-name="P18">1_Get_start/Get started with Arduino-EN.pdf – Arduino IDE Einrichtungsanleitung des Kits</text:p>
        </text:list-item>
        <text:list-item>
          <text:p text:style-name="P18">2_Arduino_Code/Readme.txt – Readme des mitgelieferten Originalcodes</text:p>
        </text:list-item>
      </text:list>
      <text:p text:style-name="P49"/>
      <text:p text:style-name="P50">Beispiel aus der Arduino Bibliothek Esp32 --&gt; camera --&gt; CameraWebServer</text:p>
      <text:p text:style-name="Standard"/>
      <text:p text:style-name="P14"><text:line-break/>Weitere Quellen:</text:p>
      <text:list text:continue-numbering="true" text:style-name="WWNum2">
        <text:list-item>
          <text:p text:style-name="P51">Espressif Systems – Offizielle technische Dokumentation:</text:p>
          <text:p text:style-name="P52">Espressif esp32-camera GitHub Repository: <text:a xlink:type="simple" xlink:href="https://github.com/espressif/esp32-camera" text:style-name="Internet_20_link" text:visited-style-name="Visited_20_Internet_20_Link">https://github.com/espressif/esp32-camera</text:a></text:p>
          <text:p text:style-name="P52">Arduino ESP32 Bibliothek (WebServer.h): <text:a xlink:type="simple" xlink:href="https://github.com/espressif/arduino-esp32/tree/master/libraries/WebServer" text:style-name="Internet_20_link" text:visited-style-name="Visited_20_Internet_20_Link">https://github.com/espressif/arduino-esp32/tree/master/libraries/WebServer</text:a></text:p>
          <text:p text:style-name="P53"/>
        </text:list-item>
        <text:list-item>
          <text:p text:style-name="P51">OV2640 Kamerasensor:</text:p>
          <text:p text:style-name="P52">OV2640 Camera Module Datasheet (PDF): <text:a xlink:type="simple" xlink:href="https://www.uctronics.com/download/cam_module/OV2640DS.pdf" text:style-name="Internet_20_link" text:visited-style-name="Visited_20_Internet_20_Link">https://www.uctronics.com/download/cam_module/OV2640DS.pdf</text:a></text:p>
          <text:p text:style-name="P52"/>
        </text:list-item>
        <text:list-item>
          <text:p text:style-name="P51">Arduino IDE und Entwicklungsumgebung:</text:p>
          <text:p text:style-name="P52">Arduino IDE Download und Dokumentation: https://docs.arduino.cc/software/ide-v2/</text:p>
          <text:p text:style-name="P52">Arduino ESP32 Boardpaket – Installationsanleitung: <text:a xlink:type="simple" xlink:href="https://docs.espressif.com/projects/arduino-esp32/en/latest/installing.html" text:style-name="Internet_20_link" text:visited-style-name="Visited_20_Internet_20_Link">https://docs.espressif.com/projects/arduino-esp32/en/latest/installing.html</text:a></text:p>
          <text:p text:style-name="P52">Arduino Sprachreferenz (C++ für Arduino): <text:a xlink:type="simple" xlink:href="https://www.arduino.cc/reference/en/" text:style-name="Internet_20_link" text:visited-style-name="Visited_20_Internet_20_Link">https://www.arduino.cc/reference/en/</text:a></text:p>
        </text:list-item>
      </text:list>
      <text:p text:style-name="P54"/>
      <text:p text:style-name="P54"/>
      <text:p text:style-name="P54"/>
      <text:list text:continue-numbering="true" text:style-name="WWNum2">
        <text:list-item>
          <text:p text:style-name="P51"><text:soft-page-break/>Webtechnologien (HTML, CSS, JavaScript):</text:p>
          <text:p text:style-name="P52">MDN Web Docs – Fetch API (JavaScript): <text:a xlink:type="simple" xlink:href="https://developer.mozilla.org/en-US/docs/Web/API/Fetch_API" text:style-name="Internet_20_link" text:visited-style-name="Visited_20_Internet_20_Link">https://developer.mozilla.org/en-US/docs/Web/API/Fetch_API</text:a></text:p>
          <text:p text:style-name="P52">MDN Web Docs – HTML Grundlagen: <text:a xlink:type="simple" xlink:href="https://developer.mozilla.org/en-US/docs/Learn/HTML/Introduction_to_HTML" text:style-name="Internet_20_link" text:visited-style-name="Visited_20_Internet_20_Link">https://developer.mozilla.org/en-US/docs/Learn/HTML/Introduction_to_HTML</text:a></text:p>
          <text:p text:style-name="P52">MDN Web Docs – setInterval() für periodischen Bildabruf: <text:a xlink:type="simple" xlink:href="https://developer.mozilla.org/en-US/docs/Web/API/setInterval" text:style-name="Internet_20_link" text:visited-style-name="Visited_20_Internet_20_Link">https://developer.mozilla.org/en-US/docs/Web/API/setInterval</text:a></text:p>
          <text:p text:style-name="P53"/>
        </text:list-item>
        <text:list-item>
          <text:p text:style-name="P51">Tutorials und Lernmaterial (mit Abrufdatum 07.04.2026):</text:p>
          <text:p text:style-name="P55">Random Nerd Tutorials – ESP32-CAM Video Streaming Web Server: <text:a xlink:type="simple" xlink:href="https://randomnerdtutorials.com/esp32-cam-video-streaming-web-server-camera-home-assistant/" text:style-name="Internet_20_link" text:visited-style-name="Visited_20_Internet_20_Link">https://randomnerdtutorials.com/esp32-cam-video-streaming-web-server-camera-home-assistant/</text:a> (abgerufen 07.04.2026)</text:p>
          <text:p text:style-name="P55">Random Nerd Tutorials – ESP32-CAM Pinout Guide: <text:a xlink:type="simple" xlink:href="https://randomnerdtutorials.com/esp32-cam-ai-thinker-pinout/" text:style-name="Internet_20_link" text:visited-style-name="Visited_20_Internet_20_Link">https://randomnerdtutorials.com/esp32-cam-ai-thinker-pinout/</text:a> (abgerufen 07.04.2026)</text:p>
          <text:p text:style-name="P55">Last Minute Engineers – L298N Motor Driver Tutorial: <text:a xlink:type="simple" xlink:href="https://lastminuteengineers.com/l298n-dc-stepper-driver-arduino-tutorial/" text:style-name="Internet_20_link" text:visited-style-name="Visited_20_Internet_20_Link">https://lastminuteengineers.com/l298n-dc-stepper-driver-arduino-tutorial/</text:a> (abgerufen 07.04.2026)</text:p>
          <text:p text:style-name="P55">Dronebot Workshop – ESP32-CAM Introduction: <text:a xlink:type="simple" xlink:href="https://dronebotworkshop.com/esp32-cam-intro/" text:style-name="Internet_20_link" text:visited-style-name="Visited_20_Internet_20_Link">https://dronebotworkshop.com/esp32-cam-intro/</text:a> (abgerufen 07.04.2026)</text:p>
        </text:list-item>
      </text:list>
      <text:h text:style-name="P35" text:outline-level="1"><text:bookmark-start text:name="__RefHeading___Toc5801_2530169349"/><text:span text:style-name="T16"><text:line-break/>1</text:span><text:span text:style-name="T25">1</text:span><text:span text:style-name="T16">. English Summary</text:span><text:bookmark-end text:name="__RefHeading___Toc5801_2530169349"/></text:h>
      <text:p text:style-name="P56"><text:span text:style-name="Strong_20_Emphasis">VisionBot – English Summary</text:span> <text:span text:style-name="Strong_20_Emphasis">Written by: Baser Eren &amp; Kevin-Noel Seeling</text:span> <text:span text:style-name="Strong_20_Emphasis">Date: 11th of March 2026</text:span></text:p>
      <text:p text:style-name="P57">In this project, we built a remote-controlled RC car called VisionBot that can be fully controlled through a web browser while simultaneously streaming live footage from an integrated front-facing camera. Our goal was to combine mechanical assembly, electrical wiring, and software development into one fully functioning system. From the beginning, we divided the work according to our strengths: Kevin focused on the hardware side, including assembling the chassis, wiring the components, and mounting the camera, while Eren concentrated on the software, including the web server, camera stream, and the control interface.</text:p>
      <text:p text:style-name="P57">On the hardware side, Kevin assembled the two-layer acrylic chassis from the ground up, attaching all four wheels to their axles and ensuring they were straight and could turn freely. He then connected the motors, power supply, and the ESP32-CAM module and mounted the camera securely at the front of the car so it faced directly forward without shaking during movement. This process was not without difficulties. At one point, several cables had been connected to the wrong pins, which caused the car to not start at all. Kevin had to disassemble the wiring almost entirely and rebuild it from scratch. Although frustrating, this experience taught him how important it is to check every detail carefully and understand how each wire affects the overall system. Once the wiring was corrected, the car came to life and all four wheels turned properly with a stable and clear camera image.</text:p>
      <text:p text:style-name="P57"><text:soft-page-break/>On the software side, Eren set up the ESP32-CAM as both a web server and a video streamer, configured the Wi-Fi connection, defined routes for all control commands, and built the HTML interface that displays the live camera feed alongside the directional control buttons. A major challenge was combining camera streaming, motor control, and the web interface in a single program, as adding more features caused some functions to interfere with each other. Through extensive testing and debugging, the code was gradually optimized until one stable program handled all planned functions reliably.</text:p>
      <text:p text:style-name="P57">Although the main goal has been achieved and the VisionBot works as intended, both of us see room for further improvement. Planned enhancements include smoother speed control using PWM, a more intuitive keyboard and touch-based interface, real-time indicators for connection strength and frame rate, and a more secure web server. This project gave us both valuable hands-on experience in embedded systems, networking, mechanical assembly, and problem-solving under real hardware constraints.</text:p>
      <text:p text:style-name="P27"/>
      <text:h text:style-name="P35" text:outline-level="1"><text:bookmark-start text:name="__RefHeading___Toc5803_2530169349"/><text:span text:style-name="T16">A. An</text:span><text:span text:style-name="T28">h</text:span><text:span text:style-name="T16">ang</text:span><text:bookmark-end text:name="__RefHeading___Toc5803_2530169349"/></text:h>
      <text:h text:style-name="P16" text:outline-level="2"><text:bookmark-start text:name="__RefHeading___Toc5805_2530169349"/>A.1 Quellcode<text:bookmark-end text:name="__RefHeading___Toc5805_2530169349"/></text:h>
      <text:p text:style-name="P14">Der vollständige Quellcode befindet sich in der <text:span text:style-name="T24">GitHub repository (</text:span>projekt_html.ino<text:span text:style-name="T24">)</text:span></text:p>
      <text:p text:style-name="P58"><text:span text:style-name="T29">Die Datenblätter des Herstellers wurden ebenfalls </text:span><text:span text:style-name="T30">als zip-Datei in der GitHub repository angehängt (ZYC0024-EN-With antenna.zip</text:span><text:span text:style-name="T24">)</text:span></text:p>
      <text:p text:style-name="Standard"><text:span text:style-name="T31"/></text:p>
      <text:h text:style-name="P59" text:outline-level="1"><text:bookmark-start text:name="__RefHeading___Toc5807_2530169349"/>B. Bedienungs-Anleitung<text:bookmark-end text:name="__RefHeading___Toc5807_2530169349"/></text:h>
      <text:h text:style-name="P16" text:outline-level="2"><text:bookmark-start text:name="__RefHeading___Toc5809_2530169349"/>B.1 Voraussetzungen<text:bookmark-end text:name="__RefHeading___Toc5809_2530169349"/></text:h>
      <text:list text:continue-numbering="true" text:style-name="WWNum2">
        <text:list-item>
          <text:p text:style-name="P18">Ein WLAN-Hotspot mit 2,4-GHz-Netz (kein 5-GHz-Netz – der ESP32 unterstützt nur 2,4 GHz)</text:p>
        </text:list-item>
        <text:list-item>
          <text:p text:style-name="P18">Ein Gerät mit Webbrowser (Smartphone, Tablet oder Computer) im gleichen WLAN</text:p>
        </text:list-item>
        <text:list-item>
          <text:p text:style-name="P18">Vollständig geladene 18650-Akkus im Fahrzeug</text:p>
        </text:list-item>
      </text:list>
      <text:p text:style-name="Standard"/>
      <text:h text:style-name="P16" text:outline-level="2"><text:bookmark-start text:name="__RefHeading___Toc5811_2530169349"/>B.2 Inbetriebnahme<text:bookmark-end text:name="__RefHeading___Toc5811_2530169349"/></text:h>
      <text:p text:style-name="P14">Schritt 1 – Akkus einlegen: Die beiden 18650-Zellen in den Halter einsetzen (Polung beachten) und den Schalter auf EIN stellen.</text:p>
      <text:p text:style-name="Standard"/>
      <text:p text:style-name="P14">Schritt 2 – Startvorgang abwarten: Der ESP32-CAM startet automatisch. Eine Onboard-LED blinkt kurz auf. Der Startvorgang dauert ca. 10–15 Sekunden, bis die WLAN-Verbindung hergestellt ist.</text:p>
      <text:p text:style-name="Standard"/>
      <text:p text:style-name="P14">Schritt 3 – IP-Adresse ermitteln: Die IP-Adresse wird im seriellen Monitor (Arduino IDE, 115200 Baud) angezeigt, sobald das WLAN verbunden ist. Alternativ kann sie im WLAN-Router nachgeschlagen werden.</text:p>
      <text:p text:style-name="Standard"><text:soft-page-break/></text:p>
      <text:p text:style-name="P14">Schritt 4 – Browser öffnen: Auf dem Steuergerät den Browser öffnen und die IP-Adresse in die Adresszeile eingeben (z.B. http://192.168.1.100). Kein HTTPS notwendig.</text:p>
      <text:p text:style-name="Standard"/>
      <text:p text:style-name="P14">Schritt 5 – Weboberfläche lädt: Es erscheint die VisionBot-Steuerseite mit dem Live-Kamerabild oben und den Steuerbuttons darunter.</text:p>
      <text:p text:style-name="Standard"/>
      <text:h text:style-name="P16" text:outline-level="2"><text:bookmark-start text:name="__RefHeading___Toc5813_2530169349"/>B.3 Steuerung<text:bookmark-end text:name="__RefHeading___Toc5813_2530169349"/></text:h>
      <table:table table:name="Tabelle15" table:style-name="Tabelle15">
        <table:table-column table:style-name="Tabelle15.A"/>
        <table:table-column table:style-name="Tabelle15.B"/>
        <table:table-header-rows>
          <table:table-row table:style-name="Tabelle15.1">
            <table:table-cell table:style-name="Tabelle15.A1" office:value-type="string">
              <text:p text:style-name="P19">Eingabe</text:p>
            </table:table-cell>
            <table:table-cell table:style-name="Tabelle15.A1" office:value-type="string">
              <text:p text:style-name="P19">Aktion</text:p>
            </table:table-cell>
          </table:table-row>
        </table:table-header-rows>
        <table:table-row table:style-name="Tabelle15.1">
          <table:table-cell table:style-name="Tabelle15.A2" office:value-type="string">
            <text:p text:style-name="P20">Button ↑ (oder Taste W)</text:p>
          </table:table-cell>
          <table:table-cell table:style-name="Tabelle15.A2" office:value-type="string">
            <text:p text:style-name="P20">Vorwärts fahren</text:p>
          </table:table-cell>
        </table:table-row>
        <table:table-row table:style-name="Tabelle15.1">
          <table:table-cell table:style-name="Tabelle15.A2" office:value-type="string">
            <text:p text:style-name="P20">Button ↓ (oder Taste S)</text:p>
          </table:table-cell>
          <table:table-cell table:style-name="Tabelle15.A2" office:value-type="string">
            <text:p text:style-name="P20">Rückwärts fahren</text:p>
          </table:table-cell>
        </table:table-row>
        <table:table-row table:style-name="Tabelle15.1">
          <table:table-cell table:style-name="Tabelle15.A2" office:value-type="string">
            <text:p text:style-name="P20">Button ← (oder Taste A)</text:p>
          </table:table-cell>
          <table:table-cell table:style-name="Tabelle15.A2" office:value-type="string">
            <text:p text:style-name="P20">Links drehen (Tank)</text:p>
          </table:table-cell>
        </table:table-row>
        <table:table-row table:style-name="Tabelle15.1">
          <table:table-cell table:style-name="Tabelle15.A2" office:value-type="string">
            <text:p text:style-name="P20">Button → (oder Taste D)</text:p>
          </table:table-cell>
          <table:table-cell table:style-name="Tabelle15.A2" office:value-type="string">
            <text:p text:style-name="P20">Rechts drehen (Tank)</text:p>
          </table:table-cell>
        </table:table-row>
        <table:table-row table:style-name="Tabelle15.1">
          <table:table-cell table:style-name="Tabelle15.A2" office:value-type="string">
            <text:p text:style-name="P20">Button ↖ (oder Tasten W+A)</text:p>
          </table:table-cell>
          <table:table-cell table:style-name="Tabelle15.A2" office:value-type="string">
            <text:p text:style-name="P20">Schräg vorwärts-links</text:p>
          </table:table-cell>
        </table:table-row>
        <table:table-row table:style-name="Tabelle15.1">
          <table:table-cell table:style-name="Tabelle15.A2" office:value-type="string">
            <text:p text:style-name="P20">Button ↗ (oder Tasten W+D)</text:p>
          </table:table-cell>
          <table:table-cell table:style-name="Tabelle15.A2" office:value-type="string">
            <text:p text:style-name="P20">Schräg vorwärts-rechts</text:p>
          </table:table-cell>
        </table:table-row>
        <table:table-row table:style-name="Tabelle15.1">
          <table:table-cell table:style-name="Tabelle15.A2" office:value-type="string">
            <text:p text:style-name="P20">Button ↙ (oder Tasten S+A)</text:p>
          </table:table-cell>
          <table:table-cell table:style-name="Tabelle15.A2" office:value-type="string">
            <text:p text:style-name="P20">Schräg rückwärts-links</text:p>
          </table:table-cell>
        </table:table-row>
        <table:table-row table:style-name="Tabelle15.1">
          <table:table-cell table:style-name="Tabelle15.A2" office:value-type="string">
            <text:p text:style-name="P20">Button ↘ (oder Tasten S+D)</text:p>
          </table:table-cell>
          <table:table-cell table:style-name="Tabelle15.A2" office:value-type="string">
            <text:p text:style-name="P20">Schräg rückwärts-rechts</text:p>
          </table:table-cell>
        </table:table-row>
        <table:table-row table:style-name="Tabelle15.1">
          <table:table-cell table:style-name="Tabelle15.A2" office:value-type="string">
            <text:p text:style-name="P20">STOP-Button (rot)</text:p>
          </table:table-cell>
          <table:table-cell table:style-name="Tabelle15.A2" office:value-type="string">
            <text:p text:style-name="P20">Sofortiger Motorstopp</text:p>
          </table:table-cell>
        </table:table-row>
        <table:table-row table:style-name="Tabelle15.1">
          <table:table-cell table:style-name="Tabelle15.A2" office:value-type="string">
            <text:p text:style-name="P20">Taste/Button loslassen</text:p>
          </table:table-cell>
          <table:table-cell table:style-name="Tabelle15.A2" office:value-type="string">
            <text:p text:style-name="P20">Automatischer Stopp</text:p>
          </table:table-cell>
        </table:table-row>
      </table:table>
      <text:p text:style-name="Standard"/>
      <text:h text:style-name="P16" text:outline-level="2"><text:bookmark-start text:name="__RefHeading___Toc5815_2530169349"/>B.4 Fehlerbehebung<text:bookmark-end text:name="__RefHeading___Toc5815_2530169349"/></text:h>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P19">Problem</text:p>
            </table:table-cell>
            <table:table-cell table:style-name="Tabelle16.A1" office:value-type="string">
              <text:p text:style-name="P19">Mögliche Ursache</text:p>
            </table:table-cell>
            <table:table-cell table:style-name="Tabelle16.A1" office:value-type="string">
              <text:p text:style-name="P19">Lösung</text:p>
            </table:table-cell>
          </table:table-row>
        </table:table-header-rows>
        <table:table-row table:style-name="Tabelle16.1">
          <table:table-cell table:style-name="Tabelle16.A2" office:value-type="string">
            <text:p text:style-name="P20">Kein Kamerabild</text:p>
          </table:table-cell>
          <table:table-cell table:style-name="Tabelle16.A2" office:value-type="string">
            <text:p text:style-name="P20">WLAN-Verbindung unterbrochen</text:p>
          </table:table-cell>
          <table:table-cell table:style-name="Tabelle16.A2" office:value-type="string">
            <text:p text:style-name="P20">ESP32 neu starten (Strom trennen/verbinden)</text:p>
          </table:table-cell>
        </table:table-row>
        <table:table-row table:style-name="Tabelle16.1">
          <table:table-cell table:style-name="Tabelle16.A2" office:value-type="string">
            <text:p text:style-name="P20">Kamerabild verzögert</text:p>
          </table:table-cell>
          <table:table-cell table:style-name="Tabelle16.A2" office:value-type="string">
            <text:p text:style-name="P20">WLAN-Signal schwach</text:p>
          </table:table-cell>
          <table:table-cell table:style-name="Tabelle16.A2" office:value-type="string">
            <text:p text:style-name="P20">Näher an den Hotspot fahren</text:p>
          </table:table-cell>
        </table:table-row>
        <table:table-row table:style-name="Tabelle16.1">
          <table:table-cell table:style-name="Tabelle16.A2" office:value-type="string">
            <text:p text:style-name="P20">Auto reagiert nicht auf Buttons</text:p>
          </table:table-cell>
          <table:table-cell table:style-name="Tabelle16.A2" office:value-type="string">
            <text:p text:style-name="P20">Browser-Verbindung verloren</text:p>
          </table:table-cell>
          <table:table-cell table:style-name="Tabelle16.A2" office:value-type="string">
            <text:p text:style-name="P20">Seite neu laden (F5)</text:p>
          </table:table-cell>
        </table:table-row>
        <table:table-row table:style-name="Tabelle16.1">
          <table:table-cell table:style-name="Tabelle16.A2" office:value-type="string">
            <text:p text:style-name="P20">Auto fährt in falsche Richtung</text:p>
          </table:table-cell>
          <table:table-cell table:style-name="Tabelle16.A2" office:value-type="string">
            <text:p text:style-name="P20">Motorkabel vertauscht</text:p>
          </table:table-cell>
          <table:table-cell table:style-name="Tabelle16.A2" office:value-type="string">
            <text:p text:style-name="P20">Kabel am L298N-Ausgang tauschen</text:p>
          </table:table-cell>
        </table:table-row>
        <table:table-row table:style-name="Tabelle16.1">
          <table:table-cell table:style-name="Tabelle16.A2" office:value-type="string">
            <text:p text:style-name="P20">Webseite nicht erreichbar</text:p>
          </table:table-cell>
          <table:table-cell table:style-name="Tabelle16.A2" office:value-type="string">
            <text:p text:style-name="P20">Falsches WLAN-Netz (5 GHz)</text:p>
          </table:table-cell>
          <table:table-cell table:style-name="Tabelle16.A2" office:value-type="string">
            <text:p text:style-name="P20">Auf 2,4-GHz-Netz wechseln</text:p>
          </table:table-cell>
        </table:table-row>
        <table:table-row table:style-name="Tabelle16.1">
          <table:table-cell table:style-name="Tabelle16.A2" office:value-type="string">
            <text:p text:style-name="P20">ESP32 startet nicht</text:p>
          </table:table-cell>
          <table:table-cell table:style-name="Tabelle16.A2" office:value-type="string">
            <text:p text:style-name="P20">Akkus leer oder falsch eingelegt</text:p>
          </table:table-cell>
          <table:table-cell table:style-name="Tabelle16.A2" office:value-type="string">
            <text:p text:style-name="P20">Akkus prüfen und laden</text:p>
          </table:table-cell>
        </table:table-row>
      </table:table>
      <text:p text:style-name="Standard"/>
      <text:h text:style-name="P16" text:outline-level="2"><text:bookmark-start text:name="__RefHeading___Toc5817_2530169349"/><text:soft-page-break/><text:line-break/><text:line-break/>B.5 Sicherheitshinweise<text:bookmark-end text:name="__RefHeading___Toc5817_2530169349"/></text:h>
      <text:list text:continue-numbering="true" text:style-name="WWNum2">
        <text:list-item>
          <text:p text:style-name="P18">Das Fahrzeug nicht auf Treppen, erhöhten Flächen oder in der Nähe von Wasser betreiben.</text:p>
        </text:list-item>
        <text:list-item>
          <text:p text:style-name="P18">Die 18650-Akkus nur mit einem geeigneten Lithium-Ionen-Ladegerät laden.</text:p>
        </text:list-item>
        <text:list-item>
          <text:p text:style-name="P18">Bei Rauch, Geruch oder starker Erwärmung sofort den Strom trennen.</text:p>
        </text:list-item>
        <text:list-item>
          <text:p text:style-name="P18">Das Fahrzeug nicht unbeaufsichtigt betreiben.</text:p>
        </text:list-item>
      </text:list>
      <text:p text:style-name="P60">Selbstständigkeitserklärung</text:p>
      <text:p text:style-name="P61"/>
      <text:p text:style-name="P61">Hiermit erklären wir,</text:p>
      <text:p text:style-name="P61"/>
      <text:p text:style-name="P62">Kevin Seeling <text:s text:c="4"/><text:span text:style-name="T32">und <text:s text:c="4"/></text:span>Eren Baser</text:p>
      <text:p text:style-name="P62"/>
      <text:p text:style-name="P63">dass wir die vorliegende Projektarbeit mit dem Titel</text:p>
      <text:p text:style-name="P63"/>
      <text:p text:style-name="P64">“VisionBot”</text:p>
      <text:p text:style-name="P14"/>
      <text:p text:style-name="P65">selbstständig und nur mit den angegebenen Hilfsmitteln angefertigt haben.</text:p>
      <text:p text:style-name="P27"/>
      <text:p text:style-name="P14">Alle Stellen, die dem Sinn oder dem Wortlaut nach anderen Werken entnommen sind, wurden durch Angabe der Quellen kenntlich gemacht. Alle wörtlich entnommenen Stellen sind als Zitate gekennzeichnet.</text:p>
      <text:p text:style-name="Standard"/>
      <text:p text:style-name="Standard"/>
      <text:p text:style-name="Standard"/>
      <text:p text:style-name="Standard"/>
      <text:p text:style-name="Standard"/>
      <text:p text:style-name="Standard"/>
      <text:p text:style-name="P66"><text:span text:style-name="T33">Mannheim</text:span><text:span text:style-name="T9">, den ____________________<text:tab/></text:span><text:span text:style-name="T33"><text:tab/><text:tab/>_______________________</text:span></text:p>
      <text:p text:style-name="P67">Ort, Datum<text:tab/><text:tab/><text:tab/><text:tab/><text:tab/><text:tab/><text:tab/><text:tab/>Unterschrift <text:span text:style-name="T34">Seeling Kevin</text:span></text:p>
      <text:p text:style-name="P14"/>
      <text:p text:style-name="P67"/>
      <text:p text:style-name="P67"/>
      <text:p text:style-name="P66"><text:span text:style-name="T33">M</text:span><text:span text:style-name="T35">annheim</text:span><text:span text:style-name="T36">, den </text:span><text:span text:style-name="T9">____________________<text:tab/></text:span><text:span text:style-name="T33"><text:tab/><text:tab/>_______________________</text:span></text:p>
      <text:p text:style-name="P68"><text:span text:style-name="T37">Ort, Datum</text:span><text:tab/><text:tab/><text:tab/><text:tab/><text:tab/><text:tab/><text:tab/><text:tab/><text:span text:style-name="T37">Unterschrift </text:span><text:span text:style-name="T34">Baser Eren</text:span></text:p>
      <text:p text:style-name="P14"/>
      <text:p text:style-name="P14"/>
      <text:p text:style-name="Standard"/>
      <text:p text:style-name="P14"/>
      <text:p text:style-name="P6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1" fo:font-size="12pt" fo:language="en" fo:country="GY" style:letter-kerning="false" style:font-name-asian="Liberation Sans" style:font-size-asian="12pt" style:language-asian="zh" style:country-asian="CN" style:font-name-complex="Liberation Sans3"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Liberation Sans1" fo:font-size="12pt" fo:language="en" fo:country="GY" style:letter-kerning="false" style:font-name-asian="Liberation Sans" style:font-size-asian="12pt" style:language-asian="zh" style:country-asian="CN" style:font-name-complex="Liberation Sans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2"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sian="Segoe UI" style:font-family-asian="'Segoe UI'"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Segoe UI" style:font-family-asian="'Segoe UI'"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Segoe UI" style:font-family-asian="'Segoe UI'" style:font-size-asian="12pt" style:font-name-complex="Arial"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529cm" fo:margin-bottom="0.282cm" style:contextual-spacing="false"/>
      <style:text-properties fo:color="#146356" loext:opacity="100%" style:font-name="Liberation Sans2" fo:font-family="'Liberation Sans'" style:font-family-generic="swiss" style:font-pitch="variable" fo:font-size="14pt" fo:font-weight="bold" style:font-name-asian="Liberation Sans3" style:font-family-asian="'Liberation Sans'" style:font-family-generic-asian="system" style:font-pitch-asian="variable" style:font-size-asian="14pt" style:font-weight-asian="bold" style:font-name-complex="Liberation Sans3" style:font-family-complex="'Liberation Sans'" style:font-family-generic-complex="system" style:font-pitch-complex="variable" style:font-size-complex="14pt" style:font-weight-complex="bold"/>
    </style:style>
    <style:style style:name="Heading_20_2" style:display-name="Heading 2" style:family="paragraph" style:parent-style-name="Heading" style:default-outline-level="2" style:list-style-name="" style:class="chapter">
      <style:paragraph-properties fo:margin-top="0.423cm" fo:margin-bottom="0.212cm" style:contextual-spacing="false"/>
      <style:text-properties fo:color="#1a5c52" loext:opacity="100%" style:font-name="Liberation Sans2" fo:font-family="'Liberation Sans'" style:font-family-generic="swiss" style:font-pitch="variable" fo:font-size="13pt" fo:font-weight="bold" style:font-name-asian="Liberation Sans3" style:font-family-asian="'Liberation Sans'" style:font-family-generic-asian="system" style:font-pitch-asian="variable" style:font-size-asian="13pt" style:font-weight-asian="bold" style:font-name-complex="Liberation Sans3" style:font-family-complex="'Liberation Sans'"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chapter">
      <style:paragraph-properties fo:margin-top="0.353cm" fo:margin-bottom="0.176cm" style:contextual-spacing="false"/>
      <style:text-properties fo:color="#1a1a1a" loext:opacity="100%" style:font-name="Liberation Sans2" fo:font-family="'Liberation Sans'" style:font-family-generic="swiss" style:font-pitch="variable" fo:font-size="12pt" fo:font-weight="bold" style:font-name-asian="Liberation Sans3" style:font-family-asian="'Liberation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andart" style:family="paragraph" style:parent-style-name="Heading_20_3">
      <style:paragraph-properties fo:margin-top="0.353cm" fo:margin-bottom="0.176cm" style:contextual-spacing="false"/>
      <style:text-properties style:font-name="Liberation Sans1" fo:font-family="'Liberation Sans'" style:font-family-generic="roman" style:font-pitch="variable" fo:font-size="12pt" fo:font-weight="bold" style:font-name-asian="Liberation Sans" style:font-family-asian="'Liberation Sans'" style:font-size-asian="12pt" style:font-weight-asian="bold" style:font-name-complex="Liberation Sans3" style:font-family-complex="'Liberation Sans'" style:font-family-generic-complex="system" style:font-pitch-complex="variable" style:font-size-complex="12pt"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weight="bold" officeooo:rsid="00161f0a" officeooo:paragraph-rsid="00161f0a" style:font-weight-asian="bold" style:font-weight-complex="bold"/>
    </style:style>
    <style:style style:name="MP2" style:family="paragraph" style:parent-style-name="Footer">
      <style:paragraph-properties fo:text-align="start" style:justify-single-word="false"/>
      <style:text-properties fo:font-weight="bold" style:font-weight-asian="bold" style:font-weight-complex="bold"/>
    </style:style>
    <style:style style:name="MT1" style:family="text">
      <style:text-properties officeooo:rsid="00161f0a"/>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kt: VisionBot</text:p>
      </style:header>
      <style:footer>
        <text:p text:style-name="MP2"><text:span text:style-name="MT1">Seite </text:span><text:bookmark-start text:name="PageNumWizard_FOOTER_Standard1 Kopie 1"/><text:page-number text:select-page="current">37</text:page-number><text:s/><text:span text:style-name="MT1">von</text:span> <loext:page-count-range>37</loext:page-count-range><text:bookmark-end text:name="PageNumWizard_FOOTER_Standard1 K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14</meta:editing-cycles>
    <meta:creation-date>2026-04-23T20:42:23.364000000</meta:creation-date>
    <dc:date>2026-04-28T18:10:46.996106200</dc:date>
    <meta:editing-duration>PT8H37M10S</meta:editing-duration>
    <meta:generator>LibreOffice/25.8.5.2$Windows_X86_64 LibreOffice_project/9c8b85f387cc00a89945a79c9e6239f32e450ac2</meta:generator>
    <meta:print-date>2026-04-28T09:01:35.306382900</meta:print-date>
    <meta:printed-by>PDF-Dateien</meta:printed-by>
    <meta:document-statistic meta:table-count="13" meta:image-count="3" meta:object-count="0" meta:page-count="37" meta:paragraph-count="916" meta:word-count="8776" meta:character-count="68090" meta:non-whitespace-character-count="59962"/>
  </office:meta>
</office:document-meta>
</file>